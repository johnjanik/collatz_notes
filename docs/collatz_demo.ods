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IF([.A1]=1;1;(IF(MOD([.A1];2)=0;[.A1]/2;3*[.A1]+1)))" office:value-type="float" office:value="1" calcext:value-type="float">
            <text:p>1</text:p>
          </table:table-cell>
          <table:table-cell table:formula="of:=IF([.B1]=1;1;(IF(MOD([.B1];2)=0;[.B1]/2;3*[.B1]+1)))" office:value-type="float" office:value="1" calcext:value-type="float">
            <text:p>1</text:p>
          </table:table-cell>
          <table:table-cell table:formula="of:=IF([.C1]=1;1;(IF(MOD([.C1];2)=0;[.C1]/2;3*[.C1]+1)))" office:value-type="float" office:value="1" calcext:value-type="float">
            <text:p>1</text:p>
          </table:table-cell>
          <table:table-cell table:formula="of:=IF([.D1]=1;1;(IF(MOD([.D1];2)=0;[.D1]/2;3*[.D1]+1)))" office:value-type="float" office:value="1" calcext:value-type="float">
            <text:p>1</text:p>
          </table:table-cell>
          <table:table-cell table:formula="of:=IF([.E1]=1;1;(IF(MOD([.E1];2)=0;[.E1]/2;3*[.E1]+1)))" office:value-type="float" office:value="1" calcext:value-type="float">
            <text:p>1</text:p>
          </table:table-cell>
          <table:table-cell table:formula="of:=IF([.F1]=1;1;(IF(MOD([.F1];2)=0;[.F1]/2;3*[.F1]+1)))" office:value-type="float" office:value="1" calcext:value-type="float">
            <text:p>1</text:p>
          </table:table-cell>
          <table:table-cell table:formula="of:=IF([.G1]=1;1;(IF(MOD([.G1];2)=0;[.G1]/2;3*[.G1]+1)))" office:value-type="float" office:value="1" calcext:value-type="float">
            <text:p>1</text:p>
          </table:table-cell>
          <table:table-cell table:formula="of:=IF([.H1]=1;1;(IF(MOD([.H1];2)=0;[.H1]/2;3*[.H1]+1)))" office:value-type="float" office:value="1" calcext:value-type="float">
            <text:p>1</text:p>
          </table:table-cell>
          <table:table-cell table:formula="of:=IF([.I1]=1;1;(IF(MOD([.I1];2)=0;[.I1]/2;3*[.I1]+1)))" office:value-type="float" office:value="1" calcext:value-type="float">
            <text:p>1</text:p>
          </table:table-cell>
          <table:table-cell table:formula="of:=IF([.J1]=1;1;(IF(MOD([.J1];2)=0;[.J1]/2;3*[.J1]+1)))" office:value-type="float" office:value="1" calcext:value-type="float">
            <text:p>1</text:p>
          </table:table-cell>
          <table:table-cell table:formula="of:=IF([.K1]=1;1;(IF(MOD([.K1];2)=0;[.K1]/2;3*[.K1]+1)))" office:value-type="float" office:value="1" calcext:value-type="float">
            <text:p>1</text:p>
          </table:table-cell>
          <table:table-cell table:formula="of:=IF([.L1]=1;1;(IF(MOD([.L1];2)=0;[.L1]/2;3*[.L1]+1)))" office:value-type="float" office:value="1" calcext:value-type="float">
            <text:p>1</text:p>
          </table:table-cell>
          <table:table-cell table:formula="of:=IF([.M1]=1;1;(IF(MOD([.M1];2)=0;[.M1]/2;3*[.M1]+1)))" office:value-type="float" office:value="1" calcext:value-type="float">
            <text:p>1</text:p>
          </table:table-cell>
          <table:table-cell table:formula="of:=IF([.N1]=1;1;(IF(MOD([.N1];2)=0;[.N1]/2;3*[.N1]+1)))" office:value-type="float" office:value="1" calcext:value-type="float">
            <text:p>1</text:p>
          </table:table-cell>
          <table:table-cell table:formula="of:=IF([.O1]=1;1;(IF(MOD([.O1];2)=0;[.O1]/2;3*[.O1]+1)))" office:value-type="float" office:value="1" calcext:value-type="float">
            <text:p>1</text:p>
          </table:table-cell>
          <table:table-cell table:formula="of:=IF([.P1]=1;1;(IF(MOD([.P1];2)=0;[.P1]/2;3*[.P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2]=1;1;(IF(MOD([.A2];2)=0;[.A2]/2;3*[.A2]+1)))" office:value-type="float" office:value="10" calcext:value-type="float">
            <text:p>10</text:p>
          </table:table-cell>
          <table:table-cell table:formula="of:=IF([.B2]=1;1;(IF(MOD([.B2];2)=0;[.B2]/2;3*[.B2]+1)))" office:value-type="float" office:value="5" calcext:value-type="float">
            <text:p>5</text:p>
          </table:table-cell>
          <table:table-cell table:formula="of:=IF([.C2]=1;1;(IF(MOD([.C2];2)=0;[.C2]/2;3*[.C2]+1)))" office:value-type="float" office:value="16" calcext:value-type="float">
            <text:p>16</text:p>
          </table:table-cell>
          <table:table-cell table:formula="of:=IF([.D2]=1;1;(IF(MOD([.D2];2)=0;[.D2]/2;3*[.D2]+1)))" office:value-type="float" office:value="8" calcext:value-type="float">
            <text:p>8</text:p>
          </table:table-cell>
          <table:table-cell table:formula="of:=IF([.E2]=1;1;(IF(MOD([.E2];2)=0;[.E2]/2;3*[.E2]+1)))" office:value-type="float" office:value="4" calcext:value-type="float">
            <text:p>4</text:p>
          </table:table-cell>
          <table:table-cell table:formula="of:=IF([.F2]=1;1;(IF(MOD([.F2];2)=0;[.F2]/2;3*[.F2]+1)))" office:value-type="float" office:value="2" calcext:value-type="float">
            <text:p>2</text:p>
          </table:table-cell>
          <table:table-cell table:formula="of:=IF([.G2]=1;1;(IF(MOD([.G2];2)=0;[.G2]/2;3*[.G2]+1)))" office:value-type="float" office:value="1" calcext:value-type="float">
            <text:p>1</text:p>
          </table:table-cell>
          <table:table-cell table:formula="of:=IF([.H2]=1;1;(IF(MOD([.H2];2)=0;[.H2]/2;3*[.H2]+1)))" office:value-type="float" office:value="1" calcext:value-type="float">
            <text:p>1</text:p>
          </table:table-cell>
          <table:table-cell table:formula="of:=IF([.I2]=1;1;(IF(MOD([.I2];2)=0;[.I2]/2;3*[.I2]+1)))" office:value-type="float" office:value="1" calcext:value-type="float">
            <text:p>1</text:p>
          </table:table-cell>
          <table:table-cell table:formula="of:=IF([.J2]=1;1;(IF(MOD([.J2];2)=0;[.J2]/2;3*[.J2]+1)))" office:value-type="float" office:value="1" calcext:value-type="float">
            <text:p>1</text:p>
          </table:table-cell>
          <table:table-cell table:formula="of:=IF([.K2]=1;1;(IF(MOD([.K2];2)=0;[.K2]/2;3*[.K2]+1)))" office:value-type="float" office:value="1" calcext:value-type="float">
            <text:p>1</text:p>
          </table:table-cell>
          <table:table-cell table:formula="of:=IF([.L2]=1;1;(IF(MOD([.L2];2)=0;[.L2]/2;3*[.L2]+1)))" office:value-type="float" office:value="1" calcext:value-type="float">
            <text:p>1</text:p>
          </table:table-cell>
          <table:table-cell table:formula="of:=IF([.M2]=1;1;(IF(MOD([.M2];2)=0;[.M2]/2;3*[.M2]+1)))" office:value-type="float" office:value="1" calcext:value-type="float">
            <text:p>1</text:p>
          </table:table-cell>
          <table:table-cell table:formula="of:=IF([.N2]=1;1;(IF(MOD([.N2];2)=0;[.N2]/2;3*[.N2]+1)))" office:value-type="float" office:value="1" calcext:value-type="float">
            <text:p>1</text:p>
          </table:table-cell>
          <table:table-cell table:formula="of:=IF([.O2]=1;1;(IF(MOD([.O2];2)=0;[.O2]/2;3*[.O2]+1)))" office:value-type="float" office:value="1" calcext:value-type="float">
            <text:p>1</text:p>
          </table:table-cell>
          <table:table-cell table:formula="of:=IF([.P2]=1;1;(IF(MOD([.P2];2)=0;[.P2]/2;3*[.P2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3]=1;1;(IF(MOD([.A3];2)=0;[.A3]/2;3*[.A3]+1)))" office:value-type="float" office:value="2" calcext:value-type="float">
            <text:p>2</text:p>
          </table:table-cell>
          <table:table-cell table:formula="of:=IF([.B3]=1;1;(IF(MOD([.B3];2)=0;[.B3]/2;3*[.B3]+1)))" office:value-type="float" office:value="1" calcext:value-type="float">
            <text:p>1</text:p>
          </table:table-cell>
          <table:table-cell table:formula="of:=IF([.C3]=1;1;(IF(MOD([.C3];2)=0;[.C3]/2;3*[.C3]+1)))" office:value-type="float" office:value="1" calcext:value-type="float">
            <text:p>1</text:p>
          </table:table-cell>
          <table:table-cell table:formula="of:=IF([.D3]=1;1;(IF(MOD([.D3];2)=0;[.D3]/2;3*[.D3]+1)))" office:value-type="float" office:value="1" calcext:value-type="float">
            <text:p>1</text:p>
          </table:table-cell>
          <table:table-cell table:formula="of:=IF([.E3]=1;1;(IF(MOD([.E3];2)=0;[.E3]/2;3*[.E3]+1)))" office:value-type="float" office:value="1" calcext:value-type="float">
            <text:p>1</text:p>
          </table:table-cell>
          <table:table-cell table:formula="of:=IF([.F3]=1;1;(IF(MOD([.F3];2)=0;[.F3]/2;3*[.F3]+1)))" office:value-type="float" office:value="1" calcext:value-type="float">
            <text:p>1</text:p>
          </table:table-cell>
          <table:table-cell table:formula="of:=IF([.G3]=1;1;(IF(MOD([.G3];2)=0;[.G3]/2;3*[.G3]+1)))" office:value-type="float" office:value="1" calcext:value-type="float">
            <text:p>1</text:p>
          </table:table-cell>
          <table:table-cell table:formula="of:=IF([.H3]=1;1;(IF(MOD([.H3];2)=0;[.H3]/2;3*[.H3]+1)))" office:value-type="float" office:value="1" calcext:value-type="float">
            <text:p>1</text:p>
          </table:table-cell>
          <table:table-cell table:formula="of:=IF([.I3]=1;1;(IF(MOD([.I3];2)=0;[.I3]/2;3*[.I3]+1)))" office:value-type="float" office:value="1" calcext:value-type="float">
            <text:p>1</text:p>
          </table:table-cell>
          <table:table-cell table:formula="of:=IF([.J3]=1;1;(IF(MOD([.J3];2)=0;[.J3]/2;3*[.J3]+1)))" office:value-type="float" office:value="1" calcext:value-type="float">
            <text:p>1</text:p>
          </table:table-cell>
          <table:table-cell table:formula="of:=IF([.K3]=1;1;(IF(MOD([.K3];2)=0;[.K3]/2;3*[.K3]+1)))" office:value-type="float" office:value="1" calcext:value-type="float">
            <text:p>1</text:p>
          </table:table-cell>
          <table:table-cell table:formula="of:=IF([.L3]=1;1;(IF(MOD([.L3];2)=0;[.L3]/2;3*[.L3]+1)))" office:value-type="float" office:value="1" calcext:value-type="float">
            <text:p>1</text:p>
          </table:table-cell>
          <table:table-cell table:formula="of:=IF([.M3]=1;1;(IF(MOD([.M3];2)=0;[.M3]/2;3*[.M3]+1)))" office:value-type="float" office:value="1" calcext:value-type="float">
            <text:p>1</text:p>
          </table:table-cell>
          <table:table-cell table:formula="of:=IF([.N3]=1;1;(IF(MOD([.N3];2)=0;[.N3]/2;3*[.N3]+1)))" office:value-type="float" office:value="1" calcext:value-type="float">
            <text:p>1</text:p>
          </table:table-cell>
          <table:table-cell table:formula="of:=IF([.O3]=1;1;(IF(MOD([.O3];2)=0;[.O3]/2;3*[.O3]+1)))" office:value-type="float" office:value="1" calcext:value-type="float">
            <text:p>1</text:p>
          </table:table-cell>
          <table:table-cell table:formula="of:=IF([.P3]=1;1;(IF(MOD([.P3];2)=0;[.P3]/2;3*[.P3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4]=1;1;(IF(MOD([.A4];2)=0;[.A4]/2;3*[.A4]+1)))" office:value-type="float" office:value="16" calcext:value-type="float">
            <text:p>16</text:p>
          </table:table-cell>
          <table:table-cell table:formula="of:=IF([.B4]=1;1;(IF(MOD([.B4];2)=0;[.B4]/2;3*[.B4]+1)))" office:value-type="float" office:value="8" calcext:value-type="float">
            <text:p>8</text:p>
          </table:table-cell>
          <table:table-cell table:formula="of:=IF([.C4]=1;1;(IF(MOD([.C4];2)=0;[.C4]/2;3*[.C4]+1)))" office:value-type="float" office:value="4" calcext:value-type="float">
            <text:p>4</text:p>
          </table:table-cell>
          <table:table-cell table:formula="of:=IF([.D4]=1;1;(IF(MOD([.D4];2)=0;[.D4]/2;3*[.D4]+1)))" office:value-type="float" office:value="2" calcext:value-type="float">
            <text:p>2</text:p>
          </table:table-cell>
          <table:table-cell table:formula="of:=IF([.E4]=1;1;(IF(MOD([.E4];2)=0;[.E4]/2;3*[.E4]+1)))" office:value-type="float" office:value="1" calcext:value-type="float">
            <text:p>1</text:p>
          </table:table-cell>
          <table:table-cell table:formula="of:=IF([.F4]=1;1;(IF(MOD([.F4];2)=0;[.F4]/2;3*[.F4]+1)))" office:value-type="float" office:value="1" calcext:value-type="float">
            <text:p>1</text:p>
          </table:table-cell>
          <table:table-cell table:formula="of:=IF([.G4]=1;1;(IF(MOD([.G4];2)=0;[.G4]/2;3*[.G4]+1)))" office:value-type="float" office:value="1" calcext:value-type="float">
            <text:p>1</text:p>
          </table:table-cell>
          <table:table-cell table:formula="of:=IF([.H4]=1;1;(IF(MOD([.H4];2)=0;[.H4]/2;3*[.H4]+1)))" office:value-type="float" office:value="1" calcext:value-type="float">
            <text:p>1</text:p>
          </table:table-cell>
          <table:table-cell table:formula="of:=IF([.I4]=1;1;(IF(MOD([.I4];2)=0;[.I4]/2;3*[.I4]+1)))" office:value-type="float" office:value="1" calcext:value-type="float">
            <text:p>1</text:p>
          </table:table-cell>
          <table:table-cell table:formula="of:=IF([.J4]=1;1;(IF(MOD([.J4];2)=0;[.J4]/2;3*[.J4]+1)))" office:value-type="float" office:value="1" calcext:value-type="float">
            <text:p>1</text:p>
          </table:table-cell>
          <table:table-cell table:formula="of:=IF([.K4]=1;1;(IF(MOD([.K4];2)=0;[.K4]/2;3*[.K4]+1)))" office:value-type="float" office:value="1" calcext:value-type="float">
            <text:p>1</text:p>
          </table:table-cell>
          <table:table-cell table:formula="of:=IF([.L4]=1;1;(IF(MOD([.L4];2)=0;[.L4]/2;3*[.L4]+1)))" office:value-type="float" office:value="1" calcext:value-type="float">
            <text:p>1</text:p>
          </table:table-cell>
          <table:table-cell table:formula="of:=IF([.M4]=1;1;(IF(MOD([.M4];2)=0;[.M4]/2;3*[.M4]+1)))" office:value-type="float" office:value="1" calcext:value-type="float">
            <text:p>1</text:p>
          </table:table-cell>
          <table:table-cell table:formula="of:=IF([.N4]=1;1;(IF(MOD([.N4];2)=0;[.N4]/2;3*[.N4]+1)))" office:value-type="float" office:value="1" calcext:value-type="float">
            <text:p>1</text:p>
          </table:table-cell>
          <table:table-cell table:formula="of:=IF([.O4]=1;1;(IF(MOD([.O4];2)=0;[.O4]/2;3*[.O4]+1)))" office:value-type="float" office:value="1" calcext:value-type="float">
            <text:p>1</text:p>
          </table:table-cell>
          <table:table-cell table:formula="of:=IF([.P4]=1;1;(IF(MOD([.P4];2)=0;[.P4]/2;3*[.P4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5]=1;1;(IF(MOD([.A5];2)=0;[.A5]/2;3*[.A5]+1)))" office:value-type="float" office:value="3" calcext:value-type="float">
            <text:p>3</text:p>
          </table:table-cell>
          <table:table-cell table:formula="of:=IF([.B5]=1;1;(IF(MOD([.B5];2)=0;[.B5]/2;3*[.B5]+1)))" office:value-type="float" office:value="10" calcext:value-type="float">
            <text:p>10</text:p>
          </table:table-cell>
          <table:table-cell table:formula="of:=IF([.C5]=1;1;(IF(MOD([.C5];2)=0;[.C5]/2;3*[.C5]+1)))" office:value-type="float" office:value="5" calcext:value-type="float">
            <text:p>5</text:p>
          </table:table-cell>
          <table:table-cell table:formula="of:=IF([.D5]=1;1;(IF(MOD([.D5];2)=0;[.D5]/2;3*[.D5]+1)))" office:value-type="float" office:value="16" calcext:value-type="float">
            <text:p>16</text:p>
          </table:table-cell>
          <table:table-cell table:formula="of:=IF([.E5]=1;1;(IF(MOD([.E5];2)=0;[.E5]/2;3*[.E5]+1)))" office:value-type="float" office:value="8" calcext:value-type="float">
            <text:p>8</text:p>
          </table:table-cell>
          <table:table-cell table:formula="of:=IF([.F5]=1;1;(IF(MOD([.F5];2)=0;[.F5]/2;3*[.F5]+1)))" office:value-type="float" office:value="4" calcext:value-type="float">
            <text:p>4</text:p>
          </table:table-cell>
          <table:table-cell table:formula="of:=IF([.G5]=1;1;(IF(MOD([.G5];2)=0;[.G5]/2;3*[.G5]+1)))" office:value-type="float" office:value="2" calcext:value-type="float">
            <text:p>2</text:p>
          </table:table-cell>
          <table:table-cell table:formula="of:=IF([.H5]=1;1;(IF(MOD([.H5];2)=0;[.H5]/2;3*[.H5]+1)))" office:value-type="float" office:value="1" calcext:value-type="float">
            <text:p>1</text:p>
          </table:table-cell>
          <table:table-cell table:formula="of:=IF([.I5]=1;1;(IF(MOD([.I5];2)=0;[.I5]/2;3*[.I5]+1)))" office:value-type="float" office:value="1" calcext:value-type="float">
            <text:p>1</text:p>
          </table:table-cell>
          <table:table-cell table:formula="of:=IF([.J5]=1;1;(IF(MOD([.J5];2)=0;[.J5]/2;3*[.J5]+1)))" office:value-type="float" office:value="1" calcext:value-type="float">
            <text:p>1</text:p>
          </table:table-cell>
          <table:table-cell table:formula="of:=IF([.K5]=1;1;(IF(MOD([.K5];2)=0;[.K5]/2;3*[.K5]+1)))" office:value-type="float" office:value="1" calcext:value-type="float">
            <text:p>1</text:p>
          </table:table-cell>
          <table:table-cell table:formula="of:=IF([.L5]=1;1;(IF(MOD([.L5];2)=0;[.L5]/2;3*[.L5]+1)))" office:value-type="float" office:value="1" calcext:value-type="float">
            <text:p>1</text:p>
          </table:table-cell>
          <table:table-cell table:formula="of:=IF([.M5]=1;1;(IF(MOD([.M5];2)=0;[.M5]/2;3*[.M5]+1)))" office:value-type="float" office:value="1" calcext:value-type="float">
            <text:p>1</text:p>
          </table:table-cell>
          <table:table-cell table:formula="of:=IF([.N5]=1;1;(IF(MOD([.N5];2)=0;[.N5]/2;3*[.N5]+1)))" office:value-type="float" office:value="1" calcext:value-type="float">
            <text:p>1</text:p>
          </table:table-cell>
          <table:table-cell table:formula="of:=IF([.O5]=1;1;(IF(MOD([.O5];2)=0;[.O5]/2;3*[.O5]+1)))" office:value-type="float" office:value="1" calcext:value-type="float">
            <text:p>1</text:p>
          </table:table-cell>
          <table:table-cell table:formula="of:=IF([.P5]=1;1;(IF(MOD([.P5];2)=0;[.P5]/2;3*[.P5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6]=1;1;(IF(MOD([.A6];2)=0;[.A6]/2;3*[.A6]+1)))" office:value-type="float" office:value="22" calcext:value-type="float">
            <text:p>22</text:p>
          </table:table-cell>
          <table:table-cell table:formula="of:=IF([.B6]=1;1;(IF(MOD([.B6];2)=0;[.B6]/2;3*[.B6]+1)))" office:value-type="float" office:value="11" calcext:value-type="float">
            <text:p>11</text:p>
          </table:table-cell>
          <table:table-cell table:formula="of:=IF([.C6]=1;1;(IF(MOD([.C6];2)=0;[.C6]/2;3*[.C6]+1)))" office:value-type="float" office:value="34" calcext:value-type="float">
            <text:p>34</text:p>
          </table:table-cell>
          <table:table-cell table:formula="of:=IF([.D6]=1;1;(IF(MOD([.D6];2)=0;[.D6]/2;3*[.D6]+1)))" office:value-type="float" office:value="17" calcext:value-type="float">
            <text:p>17</text:p>
          </table:table-cell>
          <table:table-cell table:formula="of:=IF([.E6]=1;1;(IF(MOD([.E6];2)=0;[.E6]/2;3*[.E6]+1)))" office:value-type="float" office:value="52" calcext:value-type="float">
            <text:p>52</text:p>
          </table:table-cell>
          <table:table-cell table:formula="of:=IF([.F6]=1;1;(IF(MOD([.F6];2)=0;[.F6]/2;3*[.F6]+1)))" office:value-type="float" office:value="26" calcext:value-type="float">
            <text:p>26</text:p>
          </table:table-cell>
          <table:table-cell table:formula="of:=IF([.G6]=1;1;(IF(MOD([.G6];2)=0;[.G6]/2;3*[.G6]+1)))" office:value-type="float" office:value="13" calcext:value-type="float">
            <text:p>13</text:p>
          </table:table-cell>
          <table:table-cell table:formula="of:=IF([.H6]=1;1;(IF(MOD([.H6];2)=0;[.H6]/2;3*[.H6]+1)))" office:value-type="float" office:value="40" calcext:value-type="float">
            <text:p>40</text:p>
          </table:table-cell>
          <table:table-cell table:formula="of:=IF([.I6]=1;1;(IF(MOD([.I6];2)=0;[.I6]/2;3*[.I6]+1)))" office:value-type="float" office:value="20" calcext:value-type="float">
            <text:p>20</text:p>
          </table:table-cell>
          <table:table-cell table:formula="of:=IF([.J6]=1;1;(IF(MOD([.J6];2)=0;[.J6]/2;3*[.J6]+1)))" office:value-type="float" office:value="10" calcext:value-type="float">
            <text:p>10</text:p>
          </table:table-cell>
          <table:table-cell table:formula="of:=IF([.K6]=1;1;(IF(MOD([.K6];2)=0;[.K6]/2;3*[.K6]+1)))" office:value-type="float" office:value="5" calcext:value-type="float">
            <text:p>5</text:p>
          </table:table-cell>
          <table:table-cell table:formula="of:=IF([.L6]=1;1;(IF(MOD([.L6];2)=0;[.L6]/2;3*[.L6]+1)))" office:value-type="float" office:value="16" calcext:value-type="float">
            <text:p>16</text:p>
          </table:table-cell>
          <table:table-cell table:formula="of:=IF([.M6]=1;1;(IF(MOD([.M6];2)=0;[.M6]/2;3*[.M6]+1)))" office:value-type="float" office:value="8" calcext:value-type="float">
            <text:p>8</text:p>
          </table:table-cell>
          <table:table-cell table:formula="of:=IF([.N6]=1;1;(IF(MOD([.N6];2)=0;[.N6]/2;3*[.N6]+1)))" office:value-type="float" office:value="4" calcext:value-type="float">
            <text:p>4</text:p>
          </table:table-cell>
          <table:table-cell table:formula="of:=IF([.O6]=1;1;(IF(MOD([.O6];2)=0;[.O6]/2;3*[.O6]+1)))" office:value-type="float" office:value="2" calcext:value-type="float">
            <text:p>2</text:p>
          </table:table-cell>
          <table:table-cell table:formula="of:=IF([.P6]=1;1;(IF(MOD([.P6];2)=0;[.P6]/2;3*[.P6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7]=1;1;(IF(MOD([.A7];2)=0;[.A7]/2;3*[.A7]+1)))" office:value-type="float" office:value="4" calcext:value-type="float">
            <text:p>4</text:p>
          </table:table-cell>
          <table:table-cell table:formula="of:=IF([.B7]=1;1;(IF(MOD([.B7];2)=0;[.B7]/2;3*[.B7]+1)))" office:value-type="float" office:value="2" calcext:value-type="float">
            <text:p>2</text:p>
          </table:table-cell>
          <table:table-cell table:formula="of:=IF([.C7]=1;1;(IF(MOD([.C7];2)=0;[.C7]/2;3*[.C7]+1)))" office:value-type="float" office:value="1" calcext:value-type="float">
            <text:p>1</text:p>
          </table:table-cell>
          <table:table-cell table:formula="of:=IF([.D7]=1;1;(IF(MOD([.D7];2)=0;[.D7]/2;3*[.D7]+1)))" office:value-type="float" office:value="1" calcext:value-type="float">
            <text:p>1</text:p>
          </table:table-cell>
          <table:table-cell table:formula="of:=IF([.E7]=1;1;(IF(MOD([.E7];2)=0;[.E7]/2;3*[.E7]+1)))" office:value-type="float" office:value="1" calcext:value-type="float">
            <text:p>1</text:p>
          </table:table-cell>
          <table:table-cell table:formula="of:=IF([.F7]=1;1;(IF(MOD([.F7];2)=0;[.F7]/2;3*[.F7]+1)))" office:value-type="float" office:value="1" calcext:value-type="float">
            <text:p>1</text:p>
          </table:table-cell>
          <table:table-cell table:formula="of:=IF([.G7]=1;1;(IF(MOD([.G7];2)=0;[.G7]/2;3*[.G7]+1)))" office:value-type="float" office:value="1" calcext:value-type="float">
            <text:p>1</text:p>
          </table:table-cell>
          <table:table-cell table:formula="of:=IF([.H7]=1;1;(IF(MOD([.H7];2)=0;[.H7]/2;3*[.H7]+1)))" office:value-type="float" office:value="1" calcext:value-type="float">
            <text:p>1</text:p>
          </table:table-cell>
          <table:table-cell table:formula="of:=IF([.I7]=1;1;(IF(MOD([.I7];2)=0;[.I7]/2;3*[.I7]+1)))" office:value-type="float" office:value="1" calcext:value-type="float">
            <text:p>1</text:p>
          </table:table-cell>
          <table:table-cell table:formula="of:=IF([.J7]=1;1;(IF(MOD([.J7];2)=0;[.J7]/2;3*[.J7]+1)))" office:value-type="float" office:value="1" calcext:value-type="float">
            <text:p>1</text:p>
          </table:table-cell>
          <table:table-cell table:formula="of:=IF([.K7]=1;1;(IF(MOD([.K7];2)=0;[.K7]/2;3*[.K7]+1)))" office:value-type="float" office:value="1" calcext:value-type="float">
            <text:p>1</text:p>
          </table:table-cell>
          <table:table-cell table:formula="of:=IF([.L7]=1;1;(IF(MOD([.L7];2)=0;[.L7]/2;3*[.L7]+1)))" office:value-type="float" office:value="1" calcext:value-type="float">
            <text:p>1</text:p>
          </table:table-cell>
          <table:table-cell table:formula="of:=IF([.M7]=1;1;(IF(MOD([.M7];2)=0;[.M7]/2;3*[.M7]+1)))" office:value-type="float" office:value="1" calcext:value-type="float">
            <text:p>1</text:p>
          </table:table-cell>
          <table:table-cell table:formula="of:=IF([.N7]=1;1;(IF(MOD([.N7];2)=0;[.N7]/2;3*[.N7]+1)))" office:value-type="float" office:value="1" calcext:value-type="float">
            <text:p>1</text:p>
          </table:table-cell>
          <table:table-cell table:formula="of:=IF([.O7]=1;1;(IF(MOD([.O7];2)=0;[.O7]/2;3*[.O7]+1)))" office:value-type="float" office:value="1" calcext:value-type="float">
            <text:p>1</text:p>
          </table:table-cell>
          <table:table-cell table:formula="of:=IF([.P7]=1;1;(IF(MOD([.P7];2)=0;[.P7]/2;3*[.P7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]=1;1;(IF(MOD([.A8];2)=0;[.A8]/2;3*[.A8]+1)))" office:value-type="float" office:value="28" calcext:value-type="float">
            <text:p>28</text:p>
          </table:table-cell>
          <table:table-cell table:formula="of:=IF([.B8]=1;1;(IF(MOD([.B8];2)=0;[.B8]/2;3*[.B8]+1)))" office:value-type="float" office:value="14" calcext:value-type="float">
            <text:p>14</text:p>
          </table:table-cell>
          <table:table-cell table:formula="of:=IF([.C8]=1;1;(IF(MOD([.C8];2)=0;[.C8]/2;3*[.C8]+1)))" office:value-type="float" office:value="7" calcext:value-type="float">
            <text:p>7</text:p>
          </table:table-cell>
          <table:table-cell table:formula="of:=IF([.D8]=1;1;(IF(MOD([.D8];2)=0;[.D8]/2;3*[.D8]+1)))" office:value-type="float" office:value="22" calcext:value-type="float">
            <text:p>22</text:p>
          </table:table-cell>
          <table:table-cell table:formula="of:=IF([.E8]=1;1;(IF(MOD([.E8];2)=0;[.E8]/2;3*[.E8]+1)))" office:value-type="float" office:value="11" calcext:value-type="float">
            <text:p>11</text:p>
          </table:table-cell>
          <table:table-cell table:formula="of:=IF([.F8]=1;1;(IF(MOD([.F8];2)=0;[.F8]/2;3*[.F8]+1)))" office:value-type="float" office:value="34" calcext:value-type="float">
            <text:p>34</text:p>
          </table:table-cell>
          <table:table-cell table:formula="of:=IF([.G8]=1;1;(IF(MOD([.G8];2)=0;[.G8]/2;3*[.G8]+1)))" office:value-type="float" office:value="17" calcext:value-type="float">
            <text:p>17</text:p>
          </table:table-cell>
          <table:table-cell table:formula="of:=IF([.H8]=1;1;(IF(MOD([.H8];2)=0;[.H8]/2;3*[.H8]+1)))" office:value-type="float" office:value="52" calcext:value-type="float">
            <text:p>52</text:p>
          </table:table-cell>
          <table:table-cell table:formula="of:=IF([.I8]=1;1;(IF(MOD([.I8];2)=0;[.I8]/2;3*[.I8]+1)))" office:value-type="float" office:value="26" calcext:value-type="float">
            <text:p>26</text:p>
          </table:table-cell>
          <table:table-cell table:formula="of:=IF([.J8]=1;1;(IF(MOD([.J8];2)=0;[.J8]/2;3*[.J8]+1)))" office:value-type="float" office:value="13" calcext:value-type="float">
            <text:p>13</text:p>
          </table:table-cell>
          <table:table-cell table:formula="of:=IF([.K8]=1;1;(IF(MOD([.K8];2)=0;[.K8]/2;3*[.K8]+1)))" office:value-type="float" office:value="40" calcext:value-type="float">
            <text:p>40</text:p>
          </table:table-cell>
          <table:table-cell table:formula="of:=IF([.L8]=1;1;(IF(MOD([.L8];2)=0;[.L8]/2;3*[.L8]+1)))" office:value-type="float" office:value="20" calcext:value-type="float">
            <text:p>20</text:p>
          </table:table-cell>
          <table:table-cell table:formula="of:=IF([.M8]=1;1;(IF(MOD([.M8];2)=0;[.M8]/2;3*[.M8]+1)))" office:value-type="float" office:value="10" calcext:value-type="float">
            <text:p>10</text:p>
          </table:table-cell>
          <table:table-cell table:formula="of:=IF([.N8]=1;1;(IF(MOD([.N8];2)=0;[.N8]/2;3*[.N8]+1)))" office:value-type="float" office:value="5" calcext:value-type="float">
            <text:p>5</text:p>
          </table:table-cell>
          <table:table-cell table:formula="of:=IF([.O8]=1;1;(IF(MOD([.O8];2)=0;[.O8]/2;3*[.O8]+1)))" office:value-type="float" office:value="16" calcext:value-type="float">
            <text:p>16</text:p>
          </table:table-cell>
          <table:table-cell table:formula="of:=IF([.P8]=1;1;(IF(MOD([.P8];2)=0;[.P8]/2;3*[.P8]+1)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9]=1;1;(IF(MOD([.A9];2)=0;[.A9]/2;3*[.A9]+1)))" office:value-type="float" office:value="5" calcext:value-type="float">
            <text:p>5</text:p>
          </table:table-cell>
          <table:table-cell table:formula="of:=IF([.B9]=1;1;(IF(MOD([.B9];2)=0;[.B9]/2;3*[.B9]+1)))" office:value-type="float" office:value="16" calcext:value-type="float">
            <text:p>16</text:p>
          </table:table-cell>
          <table:table-cell table:formula="of:=IF([.C9]=1;1;(IF(MOD([.C9];2)=0;[.C9]/2;3*[.C9]+1)))" office:value-type="float" office:value="8" calcext:value-type="float">
            <text:p>8</text:p>
          </table:table-cell>
          <table:table-cell table:formula="of:=IF([.D9]=1;1;(IF(MOD([.D9];2)=0;[.D9]/2;3*[.D9]+1)))" office:value-type="float" office:value="4" calcext:value-type="float">
            <text:p>4</text:p>
          </table:table-cell>
          <table:table-cell table:formula="of:=IF([.E9]=1;1;(IF(MOD([.E9];2)=0;[.E9]/2;3*[.E9]+1)))" office:value-type="float" office:value="2" calcext:value-type="float">
            <text:p>2</text:p>
          </table:table-cell>
          <table:table-cell table:formula="of:=IF([.F9]=1;1;(IF(MOD([.F9];2)=0;[.F9]/2;3*[.F9]+1)))" office:value-type="float" office:value="1" calcext:value-type="float">
            <text:p>1</text:p>
          </table:table-cell>
          <table:table-cell table:formula="of:=IF([.G9]=1;1;(IF(MOD([.G9];2)=0;[.G9]/2;3*[.G9]+1)))" office:value-type="float" office:value="1" calcext:value-type="float">
            <text:p>1</text:p>
          </table:table-cell>
          <table:table-cell table:formula="of:=IF([.H9]=1;1;(IF(MOD([.H9];2)=0;[.H9]/2;3*[.H9]+1)))" office:value-type="float" office:value="1" calcext:value-type="float">
            <text:p>1</text:p>
          </table:table-cell>
          <table:table-cell table:formula="of:=IF([.I9]=1;1;(IF(MOD([.I9];2)=0;[.I9]/2;3*[.I9]+1)))" office:value-type="float" office:value="1" calcext:value-type="float">
            <text:p>1</text:p>
          </table:table-cell>
          <table:table-cell table:formula="of:=IF([.J9]=1;1;(IF(MOD([.J9];2)=0;[.J9]/2;3*[.J9]+1)))" office:value-type="float" office:value="1" calcext:value-type="float">
            <text:p>1</text:p>
          </table:table-cell>
          <table:table-cell table:formula="of:=IF([.K9]=1;1;(IF(MOD([.K9];2)=0;[.K9]/2;3*[.K9]+1)))" office:value-type="float" office:value="1" calcext:value-type="float">
            <text:p>1</text:p>
          </table:table-cell>
          <table:table-cell table:formula="of:=IF([.L9]=1;1;(IF(MOD([.L9];2)=0;[.L9]/2;3*[.L9]+1)))" office:value-type="float" office:value="1" calcext:value-type="float">
            <text:p>1</text:p>
          </table:table-cell>
          <table:table-cell table:formula="of:=IF([.M9]=1;1;(IF(MOD([.M9];2)=0;[.M9]/2;3*[.M9]+1)))" office:value-type="float" office:value="1" calcext:value-type="float">
            <text:p>1</text:p>
          </table:table-cell>
          <table:table-cell table:formula="of:=IF([.N9]=1;1;(IF(MOD([.N9];2)=0;[.N9]/2;3*[.N9]+1)))" office:value-type="float" office:value="1" calcext:value-type="float">
            <text:p>1</text:p>
          </table:table-cell>
          <table:table-cell table:formula="of:=IF([.O9]=1;1;(IF(MOD([.O9];2)=0;[.O9]/2;3*[.O9]+1)))" office:value-type="float" office:value="1" calcext:value-type="float">
            <text:p>1</text:p>
          </table:table-cell>
          <table:table-cell table:formula="of:=IF([.P9]=1;1;(IF(MOD([.P9];2)=0;[.P9]/2;3*[.P9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0]=1;1;(IF(MOD([.A10];2)=0;[.A10]/2;3*[.A10]+1)))" office:value-type="float" office:value="34" calcext:value-type="float">
            <text:p>34</text:p>
          </table:table-cell>
          <table:table-cell table:formula="of:=IF([.B10]=1;1;(IF(MOD([.B10];2)=0;[.B10]/2;3*[.B10]+1)))" office:value-type="float" office:value="17" calcext:value-type="float">
            <text:p>17</text:p>
          </table:table-cell>
          <table:table-cell table:formula="of:=IF([.C10]=1;1;(IF(MOD([.C10];2)=0;[.C10]/2;3*[.C10]+1)))" office:value-type="float" office:value="52" calcext:value-type="float">
            <text:p>52</text:p>
          </table:table-cell>
          <table:table-cell table:formula="of:=IF([.D10]=1;1;(IF(MOD([.D10];2)=0;[.D10]/2;3*[.D10]+1)))" office:value-type="float" office:value="26" calcext:value-type="float">
            <text:p>26</text:p>
          </table:table-cell>
          <table:table-cell table:formula="of:=IF([.E10]=1;1;(IF(MOD([.E10];2)=0;[.E10]/2;3*[.E10]+1)))" office:value-type="float" office:value="13" calcext:value-type="float">
            <text:p>13</text:p>
          </table:table-cell>
          <table:table-cell table:formula="of:=IF([.F10]=1;1;(IF(MOD([.F10];2)=0;[.F10]/2;3*[.F10]+1)))" office:value-type="float" office:value="40" calcext:value-type="float">
            <text:p>40</text:p>
          </table:table-cell>
          <table:table-cell table:formula="of:=IF([.G10]=1;1;(IF(MOD([.G10];2)=0;[.G10]/2;3*[.G10]+1)))" office:value-type="float" office:value="20" calcext:value-type="float">
            <text:p>20</text:p>
          </table:table-cell>
          <table:table-cell table:formula="of:=IF([.H10]=1;1;(IF(MOD([.H10];2)=0;[.H10]/2;3*[.H10]+1)))" office:value-type="float" office:value="10" calcext:value-type="float">
            <text:p>10</text:p>
          </table:table-cell>
          <table:table-cell table:formula="of:=IF([.I10]=1;1;(IF(MOD([.I10];2)=0;[.I10]/2;3*[.I10]+1)))" office:value-type="float" office:value="5" calcext:value-type="float">
            <text:p>5</text:p>
          </table:table-cell>
          <table:table-cell table:formula="of:=IF([.J10]=1;1;(IF(MOD([.J10];2)=0;[.J10]/2;3*[.J10]+1)))" office:value-type="float" office:value="16" calcext:value-type="float">
            <text:p>16</text:p>
          </table:table-cell>
          <table:table-cell table:formula="of:=IF([.K10]=1;1;(IF(MOD([.K10];2)=0;[.K10]/2;3*[.K10]+1)))" office:value-type="float" office:value="8" calcext:value-type="float">
            <text:p>8</text:p>
          </table:table-cell>
          <table:table-cell table:formula="of:=IF([.L10]=1;1;(IF(MOD([.L10];2)=0;[.L10]/2;3*[.L10]+1)))" office:value-type="float" office:value="4" calcext:value-type="float">
            <text:p>4</text:p>
          </table:table-cell>
          <table:table-cell table:formula="of:=IF([.M10]=1;1;(IF(MOD([.M10];2)=0;[.M10]/2;3*[.M10]+1)))" office:value-type="float" office:value="2" calcext:value-type="float">
            <text:p>2</text:p>
          </table:table-cell>
          <table:table-cell table:formula="of:=IF([.N10]=1;1;(IF(MOD([.N10];2)=0;[.N10]/2;3*[.N10]+1)))" office:value-type="float" office:value="1" calcext:value-type="float">
            <text:p>1</text:p>
          </table:table-cell>
          <table:table-cell table:formula="of:=IF([.O10]=1;1;(IF(MOD([.O10];2)=0;[.O10]/2;3*[.O10]+1)))" office:value-type="float" office:value="1" calcext:value-type="float">
            <text:p>1</text:p>
          </table:table-cell>
          <table:table-cell table:formula="of:=IF([.P10]=1;1;(IF(MOD([.P10];2)=0;[.P10]/2;3*[.P10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1]=1;1;(IF(MOD([.A11];2)=0;[.A11]/2;3*[.A11]+1)))" office:value-type="float" office:value="6" calcext:value-type="float">
            <text:p>6</text:p>
          </table:table-cell>
          <table:table-cell table:formula="of:=IF([.B11]=1;1;(IF(MOD([.B11];2)=0;[.B11]/2;3*[.B11]+1)))" office:value-type="float" office:value="3" calcext:value-type="float">
            <text:p>3</text:p>
          </table:table-cell>
          <table:table-cell table:formula="of:=IF([.C11]=1;1;(IF(MOD([.C11];2)=0;[.C11]/2;3*[.C11]+1)))" office:value-type="float" office:value="10" calcext:value-type="float">
            <text:p>10</text:p>
          </table:table-cell>
          <table:table-cell table:formula="of:=IF([.D11]=1;1;(IF(MOD([.D11];2)=0;[.D11]/2;3*[.D11]+1)))" office:value-type="float" office:value="5" calcext:value-type="float">
            <text:p>5</text:p>
          </table:table-cell>
          <table:table-cell table:formula="of:=IF([.E11]=1;1;(IF(MOD([.E11];2)=0;[.E11]/2;3*[.E11]+1)))" office:value-type="float" office:value="16" calcext:value-type="float">
            <text:p>16</text:p>
          </table:table-cell>
          <table:table-cell table:formula="of:=IF([.F11]=1;1;(IF(MOD([.F11];2)=0;[.F11]/2;3*[.F11]+1)))" office:value-type="float" office:value="8" calcext:value-type="float">
            <text:p>8</text:p>
          </table:table-cell>
          <table:table-cell table:formula="of:=IF([.G11]=1;1;(IF(MOD([.G11];2)=0;[.G11]/2;3*[.G11]+1)))" office:value-type="float" office:value="4" calcext:value-type="float">
            <text:p>4</text:p>
          </table:table-cell>
          <table:table-cell table:formula="of:=IF([.H11]=1;1;(IF(MOD([.H11];2)=0;[.H11]/2;3*[.H11]+1)))" office:value-type="float" office:value="2" calcext:value-type="float">
            <text:p>2</text:p>
          </table:table-cell>
          <table:table-cell table:formula="of:=IF([.I11]=1;1;(IF(MOD([.I11];2)=0;[.I11]/2;3*[.I11]+1)))" office:value-type="float" office:value="1" calcext:value-type="float">
            <text:p>1</text:p>
          </table:table-cell>
          <table:table-cell table:formula="of:=IF([.J11]=1;1;(IF(MOD([.J11];2)=0;[.J11]/2;3*[.J11]+1)))" office:value-type="float" office:value="1" calcext:value-type="float">
            <text:p>1</text:p>
          </table:table-cell>
          <table:table-cell table:formula="of:=IF([.K11]=1;1;(IF(MOD([.K11];2)=0;[.K11]/2;3*[.K11]+1)))" office:value-type="float" office:value="1" calcext:value-type="float">
            <text:p>1</text:p>
          </table:table-cell>
          <table:table-cell table:formula="of:=IF([.L11]=1;1;(IF(MOD([.L11];2)=0;[.L11]/2;3*[.L11]+1)))" office:value-type="float" office:value="1" calcext:value-type="float">
            <text:p>1</text:p>
          </table:table-cell>
          <table:table-cell table:formula="of:=IF([.M11]=1;1;(IF(MOD([.M11];2)=0;[.M11]/2;3*[.M11]+1)))" office:value-type="float" office:value="1" calcext:value-type="float">
            <text:p>1</text:p>
          </table:table-cell>
          <table:table-cell table:formula="of:=IF([.N11]=1;1;(IF(MOD([.N11];2)=0;[.N11]/2;3*[.N11]+1)))" office:value-type="float" office:value="1" calcext:value-type="float">
            <text:p>1</text:p>
          </table:table-cell>
          <table:table-cell table:formula="of:=IF([.O11]=1;1;(IF(MOD([.O11];2)=0;[.O11]/2;3*[.O11]+1)))" office:value-type="float" office:value="1" calcext:value-type="float">
            <text:p>1</text:p>
          </table:table-cell>
          <table:table-cell table:formula="of:=IF([.P11]=1;1;(IF(MOD([.P11];2)=0;[.P11]/2;3*[.P1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2]=1;1;(IF(MOD([.A12];2)=0;[.A12]/2;3*[.A12]+1)))" office:value-type="float" office:value="40" calcext:value-type="float">
            <text:p>40</text:p>
          </table:table-cell>
          <table:table-cell table:formula="of:=IF([.B12]=1;1;(IF(MOD([.B12];2)=0;[.B12]/2;3*[.B12]+1)))" office:value-type="float" office:value="20" calcext:value-type="float">
            <text:p>20</text:p>
          </table:table-cell>
          <table:table-cell table:formula="of:=IF([.C12]=1;1;(IF(MOD([.C12];2)=0;[.C12]/2;3*[.C12]+1)))" office:value-type="float" office:value="10" calcext:value-type="float">
            <text:p>10</text:p>
          </table:table-cell>
          <table:table-cell table:formula="of:=IF([.D12]=1;1;(IF(MOD([.D12];2)=0;[.D12]/2;3*[.D12]+1)))" office:value-type="float" office:value="5" calcext:value-type="float">
            <text:p>5</text:p>
          </table:table-cell>
          <table:table-cell table:formula="of:=IF([.E12]=1;1;(IF(MOD([.E12];2)=0;[.E12]/2;3*[.E12]+1)))" office:value-type="float" office:value="16" calcext:value-type="float">
            <text:p>16</text:p>
          </table:table-cell>
          <table:table-cell table:formula="of:=IF([.F12]=1;1;(IF(MOD([.F12];2)=0;[.F12]/2;3*[.F12]+1)))" office:value-type="float" office:value="8" calcext:value-type="float">
            <text:p>8</text:p>
          </table:table-cell>
          <table:table-cell table:formula="of:=IF([.G12]=1;1;(IF(MOD([.G12];2)=0;[.G12]/2;3*[.G12]+1)))" office:value-type="float" office:value="4" calcext:value-type="float">
            <text:p>4</text:p>
          </table:table-cell>
          <table:table-cell table:formula="of:=IF([.H12]=1;1;(IF(MOD([.H12];2)=0;[.H12]/2;3*[.H12]+1)))" office:value-type="float" office:value="2" calcext:value-type="float">
            <text:p>2</text:p>
          </table:table-cell>
          <table:table-cell table:formula="of:=IF([.I12]=1;1;(IF(MOD([.I12];2)=0;[.I12]/2;3*[.I12]+1)))" office:value-type="float" office:value="1" calcext:value-type="float">
            <text:p>1</text:p>
          </table:table-cell>
          <table:table-cell table:formula="of:=IF([.J12]=1;1;(IF(MOD([.J12];2)=0;[.J12]/2;3*[.J12]+1)))" office:value-type="float" office:value="1" calcext:value-type="float">
            <text:p>1</text:p>
          </table:table-cell>
          <table:table-cell table:formula="of:=IF([.K12]=1;1;(IF(MOD([.K12];2)=0;[.K12]/2;3*[.K12]+1)))" office:value-type="float" office:value="1" calcext:value-type="float">
            <text:p>1</text:p>
          </table:table-cell>
          <table:table-cell table:formula="of:=IF([.L12]=1;1;(IF(MOD([.L12];2)=0;[.L12]/2;3*[.L12]+1)))" office:value-type="float" office:value="1" calcext:value-type="float">
            <text:p>1</text:p>
          </table:table-cell>
          <table:table-cell table:formula="of:=IF([.M12]=1;1;(IF(MOD([.M12];2)=0;[.M12]/2;3*[.M12]+1)))" office:value-type="float" office:value="1" calcext:value-type="float">
            <text:p>1</text:p>
          </table:table-cell>
          <table:table-cell table:formula="of:=IF([.N12]=1;1;(IF(MOD([.N12];2)=0;[.N12]/2;3*[.N12]+1)))" office:value-type="float" office:value="1" calcext:value-type="float">
            <text:p>1</text:p>
          </table:table-cell>
          <table:table-cell table:formula="of:=IF([.O12]=1;1;(IF(MOD([.O12];2)=0;[.O12]/2;3*[.O12]+1)))" office:value-type="float" office:value="1" calcext:value-type="float">
            <text:p>1</text:p>
          </table:table-cell>
          <table:table-cell table:formula="of:=IF([.P12]=1;1;(IF(MOD([.P12];2)=0;[.P12]/2;3*[.P12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3]=1;1;(IF(MOD([.A13];2)=0;[.A13]/2;3*[.A13]+1)))" office:value-type="float" office:value="7" calcext:value-type="float">
            <text:p>7</text:p>
          </table:table-cell>
          <table:table-cell table:formula="of:=IF([.B13]=1;1;(IF(MOD([.B13];2)=0;[.B13]/2;3*[.B13]+1)))" office:value-type="float" office:value="22" calcext:value-type="float">
            <text:p>22</text:p>
          </table:table-cell>
          <table:table-cell table:formula="of:=IF([.C13]=1;1;(IF(MOD([.C13];2)=0;[.C13]/2;3*[.C13]+1)))" office:value-type="float" office:value="11" calcext:value-type="float">
            <text:p>11</text:p>
          </table:table-cell>
          <table:table-cell table:formula="of:=IF([.D13]=1;1;(IF(MOD([.D13];2)=0;[.D13]/2;3*[.D13]+1)))" office:value-type="float" office:value="34" calcext:value-type="float">
            <text:p>34</text:p>
          </table:table-cell>
          <table:table-cell table:formula="of:=IF([.E13]=1;1;(IF(MOD([.E13];2)=0;[.E13]/2;3*[.E13]+1)))" office:value-type="float" office:value="17" calcext:value-type="float">
            <text:p>17</text:p>
          </table:table-cell>
          <table:table-cell table:formula="of:=IF([.F13]=1;1;(IF(MOD([.F13];2)=0;[.F13]/2;3*[.F13]+1)))" office:value-type="float" office:value="52" calcext:value-type="float">
            <text:p>52</text:p>
          </table:table-cell>
          <table:table-cell table:formula="of:=IF([.G13]=1;1;(IF(MOD([.G13];2)=0;[.G13]/2;3*[.G13]+1)))" office:value-type="float" office:value="26" calcext:value-type="float">
            <text:p>26</text:p>
          </table:table-cell>
          <table:table-cell table:formula="of:=IF([.H13]=1;1;(IF(MOD([.H13];2)=0;[.H13]/2;3*[.H13]+1)))" office:value-type="float" office:value="13" calcext:value-type="float">
            <text:p>13</text:p>
          </table:table-cell>
          <table:table-cell table:formula="of:=IF([.I13]=1;1;(IF(MOD([.I13];2)=0;[.I13]/2;3*[.I13]+1)))" office:value-type="float" office:value="40" calcext:value-type="float">
            <text:p>40</text:p>
          </table:table-cell>
          <table:table-cell table:formula="of:=IF([.J13]=1;1;(IF(MOD([.J13];2)=0;[.J13]/2;3*[.J13]+1)))" office:value-type="float" office:value="20" calcext:value-type="float">
            <text:p>20</text:p>
          </table:table-cell>
          <table:table-cell table:formula="of:=IF([.K13]=1;1;(IF(MOD([.K13];2)=0;[.K13]/2;3*[.K13]+1)))" office:value-type="float" office:value="10" calcext:value-type="float">
            <text:p>10</text:p>
          </table:table-cell>
          <table:table-cell table:formula="of:=IF([.L13]=1;1;(IF(MOD([.L13];2)=0;[.L13]/2;3*[.L13]+1)))" office:value-type="float" office:value="5" calcext:value-type="float">
            <text:p>5</text:p>
          </table:table-cell>
          <table:table-cell table:formula="of:=IF([.M13]=1;1;(IF(MOD([.M13];2)=0;[.M13]/2;3*[.M13]+1)))" office:value-type="float" office:value="16" calcext:value-type="float">
            <text:p>16</text:p>
          </table:table-cell>
          <table:table-cell table:formula="of:=IF([.N13]=1;1;(IF(MOD([.N13];2)=0;[.N13]/2;3*[.N13]+1)))" office:value-type="float" office:value="8" calcext:value-type="float">
            <text:p>8</text:p>
          </table:table-cell>
          <table:table-cell table:formula="of:=IF([.O13]=1;1;(IF(MOD([.O13];2)=0;[.O13]/2;3*[.O13]+1)))" office:value-type="float" office:value="4" calcext:value-type="float">
            <text:p>4</text:p>
          </table:table-cell>
          <table:table-cell table:formula="of:=IF([.P13]=1;1;(IF(MOD([.P13];2)=0;[.P13]/2;3*[.P13]+1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4]=1;1;(IF(MOD([.A14];2)=0;[.A14]/2;3*[.A14]+1)))" office:value-type="float" office:value="46" calcext:value-type="float">
            <text:p>46</text:p>
          </table:table-cell>
          <table:table-cell table:formula="of:=IF([.B14]=1;1;(IF(MOD([.B14];2)=0;[.B14]/2;3*[.B14]+1)))" office:value-type="float" office:value="23" calcext:value-type="float">
            <text:p>23</text:p>
          </table:table-cell>
          <table:table-cell table:formula="of:=IF([.C14]=1;1;(IF(MOD([.C14];2)=0;[.C14]/2;3*[.C14]+1)))" office:value-type="float" office:value="70" calcext:value-type="float">
            <text:p>70</text:p>
          </table:table-cell>
          <table:table-cell table:formula="of:=IF([.D14]=1;1;(IF(MOD([.D14];2)=0;[.D14]/2;3*[.D14]+1)))" office:value-type="float" office:value="35" calcext:value-type="float">
            <text:p>35</text:p>
          </table:table-cell>
          <table:table-cell table:formula="of:=IF([.E14]=1;1;(IF(MOD([.E14];2)=0;[.E14]/2;3*[.E14]+1)))" office:value-type="float" office:value="106" calcext:value-type="float">
            <text:p>106</text:p>
          </table:table-cell>
          <table:table-cell table:formula="of:=IF([.F14]=1;1;(IF(MOD([.F14];2)=0;[.F14]/2;3*[.F14]+1)))" office:value-type="float" office:value="53" calcext:value-type="float">
            <text:p>53</text:p>
          </table:table-cell>
          <table:table-cell table:formula="of:=IF([.G14]=1;1;(IF(MOD([.G14];2)=0;[.G14]/2;3*[.G14]+1)))" office:value-type="float" office:value="160" calcext:value-type="float">
            <text:p>160</text:p>
          </table:table-cell>
          <table:table-cell table:formula="of:=IF([.H14]=1;1;(IF(MOD([.H14];2)=0;[.H14]/2;3*[.H14]+1)))" office:value-type="float" office:value="80" calcext:value-type="float">
            <text:p>80</text:p>
          </table:table-cell>
          <table:table-cell table:formula="of:=IF([.I14]=1;1;(IF(MOD([.I14];2)=0;[.I14]/2;3*[.I14]+1)))" office:value-type="float" office:value="40" calcext:value-type="float">
            <text:p>40</text:p>
          </table:table-cell>
          <table:table-cell table:formula="of:=IF([.J14]=1;1;(IF(MOD([.J14];2)=0;[.J14]/2;3*[.J14]+1)))" office:value-type="float" office:value="20" calcext:value-type="float">
            <text:p>20</text:p>
          </table:table-cell>
          <table:table-cell table:formula="of:=IF([.K14]=1;1;(IF(MOD([.K14];2)=0;[.K14]/2;3*[.K14]+1)))" office:value-type="float" office:value="10" calcext:value-type="float">
            <text:p>10</text:p>
          </table:table-cell>
          <table:table-cell table:formula="of:=IF([.L14]=1;1;(IF(MOD([.L14];2)=0;[.L14]/2;3*[.L14]+1)))" office:value-type="float" office:value="5" calcext:value-type="float">
            <text:p>5</text:p>
          </table:table-cell>
          <table:table-cell table:formula="of:=IF([.M14]=1;1;(IF(MOD([.M14];2)=0;[.M14]/2;3*[.M14]+1)))" office:value-type="float" office:value="16" calcext:value-type="float">
            <text:p>16</text:p>
          </table:table-cell>
          <table:table-cell table:formula="of:=IF([.N14]=1;1;(IF(MOD([.N14];2)=0;[.N14]/2;3*[.N14]+1)))" office:value-type="float" office:value="8" calcext:value-type="float">
            <text:p>8</text:p>
          </table:table-cell>
          <table:table-cell table:formula="of:=IF([.O14]=1;1;(IF(MOD([.O14];2)=0;[.O14]/2;3*[.O14]+1)))" office:value-type="float" office:value="4" calcext:value-type="float">
            <text:p>4</text:p>
          </table:table-cell>
          <table:table-cell table:formula="of:=IF([.P14]=1;1;(IF(MOD([.P14];2)=0;[.P14]/2;3*[.P14]+1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5]=1;1;(IF(MOD([.A15];2)=0;[.A15]/2;3*[.A15]+1)))" office:value-type="float" office:value="8" calcext:value-type="float">
            <text:p>8</text:p>
          </table:table-cell>
          <table:table-cell table:formula="of:=IF([.B15]=1;1;(IF(MOD([.B15];2)=0;[.B15]/2;3*[.B15]+1)))" office:value-type="float" office:value="4" calcext:value-type="float">
            <text:p>4</text:p>
          </table:table-cell>
          <table:table-cell table:formula="of:=IF([.C15]=1;1;(IF(MOD([.C15];2)=0;[.C15]/2;3*[.C15]+1)))" office:value-type="float" office:value="2" calcext:value-type="float">
            <text:p>2</text:p>
          </table:table-cell>
          <table:table-cell table:formula="of:=IF([.D15]=1;1;(IF(MOD([.D15];2)=0;[.D15]/2;3*[.D15]+1)))" office:value-type="float" office:value="1" calcext:value-type="float">
            <text:p>1</text:p>
          </table:table-cell>
          <table:table-cell table:formula="of:=IF([.E15]=1;1;(IF(MOD([.E15];2)=0;[.E15]/2;3*[.E15]+1)))" office:value-type="float" office:value="1" calcext:value-type="float">
            <text:p>1</text:p>
          </table:table-cell>
          <table:table-cell table:formula="of:=IF([.F15]=1;1;(IF(MOD([.F15];2)=0;[.F15]/2;3*[.F15]+1)))" office:value-type="float" office:value="1" calcext:value-type="float">
            <text:p>1</text:p>
          </table:table-cell>
          <table:table-cell table:formula="of:=IF([.G15]=1;1;(IF(MOD([.G15];2)=0;[.G15]/2;3*[.G15]+1)))" office:value-type="float" office:value="1" calcext:value-type="float">
            <text:p>1</text:p>
          </table:table-cell>
          <table:table-cell table:formula="of:=IF([.H15]=1;1;(IF(MOD([.H15];2)=0;[.H15]/2;3*[.H15]+1)))" office:value-type="float" office:value="1" calcext:value-type="float">
            <text:p>1</text:p>
          </table:table-cell>
          <table:table-cell table:formula="of:=IF([.I15]=1;1;(IF(MOD([.I15];2)=0;[.I15]/2;3*[.I15]+1)))" office:value-type="float" office:value="1" calcext:value-type="float">
            <text:p>1</text:p>
          </table:table-cell>
          <table:table-cell table:formula="of:=IF([.J15]=1;1;(IF(MOD([.J15];2)=0;[.J15]/2;3*[.J15]+1)))" office:value-type="float" office:value="1" calcext:value-type="float">
            <text:p>1</text:p>
          </table:table-cell>
          <table:table-cell table:formula="of:=IF([.K15]=1;1;(IF(MOD([.K15];2)=0;[.K15]/2;3*[.K15]+1)))" office:value-type="float" office:value="1" calcext:value-type="float">
            <text:p>1</text:p>
          </table:table-cell>
          <table:table-cell table:formula="of:=IF([.L15]=1;1;(IF(MOD([.L15];2)=0;[.L15]/2;3*[.L15]+1)))" office:value-type="float" office:value="1" calcext:value-type="float">
            <text:p>1</text:p>
          </table:table-cell>
          <table:table-cell table:formula="of:=IF([.M15]=1;1;(IF(MOD([.M15];2)=0;[.M15]/2;3*[.M15]+1)))" office:value-type="float" office:value="1" calcext:value-type="float">
            <text:p>1</text:p>
          </table:table-cell>
          <table:table-cell table:formula="of:=IF([.N15]=1;1;(IF(MOD([.N15];2)=0;[.N15]/2;3*[.N15]+1)))" office:value-type="float" office:value="1" calcext:value-type="float">
            <text:p>1</text:p>
          </table:table-cell>
          <table:table-cell table:formula="of:=IF([.O15]=1;1;(IF(MOD([.O15];2)=0;[.O15]/2;3*[.O15]+1)))" office:value-type="float" office:value="1" calcext:value-type="float">
            <text:p>1</text:p>
          </table:table-cell>
          <table:table-cell table:formula="of:=IF([.P15]=1;1;(IF(MOD([.P15];2)=0;[.P15]/2;3*[.P15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6]=1;1;(IF(MOD([.A16];2)=0;[.A16]/2;3*[.A16]+1)))" office:value-type="float" office:value="52" calcext:value-type="float">
            <text:p>52</text:p>
          </table:table-cell>
          <table:table-cell table:formula="of:=IF([.B16]=1;1;(IF(MOD([.B16];2)=0;[.B16]/2;3*[.B16]+1)))" office:value-type="float" office:value="26" calcext:value-type="float">
            <text:p>26</text:p>
          </table:table-cell>
          <table:table-cell table:formula="of:=IF([.C16]=1;1;(IF(MOD([.C16];2)=0;[.C16]/2;3*[.C16]+1)))" office:value-type="float" office:value="13" calcext:value-type="float">
            <text:p>13</text:p>
          </table:table-cell>
          <table:table-cell table:formula="of:=IF([.D16]=1;1;(IF(MOD([.D16];2)=0;[.D16]/2;3*[.D16]+1)))" office:value-type="float" office:value="40" calcext:value-type="float">
            <text:p>40</text:p>
          </table:table-cell>
          <table:table-cell table:formula="of:=IF([.E16]=1;1;(IF(MOD([.E16];2)=0;[.E16]/2;3*[.E16]+1)))" office:value-type="float" office:value="20" calcext:value-type="float">
            <text:p>20</text:p>
          </table:table-cell>
          <table:table-cell table:formula="of:=IF([.F16]=1;1;(IF(MOD([.F16];2)=0;[.F16]/2;3*[.F16]+1)))" office:value-type="float" office:value="10" calcext:value-type="float">
            <text:p>10</text:p>
          </table:table-cell>
          <table:table-cell table:formula="of:=IF([.G16]=1;1;(IF(MOD([.G16];2)=0;[.G16]/2;3*[.G16]+1)))" office:value-type="float" office:value="5" calcext:value-type="float">
            <text:p>5</text:p>
          </table:table-cell>
          <table:table-cell table:formula="of:=IF([.H16]=1;1;(IF(MOD([.H16];2)=0;[.H16]/2;3*[.H16]+1)))" office:value-type="float" office:value="16" calcext:value-type="float">
            <text:p>16</text:p>
          </table:table-cell>
          <table:table-cell table:formula="of:=IF([.I16]=1;1;(IF(MOD([.I16];2)=0;[.I16]/2;3*[.I16]+1)))" office:value-type="float" office:value="8" calcext:value-type="float">
            <text:p>8</text:p>
          </table:table-cell>
          <table:table-cell table:formula="of:=IF([.J16]=1;1;(IF(MOD([.J16];2)=0;[.J16]/2;3*[.J16]+1)))" office:value-type="float" office:value="4" calcext:value-type="float">
            <text:p>4</text:p>
          </table:table-cell>
          <table:table-cell table:formula="of:=IF([.K16]=1;1;(IF(MOD([.K16];2)=0;[.K16]/2;3*[.K16]+1)))" office:value-type="float" office:value="2" calcext:value-type="float">
            <text:p>2</text:p>
          </table:table-cell>
          <table:table-cell table:formula="of:=IF([.L16]=1;1;(IF(MOD([.L16];2)=0;[.L16]/2;3*[.L16]+1)))" office:value-type="float" office:value="1" calcext:value-type="float">
            <text:p>1</text:p>
          </table:table-cell>
          <table:table-cell table:formula="of:=IF([.M16]=1;1;(IF(MOD([.M16];2)=0;[.M16]/2;3*[.M16]+1)))" office:value-type="float" office:value="1" calcext:value-type="float">
            <text:p>1</text:p>
          </table:table-cell>
          <table:table-cell table:formula="of:=IF([.N16]=1;1;(IF(MOD([.N16];2)=0;[.N16]/2;3*[.N16]+1)))" office:value-type="float" office:value="1" calcext:value-type="float">
            <text:p>1</text:p>
          </table:table-cell>
          <table:table-cell table:formula="of:=IF([.O16]=1;1;(IF(MOD([.O16];2)=0;[.O16]/2;3*[.O16]+1)))" office:value-type="float" office:value="1" calcext:value-type="float">
            <text:p>1</text:p>
          </table:table-cell>
          <table:table-cell table:formula="of:=IF([.P16]=1;1;(IF(MOD([.P16];2)=0;[.P16]/2;3*[.P16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7]=1;1;(IF(MOD([.A17];2)=0;[.A17]/2;3*[.A17]+1)))" office:value-type="float" office:value="9" calcext:value-type="float">
            <text:p>9</text:p>
          </table:table-cell>
          <table:table-cell table:formula="of:=IF([.B17]=1;1;(IF(MOD([.B17];2)=0;[.B17]/2;3*[.B17]+1)))" office:value-type="float" office:value="28" calcext:value-type="float">
            <text:p>28</text:p>
          </table:table-cell>
          <table:table-cell table:formula="of:=IF([.C17]=1;1;(IF(MOD([.C17];2)=0;[.C17]/2;3*[.C17]+1)))" office:value-type="float" office:value="14" calcext:value-type="float">
            <text:p>14</text:p>
          </table:table-cell>
          <table:table-cell table:formula="of:=IF([.D17]=1;1;(IF(MOD([.D17];2)=0;[.D17]/2;3*[.D17]+1)))" office:value-type="float" office:value="7" calcext:value-type="float">
            <text:p>7</text:p>
          </table:table-cell>
          <table:table-cell table:formula="of:=IF([.E17]=1;1;(IF(MOD([.E17];2)=0;[.E17]/2;3*[.E17]+1)))" office:value-type="float" office:value="22" calcext:value-type="float">
            <text:p>22</text:p>
          </table:table-cell>
          <table:table-cell table:formula="of:=IF([.F17]=1;1;(IF(MOD([.F17];2)=0;[.F17]/2;3*[.F17]+1)))" office:value-type="float" office:value="11" calcext:value-type="float">
            <text:p>11</text:p>
          </table:table-cell>
          <table:table-cell table:formula="of:=IF([.G17]=1;1;(IF(MOD([.G17];2)=0;[.G17]/2;3*[.G17]+1)))" office:value-type="float" office:value="34" calcext:value-type="float">
            <text:p>34</text:p>
          </table:table-cell>
          <table:table-cell table:formula="of:=IF([.H17]=1;1;(IF(MOD([.H17];2)=0;[.H17]/2;3*[.H17]+1)))" office:value-type="float" office:value="17" calcext:value-type="float">
            <text:p>17</text:p>
          </table:table-cell>
          <table:table-cell table:formula="of:=IF([.I17]=1;1;(IF(MOD([.I17];2)=0;[.I17]/2;3*[.I17]+1)))" office:value-type="float" office:value="52" calcext:value-type="float">
            <text:p>52</text:p>
          </table:table-cell>
          <table:table-cell table:formula="of:=IF([.J17]=1;1;(IF(MOD([.J17];2)=0;[.J17]/2;3*[.J17]+1)))" office:value-type="float" office:value="26" calcext:value-type="float">
            <text:p>26</text:p>
          </table:table-cell>
          <table:table-cell table:formula="of:=IF([.K17]=1;1;(IF(MOD([.K17];2)=0;[.K17]/2;3*[.K17]+1)))" office:value-type="float" office:value="13" calcext:value-type="float">
            <text:p>13</text:p>
          </table:table-cell>
          <table:table-cell table:formula="of:=IF([.L17]=1;1;(IF(MOD([.L17];2)=0;[.L17]/2;3*[.L17]+1)))" office:value-type="float" office:value="40" calcext:value-type="float">
            <text:p>40</text:p>
          </table:table-cell>
          <table:table-cell table:formula="of:=IF([.M17]=1;1;(IF(MOD([.M17];2)=0;[.M17]/2;3*[.M17]+1)))" office:value-type="float" office:value="20" calcext:value-type="float">
            <text:p>20</text:p>
          </table:table-cell>
          <table:table-cell table:formula="of:=IF([.N17]=1;1;(IF(MOD([.N17];2)=0;[.N17]/2;3*[.N17]+1)))" office:value-type="float" office:value="10" calcext:value-type="float">
            <text:p>10</text:p>
          </table:table-cell>
          <table:table-cell table:formula="of:=IF([.O17]=1;1;(IF(MOD([.O17];2)=0;[.O17]/2;3*[.O17]+1)))" office:value-type="float" office:value="5" calcext:value-type="float">
            <text:p>5</text:p>
          </table:table-cell>
          <table:table-cell table:formula="of:=IF([.P17]=1;1;(IF(MOD([.P17];2)=0;[.P17]/2;3*[.P17]+1)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18]=1;1;(IF(MOD([.A18];2)=0;[.A18]/2;3*[.A18]+1)))" office:value-type="float" office:value="58" calcext:value-type="float">
            <text:p>58</text:p>
          </table:table-cell>
          <table:table-cell table:formula="of:=IF([.B18]=1;1;(IF(MOD([.B18];2)=0;[.B18]/2;3*[.B18]+1)))" office:value-type="float" office:value="29" calcext:value-type="float">
            <text:p>29</text:p>
          </table:table-cell>
          <table:table-cell table:formula="of:=IF([.C18]=1;1;(IF(MOD([.C18];2)=0;[.C18]/2;3*[.C18]+1)))" office:value-type="float" office:value="88" calcext:value-type="float">
            <text:p>88</text:p>
          </table:table-cell>
          <table:table-cell table:formula="of:=IF([.D18]=1;1;(IF(MOD([.D18];2)=0;[.D18]/2;3*[.D18]+1)))" office:value-type="float" office:value="44" calcext:value-type="float">
            <text:p>44</text:p>
          </table:table-cell>
          <table:table-cell table:formula="of:=IF([.E18]=1;1;(IF(MOD([.E18];2)=0;[.E18]/2;3*[.E18]+1)))" office:value-type="float" office:value="22" calcext:value-type="float">
            <text:p>22</text:p>
          </table:table-cell>
          <table:table-cell table:formula="of:=IF([.F18]=1;1;(IF(MOD([.F18];2)=0;[.F18]/2;3*[.F18]+1)))" office:value-type="float" office:value="11" calcext:value-type="float">
            <text:p>11</text:p>
          </table:table-cell>
          <table:table-cell table:formula="of:=IF([.G18]=1;1;(IF(MOD([.G18];2)=0;[.G18]/2;3*[.G18]+1)))" office:value-type="float" office:value="34" calcext:value-type="float">
            <text:p>34</text:p>
          </table:table-cell>
          <table:table-cell table:formula="of:=IF([.H18]=1;1;(IF(MOD([.H18];2)=0;[.H18]/2;3*[.H18]+1)))" office:value-type="float" office:value="17" calcext:value-type="float">
            <text:p>17</text:p>
          </table:table-cell>
          <table:table-cell table:formula="of:=IF([.I18]=1;1;(IF(MOD([.I18];2)=0;[.I18]/2;3*[.I18]+1)))" office:value-type="float" office:value="52" calcext:value-type="float">
            <text:p>52</text:p>
          </table:table-cell>
          <table:table-cell table:formula="of:=IF([.J18]=1;1;(IF(MOD([.J18];2)=0;[.J18]/2;3*[.J18]+1)))" office:value-type="float" office:value="26" calcext:value-type="float">
            <text:p>26</text:p>
          </table:table-cell>
          <table:table-cell table:formula="of:=IF([.K18]=1;1;(IF(MOD([.K18];2)=0;[.K18]/2;3*[.K18]+1)))" office:value-type="float" office:value="13" calcext:value-type="float">
            <text:p>13</text:p>
          </table:table-cell>
          <table:table-cell table:formula="of:=IF([.L18]=1;1;(IF(MOD([.L18];2)=0;[.L18]/2;3*[.L18]+1)))" office:value-type="float" office:value="40" calcext:value-type="float">
            <text:p>40</text:p>
          </table:table-cell>
          <table:table-cell table:formula="of:=IF([.M18]=1;1;(IF(MOD([.M18];2)=0;[.M18]/2;3*[.M18]+1)))" office:value-type="float" office:value="20" calcext:value-type="float">
            <text:p>20</text:p>
          </table:table-cell>
          <table:table-cell table:formula="of:=IF([.N18]=1;1;(IF(MOD([.N18];2)=0;[.N18]/2;3*[.N18]+1)))" office:value-type="float" office:value="10" calcext:value-type="float">
            <text:p>10</text:p>
          </table:table-cell>
          <table:table-cell table:formula="of:=IF([.O18]=1;1;(IF(MOD([.O18];2)=0;[.O18]/2;3*[.O18]+1)))" office:value-type="float" office:value="5" calcext:value-type="float">
            <text:p>5</text:p>
          </table:table-cell>
          <table:table-cell table:formula="of:=IF([.P18]=1;1;(IF(MOD([.P18];2)=0;[.P18]/2;3*[.P18]+1)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19]=1;1;(IF(MOD([.A19];2)=0;[.A19]/2;3*[.A19]+1)))" office:value-type="float" office:value="10" calcext:value-type="float">
            <text:p>10</text:p>
          </table:table-cell>
          <table:table-cell table:formula="of:=IF([.B19]=1;1;(IF(MOD([.B19];2)=0;[.B19]/2;3*[.B19]+1)))" office:value-type="float" office:value="5" calcext:value-type="float">
            <text:p>5</text:p>
          </table:table-cell>
          <table:table-cell table:formula="of:=IF([.C19]=1;1;(IF(MOD([.C19];2)=0;[.C19]/2;3*[.C19]+1)))" office:value-type="float" office:value="16" calcext:value-type="float">
            <text:p>16</text:p>
          </table:table-cell>
          <table:table-cell table:formula="of:=IF([.D19]=1;1;(IF(MOD([.D19];2)=0;[.D19]/2;3*[.D19]+1)))" office:value-type="float" office:value="8" calcext:value-type="float">
            <text:p>8</text:p>
          </table:table-cell>
          <table:table-cell table:formula="of:=IF([.E19]=1;1;(IF(MOD([.E19];2)=0;[.E19]/2;3*[.E19]+1)))" office:value-type="float" office:value="4" calcext:value-type="float">
            <text:p>4</text:p>
          </table:table-cell>
          <table:table-cell table:formula="of:=IF([.F19]=1;1;(IF(MOD([.F19];2)=0;[.F19]/2;3*[.F19]+1)))" office:value-type="float" office:value="2" calcext:value-type="float">
            <text:p>2</text:p>
          </table:table-cell>
          <table:table-cell table:formula="of:=IF([.G19]=1;1;(IF(MOD([.G19];2)=0;[.G19]/2;3*[.G19]+1)))" office:value-type="float" office:value="1" calcext:value-type="float">
            <text:p>1</text:p>
          </table:table-cell>
          <table:table-cell table:formula="of:=IF([.H19]=1;1;(IF(MOD([.H19];2)=0;[.H19]/2;3*[.H19]+1)))" office:value-type="float" office:value="1" calcext:value-type="float">
            <text:p>1</text:p>
          </table:table-cell>
          <table:table-cell table:formula="of:=IF([.I19]=1;1;(IF(MOD([.I19];2)=0;[.I19]/2;3*[.I19]+1)))" office:value-type="float" office:value="1" calcext:value-type="float">
            <text:p>1</text:p>
          </table:table-cell>
          <table:table-cell table:formula="of:=IF([.J19]=1;1;(IF(MOD([.J19];2)=0;[.J19]/2;3*[.J19]+1)))" office:value-type="float" office:value="1" calcext:value-type="float">
            <text:p>1</text:p>
          </table:table-cell>
          <table:table-cell table:formula="of:=IF([.K19]=1;1;(IF(MOD([.K19];2)=0;[.K19]/2;3*[.K19]+1)))" office:value-type="float" office:value="1" calcext:value-type="float">
            <text:p>1</text:p>
          </table:table-cell>
          <table:table-cell table:formula="of:=IF([.L19]=1;1;(IF(MOD([.L19];2)=0;[.L19]/2;3*[.L19]+1)))" office:value-type="float" office:value="1" calcext:value-type="float">
            <text:p>1</text:p>
          </table:table-cell>
          <table:table-cell table:formula="of:=IF([.M19]=1;1;(IF(MOD([.M19];2)=0;[.M19]/2;3*[.M19]+1)))" office:value-type="float" office:value="1" calcext:value-type="float">
            <text:p>1</text:p>
          </table:table-cell>
          <table:table-cell table:formula="of:=IF([.N19]=1;1;(IF(MOD([.N19];2)=0;[.N19]/2;3*[.N19]+1)))" office:value-type="float" office:value="1" calcext:value-type="float">
            <text:p>1</text:p>
          </table:table-cell>
          <table:table-cell table:formula="of:=IF([.O19]=1;1;(IF(MOD([.O19];2)=0;[.O19]/2;3*[.O19]+1)))" office:value-type="float" office:value="1" calcext:value-type="float">
            <text:p>1</text:p>
          </table:table-cell>
          <table:table-cell table:formula="of:=IF([.P19]=1;1;(IF(MOD([.P19];2)=0;[.P19]/2;3*[.P19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0]=1;1;(IF(MOD([.A20];2)=0;[.A20]/2;3*[.A20]+1)))" office:value-type="float" office:value="64" calcext:value-type="float">
            <text:p>64</text:p>
          </table:table-cell>
          <table:table-cell table:formula="of:=IF([.B20]=1;1;(IF(MOD([.B20];2)=0;[.B20]/2;3*[.B20]+1)))" office:value-type="float" office:value="32" calcext:value-type="float">
            <text:p>32</text:p>
          </table:table-cell>
          <table:table-cell table:formula="of:=IF([.C20]=1;1;(IF(MOD([.C20];2)=0;[.C20]/2;3*[.C20]+1)))" office:value-type="float" office:value="16" calcext:value-type="float">
            <text:p>16</text:p>
          </table:table-cell>
          <table:table-cell table:formula="of:=IF([.D20]=1;1;(IF(MOD([.D20];2)=0;[.D20]/2;3*[.D20]+1)))" office:value-type="float" office:value="8" calcext:value-type="float">
            <text:p>8</text:p>
          </table:table-cell>
          <table:table-cell table:formula="of:=IF([.E20]=1;1;(IF(MOD([.E20];2)=0;[.E20]/2;3*[.E20]+1)))" office:value-type="float" office:value="4" calcext:value-type="float">
            <text:p>4</text:p>
          </table:table-cell>
          <table:table-cell table:formula="of:=IF([.F20]=1;1;(IF(MOD([.F20];2)=0;[.F20]/2;3*[.F20]+1)))" office:value-type="float" office:value="2" calcext:value-type="float">
            <text:p>2</text:p>
          </table:table-cell>
          <table:table-cell table:formula="of:=IF([.G20]=1;1;(IF(MOD([.G20];2)=0;[.G20]/2;3*[.G20]+1)))" office:value-type="float" office:value="1" calcext:value-type="float">
            <text:p>1</text:p>
          </table:table-cell>
          <table:table-cell table:formula="of:=IF([.H20]=1;1;(IF(MOD([.H20];2)=0;[.H20]/2;3*[.H20]+1)))" office:value-type="float" office:value="1" calcext:value-type="float">
            <text:p>1</text:p>
          </table:table-cell>
          <table:table-cell table:formula="of:=IF([.I20]=1;1;(IF(MOD([.I20];2)=0;[.I20]/2;3*[.I20]+1)))" office:value-type="float" office:value="1" calcext:value-type="float">
            <text:p>1</text:p>
          </table:table-cell>
          <table:table-cell table:formula="of:=IF([.J20]=1;1;(IF(MOD([.J20];2)=0;[.J20]/2;3*[.J20]+1)))" office:value-type="float" office:value="1" calcext:value-type="float">
            <text:p>1</text:p>
          </table:table-cell>
          <table:table-cell table:formula="of:=IF([.K20]=1;1;(IF(MOD([.K20];2)=0;[.K20]/2;3*[.K20]+1)))" office:value-type="float" office:value="1" calcext:value-type="float">
            <text:p>1</text:p>
          </table:table-cell>
          <table:table-cell table:formula="of:=IF([.L20]=1;1;(IF(MOD([.L20];2)=0;[.L20]/2;3*[.L20]+1)))" office:value-type="float" office:value="1" calcext:value-type="float">
            <text:p>1</text:p>
          </table:table-cell>
          <table:table-cell table:formula="of:=IF([.M20]=1;1;(IF(MOD([.M20];2)=0;[.M20]/2;3*[.M20]+1)))" office:value-type="float" office:value="1" calcext:value-type="float">
            <text:p>1</text:p>
          </table:table-cell>
          <table:table-cell table:formula="of:=IF([.N20]=1;1;(IF(MOD([.N20];2)=0;[.N20]/2;3*[.N20]+1)))" office:value-type="float" office:value="1" calcext:value-type="float">
            <text:p>1</text:p>
          </table:table-cell>
          <table:table-cell table:formula="of:=IF([.O20]=1;1;(IF(MOD([.O20];2)=0;[.O20]/2;3*[.O20]+1)))" office:value-type="float" office:value="1" calcext:value-type="float">
            <text:p>1</text:p>
          </table:table-cell>
          <table:table-cell table:formula="of:=IF([.P20]=1;1;(IF(MOD([.P20];2)=0;[.P20]/2;3*[.P20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1]=1;1;(IF(MOD([.A21];2)=0;[.A21]/2;3*[.A21]+1)))" office:value-type="float" office:value="11" calcext:value-type="float">
            <text:p>11</text:p>
          </table:table-cell>
          <table:table-cell table:formula="of:=IF([.B21]=1;1;(IF(MOD([.B21];2)=0;[.B21]/2;3*[.B21]+1)))" office:value-type="float" office:value="34" calcext:value-type="float">
            <text:p>34</text:p>
          </table:table-cell>
          <table:table-cell table:formula="of:=IF([.C21]=1;1;(IF(MOD([.C21];2)=0;[.C21]/2;3*[.C21]+1)))" office:value-type="float" office:value="17" calcext:value-type="float">
            <text:p>17</text:p>
          </table:table-cell>
          <table:table-cell table:formula="of:=IF([.D21]=1;1;(IF(MOD([.D21];2)=0;[.D21]/2;3*[.D21]+1)))" office:value-type="float" office:value="52" calcext:value-type="float">
            <text:p>52</text:p>
          </table:table-cell>
          <table:table-cell table:formula="of:=IF([.E21]=1;1;(IF(MOD([.E21];2)=0;[.E21]/2;3*[.E21]+1)))" office:value-type="float" office:value="26" calcext:value-type="float">
            <text:p>26</text:p>
          </table:table-cell>
          <table:table-cell table:formula="of:=IF([.F21]=1;1;(IF(MOD([.F21];2)=0;[.F21]/2;3*[.F21]+1)))" office:value-type="float" office:value="13" calcext:value-type="float">
            <text:p>13</text:p>
          </table:table-cell>
          <table:table-cell table:formula="of:=IF([.G21]=1;1;(IF(MOD([.G21];2)=0;[.G21]/2;3*[.G21]+1)))" office:value-type="float" office:value="40" calcext:value-type="float">
            <text:p>40</text:p>
          </table:table-cell>
          <table:table-cell table:formula="of:=IF([.H21]=1;1;(IF(MOD([.H21];2)=0;[.H21]/2;3*[.H21]+1)))" office:value-type="float" office:value="20" calcext:value-type="float">
            <text:p>20</text:p>
          </table:table-cell>
          <table:table-cell table:formula="of:=IF([.I21]=1;1;(IF(MOD([.I21];2)=0;[.I21]/2;3*[.I21]+1)))" office:value-type="float" office:value="10" calcext:value-type="float">
            <text:p>10</text:p>
          </table:table-cell>
          <table:table-cell table:formula="of:=IF([.J21]=1;1;(IF(MOD([.J21];2)=0;[.J21]/2;3*[.J21]+1)))" office:value-type="float" office:value="5" calcext:value-type="float">
            <text:p>5</text:p>
          </table:table-cell>
          <table:table-cell table:formula="of:=IF([.K21]=1;1;(IF(MOD([.K21];2)=0;[.K21]/2;3*[.K21]+1)))" office:value-type="float" office:value="16" calcext:value-type="float">
            <text:p>16</text:p>
          </table:table-cell>
          <table:table-cell table:formula="of:=IF([.L21]=1;1;(IF(MOD([.L21];2)=0;[.L21]/2;3*[.L21]+1)))" office:value-type="float" office:value="8" calcext:value-type="float">
            <text:p>8</text:p>
          </table:table-cell>
          <table:table-cell table:formula="of:=IF([.M21]=1;1;(IF(MOD([.M21];2)=0;[.M21]/2;3*[.M21]+1)))" office:value-type="float" office:value="4" calcext:value-type="float">
            <text:p>4</text:p>
          </table:table-cell>
          <table:table-cell table:formula="of:=IF([.N21]=1;1;(IF(MOD([.N21];2)=0;[.N21]/2;3*[.N21]+1)))" office:value-type="float" office:value="2" calcext:value-type="float">
            <text:p>2</text:p>
          </table:table-cell>
          <table:table-cell table:formula="of:=IF([.O21]=1;1;(IF(MOD([.O21];2)=0;[.O21]/2;3*[.O21]+1)))" office:value-type="float" office:value="1" calcext:value-type="float">
            <text:p>1</text:p>
          </table:table-cell>
          <table:table-cell table:formula="of:=IF([.P21]=1;1;(IF(MOD([.P21];2)=0;[.P21]/2;3*[.P2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2]=1;1;(IF(MOD([.A22];2)=0;[.A22]/2;3*[.A22]+1)))" office:value-type="float" office:value="70" calcext:value-type="float">
            <text:p>70</text:p>
          </table:table-cell>
          <table:table-cell table:formula="of:=IF([.B22]=1;1;(IF(MOD([.B22];2)=0;[.B22]/2;3*[.B22]+1)))" office:value-type="float" office:value="35" calcext:value-type="float">
            <text:p>35</text:p>
          </table:table-cell>
          <table:table-cell table:formula="of:=IF([.C22]=1;1;(IF(MOD([.C22];2)=0;[.C22]/2;3*[.C22]+1)))" office:value-type="float" office:value="106" calcext:value-type="float">
            <text:p>106</text:p>
          </table:table-cell>
          <table:table-cell table:formula="of:=IF([.D22]=1;1;(IF(MOD([.D22];2)=0;[.D22]/2;3*[.D22]+1)))" office:value-type="float" office:value="53" calcext:value-type="float">
            <text:p>53</text:p>
          </table:table-cell>
          <table:table-cell table:formula="of:=IF([.E22]=1;1;(IF(MOD([.E22];2)=0;[.E22]/2;3*[.E22]+1)))" office:value-type="float" office:value="160" calcext:value-type="float">
            <text:p>160</text:p>
          </table:table-cell>
          <table:table-cell table:formula="of:=IF([.F22]=1;1;(IF(MOD([.F22];2)=0;[.F22]/2;3*[.F22]+1)))" office:value-type="float" office:value="80" calcext:value-type="float">
            <text:p>80</text:p>
          </table:table-cell>
          <table:table-cell table:formula="of:=IF([.G22]=1;1;(IF(MOD([.G22];2)=0;[.G22]/2;3*[.G22]+1)))" office:value-type="float" office:value="40" calcext:value-type="float">
            <text:p>40</text:p>
          </table:table-cell>
          <table:table-cell table:formula="of:=IF([.H22]=1;1;(IF(MOD([.H22];2)=0;[.H22]/2;3*[.H22]+1)))" office:value-type="float" office:value="20" calcext:value-type="float">
            <text:p>20</text:p>
          </table:table-cell>
          <table:table-cell table:formula="of:=IF([.I22]=1;1;(IF(MOD([.I22];2)=0;[.I22]/2;3*[.I22]+1)))" office:value-type="float" office:value="10" calcext:value-type="float">
            <text:p>10</text:p>
          </table:table-cell>
          <table:table-cell table:formula="of:=IF([.J22]=1;1;(IF(MOD([.J22];2)=0;[.J22]/2;3*[.J22]+1)))" office:value-type="float" office:value="5" calcext:value-type="float">
            <text:p>5</text:p>
          </table:table-cell>
          <table:table-cell table:formula="of:=IF([.K22]=1;1;(IF(MOD([.K22];2)=0;[.K22]/2;3*[.K22]+1)))" office:value-type="float" office:value="16" calcext:value-type="float">
            <text:p>16</text:p>
          </table:table-cell>
          <table:table-cell table:formula="of:=IF([.L22]=1;1;(IF(MOD([.L22];2)=0;[.L22]/2;3*[.L22]+1)))" office:value-type="float" office:value="8" calcext:value-type="float">
            <text:p>8</text:p>
          </table:table-cell>
          <table:table-cell table:formula="of:=IF([.M22]=1;1;(IF(MOD([.M22];2)=0;[.M22]/2;3*[.M22]+1)))" office:value-type="float" office:value="4" calcext:value-type="float">
            <text:p>4</text:p>
          </table:table-cell>
          <table:table-cell table:formula="of:=IF([.N22]=1;1;(IF(MOD([.N22];2)=0;[.N22]/2;3*[.N22]+1)))" office:value-type="float" office:value="2" calcext:value-type="float">
            <text:p>2</text:p>
          </table:table-cell>
          <table:table-cell table:formula="of:=IF([.O22]=1;1;(IF(MOD([.O22];2)=0;[.O22]/2;3*[.O22]+1)))" office:value-type="float" office:value="1" calcext:value-type="float">
            <text:p>1</text:p>
          </table:table-cell>
          <table:table-cell table:formula="of:=IF([.P22]=1;1;(IF(MOD([.P22];2)=0;[.P22]/2;3*[.P22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3]=1;1;(IF(MOD([.A23];2)=0;[.A23]/2;3*[.A23]+1)))" office:value-type="float" office:value="12" calcext:value-type="float">
            <text:p>12</text:p>
          </table:table-cell>
          <table:table-cell table:formula="of:=IF([.B23]=1;1;(IF(MOD([.B23];2)=0;[.B23]/2;3*[.B23]+1)))" office:value-type="float" office:value="6" calcext:value-type="float">
            <text:p>6</text:p>
          </table:table-cell>
          <table:table-cell table:formula="of:=IF([.C23]=1;1;(IF(MOD([.C23];2)=0;[.C23]/2;3*[.C23]+1)))" office:value-type="float" office:value="3" calcext:value-type="float">
            <text:p>3</text:p>
          </table:table-cell>
          <table:table-cell table:formula="of:=IF([.D23]=1;1;(IF(MOD([.D23];2)=0;[.D23]/2;3*[.D23]+1)))" office:value-type="float" office:value="10" calcext:value-type="float">
            <text:p>10</text:p>
          </table:table-cell>
          <table:table-cell table:formula="of:=IF([.E23]=1;1;(IF(MOD([.E23];2)=0;[.E23]/2;3*[.E23]+1)))" office:value-type="float" office:value="5" calcext:value-type="float">
            <text:p>5</text:p>
          </table:table-cell>
          <table:table-cell table:formula="of:=IF([.F23]=1;1;(IF(MOD([.F23];2)=0;[.F23]/2;3*[.F23]+1)))" office:value-type="float" office:value="16" calcext:value-type="float">
            <text:p>16</text:p>
          </table:table-cell>
          <table:table-cell table:formula="of:=IF([.G23]=1;1;(IF(MOD([.G23];2)=0;[.G23]/2;3*[.G23]+1)))" office:value-type="float" office:value="8" calcext:value-type="float">
            <text:p>8</text:p>
          </table:table-cell>
          <table:table-cell table:formula="of:=IF([.H23]=1;1;(IF(MOD([.H23];2)=0;[.H23]/2;3*[.H23]+1)))" office:value-type="float" office:value="4" calcext:value-type="float">
            <text:p>4</text:p>
          </table:table-cell>
          <table:table-cell table:formula="of:=IF([.I23]=1;1;(IF(MOD([.I23];2)=0;[.I23]/2;3*[.I23]+1)))" office:value-type="float" office:value="2" calcext:value-type="float">
            <text:p>2</text:p>
          </table:table-cell>
          <table:table-cell table:formula="of:=IF([.J23]=1;1;(IF(MOD([.J23];2)=0;[.J23]/2;3*[.J23]+1)))" office:value-type="float" office:value="1" calcext:value-type="float">
            <text:p>1</text:p>
          </table:table-cell>
          <table:table-cell table:formula="of:=IF([.K23]=1;1;(IF(MOD([.K23];2)=0;[.K23]/2;3*[.K23]+1)))" office:value-type="float" office:value="1" calcext:value-type="float">
            <text:p>1</text:p>
          </table:table-cell>
          <table:table-cell table:formula="of:=IF([.L23]=1;1;(IF(MOD([.L23];2)=0;[.L23]/2;3*[.L23]+1)))" office:value-type="float" office:value="1" calcext:value-type="float">
            <text:p>1</text:p>
          </table:table-cell>
          <table:table-cell table:formula="of:=IF([.M23]=1;1;(IF(MOD([.M23];2)=0;[.M23]/2;3*[.M23]+1)))" office:value-type="float" office:value="1" calcext:value-type="float">
            <text:p>1</text:p>
          </table:table-cell>
          <table:table-cell table:formula="of:=IF([.N23]=1;1;(IF(MOD([.N23];2)=0;[.N23]/2;3*[.N23]+1)))" office:value-type="float" office:value="1" calcext:value-type="float">
            <text:p>1</text:p>
          </table:table-cell>
          <table:table-cell table:formula="of:=IF([.O23]=1;1;(IF(MOD([.O23];2)=0;[.O23]/2;3*[.O23]+1)))" office:value-type="float" office:value="1" calcext:value-type="float">
            <text:p>1</text:p>
          </table:table-cell>
          <table:table-cell table:formula="of:=IF([.P23]=1;1;(IF(MOD([.P23];2)=0;[.P23]/2;3*[.P23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24]=1;1;(IF(MOD([.A24];2)=0;[.A24]/2;3*[.A24]+1)))" office:value-type="float" office:value="76" calcext:value-type="float">
            <text:p>76</text:p>
          </table:table-cell>
          <table:table-cell table:formula="of:=IF([.B24]=1;1;(IF(MOD([.B24];2)=0;[.B24]/2;3*[.B24]+1)))" office:value-type="float" office:value="38" calcext:value-type="float">
            <text:p>38</text:p>
          </table:table-cell>
          <table:table-cell table:formula="of:=IF([.C24]=1;1;(IF(MOD([.C24];2)=0;[.C24]/2;3*[.C24]+1)))" office:value-type="float" office:value="19" calcext:value-type="float">
            <text:p>19</text:p>
          </table:table-cell>
          <table:table-cell table:formula="of:=IF([.D24]=1;1;(IF(MOD([.D24];2)=0;[.D24]/2;3*[.D24]+1)))" office:value-type="float" office:value="58" calcext:value-type="float">
            <text:p>58</text:p>
          </table:table-cell>
          <table:table-cell table:formula="of:=IF([.E24]=1;1;(IF(MOD([.E24];2)=0;[.E24]/2;3*[.E24]+1)))" office:value-type="float" office:value="29" calcext:value-type="float">
            <text:p>29</text:p>
          </table:table-cell>
          <table:table-cell table:formula="of:=IF([.F24]=1;1;(IF(MOD([.F24];2)=0;[.F24]/2;3*[.F24]+1)))" office:value-type="float" office:value="88" calcext:value-type="float">
            <text:p>88</text:p>
          </table:table-cell>
          <table:table-cell table:formula="of:=IF([.G24]=1;1;(IF(MOD([.G24];2)=0;[.G24]/2;3*[.G24]+1)))" office:value-type="float" office:value="44" calcext:value-type="float">
            <text:p>44</text:p>
          </table:table-cell>
          <table:table-cell table:formula="of:=IF([.H24]=1;1;(IF(MOD([.H24];2)=0;[.H24]/2;3*[.H24]+1)))" office:value-type="float" office:value="22" calcext:value-type="float">
            <text:p>22</text:p>
          </table:table-cell>
          <table:table-cell table:formula="of:=IF([.I24]=1;1;(IF(MOD([.I24];2)=0;[.I24]/2;3*[.I24]+1)))" office:value-type="float" office:value="11" calcext:value-type="float">
            <text:p>11</text:p>
          </table:table-cell>
          <table:table-cell table:formula="of:=IF([.J24]=1;1;(IF(MOD([.J24];2)=0;[.J24]/2;3*[.J24]+1)))" office:value-type="float" office:value="34" calcext:value-type="float">
            <text:p>34</text:p>
          </table:table-cell>
          <table:table-cell table:formula="of:=IF([.K24]=1;1;(IF(MOD([.K24];2)=0;[.K24]/2;3*[.K24]+1)))" office:value-type="float" office:value="17" calcext:value-type="float">
            <text:p>17</text:p>
          </table:table-cell>
          <table:table-cell table:formula="of:=IF([.L24]=1;1;(IF(MOD([.L24];2)=0;[.L24]/2;3*[.L24]+1)))" office:value-type="float" office:value="52" calcext:value-type="float">
            <text:p>52</text:p>
          </table:table-cell>
          <table:table-cell table:formula="of:=IF([.M24]=1;1;(IF(MOD([.M24];2)=0;[.M24]/2;3*[.M24]+1)))" office:value-type="float" office:value="26" calcext:value-type="float">
            <text:p>26</text:p>
          </table:table-cell>
          <table:table-cell table:formula="of:=IF([.N24]=1;1;(IF(MOD([.N24];2)=0;[.N24]/2;3*[.N24]+1)))" office:value-type="float" office:value="13" calcext:value-type="float">
            <text:p>13</text:p>
          </table:table-cell>
          <table:table-cell table:formula="of:=IF([.O24]=1;1;(IF(MOD([.O24];2)=0;[.O24]/2;3*[.O24]+1)))" office:value-type="float" office:value="40" calcext:value-type="float">
            <text:p>40</text:p>
          </table:table-cell>
          <table:table-cell table:formula="of:=IF([.P24]=1;1;(IF(MOD([.P24];2)=0;[.P24]/2;3*[.P24]+1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25]=1;1;(IF(MOD([.A25];2)=0;[.A25]/2;3*[.A25]+1)))" office:value-type="float" office:value="13" calcext:value-type="float">
            <text:p>13</text:p>
          </table:table-cell>
          <table:table-cell table:formula="of:=IF([.B25]=1;1;(IF(MOD([.B25];2)=0;[.B25]/2;3*[.B25]+1)))" office:value-type="float" office:value="40" calcext:value-type="float">
            <text:p>40</text:p>
          </table:table-cell>
          <table:table-cell table:formula="of:=IF([.C25]=1;1;(IF(MOD([.C25];2)=0;[.C25]/2;3*[.C25]+1)))" office:value-type="float" office:value="20" calcext:value-type="float">
            <text:p>20</text:p>
          </table:table-cell>
          <table:table-cell table:formula="of:=IF([.D25]=1;1;(IF(MOD([.D25];2)=0;[.D25]/2;3*[.D25]+1)))" office:value-type="float" office:value="10" calcext:value-type="float">
            <text:p>10</text:p>
          </table:table-cell>
          <table:table-cell table:formula="of:=IF([.E25]=1;1;(IF(MOD([.E25];2)=0;[.E25]/2;3*[.E25]+1)))" office:value-type="float" office:value="5" calcext:value-type="float">
            <text:p>5</text:p>
          </table:table-cell>
          <table:table-cell table:formula="of:=IF([.F25]=1;1;(IF(MOD([.F25];2)=0;[.F25]/2;3*[.F25]+1)))" office:value-type="float" office:value="16" calcext:value-type="float">
            <text:p>16</text:p>
          </table:table-cell>
          <table:table-cell table:formula="of:=IF([.G25]=1;1;(IF(MOD([.G25];2)=0;[.G25]/2;3*[.G25]+1)))" office:value-type="float" office:value="8" calcext:value-type="float">
            <text:p>8</text:p>
          </table:table-cell>
          <table:table-cell table:formula="of:=IF([.H25]=1;1;(IF(MOD([.H25];2)=0;[.H25]/2;3*[.H25]+1)))" office:value-type="float" office:value="4" calcext:value-type="float">
            <text:p>4</text:p>
          </table:table-cell>
          <table:table-cell table:formula="of:=IF([.I25]=1;1;(IF(MOD([.I25];2)=0;[.I25]/2;3*[.I25]+1)))" office:value-type="float" office:value="2" calcext:value-type="float">
            <text:p>2</text:p>
          </table:table-cell>
          <table:table-cell table:formula="of:=IF([.J25]=1;1;(IF(MOD([.J25];2)=0;[.J25]/2;3*[.J25]+1)))" office:value-type="float" office:value="1" calcext:value-type="float">
            <text:p>1</text:p>
          </table:table-cell>
          <table:table-cell table:formula="of:=IF([.K25]=1;1;(IF(MOD([.K25];2)=0;[.K25]/2;3*[.K25]+1)))" office:value-type="float" office:value="1" calcext:value-type="float">
            <text:p>1</text:p>
          </table:table-cell>
          <table:table-cell table:formula="of:=IF([.L25]=1;1;(IF(MOD([.L25];2)=0;[.L25]/2;3*[.L25]+1)))" office:value-type="float" office:value="1" calcext:value-type="float">
            <text:p>1</text:p>
          </table:table-cell>
          <table:table-cell table:formula="of:=IF([.M25]=1;1;(IF(MOD([.M25];2)=0;[.M25]/2;3*[.M25]+1)))" office:value-type="float" office:value="1" calcext:value-type="float">
            <text:p>1</text:p>
          </table:table-cell>
          <table:table-cell table:formula="of:=IF([.N25]=1;1;(IF(MOD([.N25];2)=0;[.N25]/2;3*[.N25]+1)))" office:value-type="float" office:value="1" calcext:value-type="float">
            <text:p>1</text:p>
          </table:table-cell>
          <table:table-cell table:formula="of:=IF([.O25]=1;1;(IF(MOD([.O25];2)=0;[.O25]/2;3*[.O25]+1)))" office:value-type="float" office:value="1" calcext:value-type="float">
            <text:p>1</text:p>
          </table:table-cell>
          <table:table-cell table:formula="of:=IF([.P25]=1;1;(IF(MOD([.P25];2)=0;[.P25]/2;3*[.P25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26]=1;1;(IF(MOD([.A26];2)=0;[.A26]/2;3*[.A26]+1)))" office:value-type="float" office:value="82" calcext:value-type="float">
            <text:p>82</text:p>
          </table:table-cell>
          <table:table-cell table:formula="of:=IF([.B26]=1;1;(IF(MOD([.B26];2)=0;[.B26]/2;3*[.B26]+1)))" office:value-type="float" office:value="41" calcext:value-type="float">
            <text:p>41</text:p>
          </table:table-cell>
          <table:table-cell table:formula="of:=IF([.C26]=1;1;(IF(MOD([.C26];2)=0;[.C26]/2;3*[.C26]+1)))" office:value-type="float" office:value="124" calcext:value-type="float">
            <text:p>124</text:p>
          </table:table-cell>
          <table:table-cell table:formula="of:=IF([.D26]=1;1;(IF(MOD([.D26];2)=0;[.D26]/2;3*[.D26]+1)))" office:value-type="float" office:value="62" calcext:value-type="float">
            <text:p>62</text:p>
          </table:table-cell>
          <table:table-cell table:formula="of:=IF([.E26]=1;1;(IF(MOD([.E26];2)=0;[.E26]/2;3*[.E26]+1)))" office:value-type="float" office:value="31" calcext:value-type="float">
            <text:p>31</text:p>
          </table:table-cell>
          <table:table-cell table:formula="of:=IF([.F26]=1;1;(IF(MOD([.F26];2)=0;[.F26]/2;3*[.F26]+1)))" office:value-type="float" office:value="94" calcext:value-type="float">
            <text:p>94</text:p>
          </table:table-cell>
          <table:table-cell table:formula="of:=IF([.G26]=1;1;(IF(MOD([.G26];2)=0;[.G26]/2;3*[.G26]+1)))" office:value-type="float" office:value="47" calcext:value-type="float">
            <text:p>47</text:p>
          </table:table-cell>
          <table:table-cell table:formula="of:=IF([.H26]=1;1;(IF(MOD([.H26];2)=0;[.H26]/2;3*[.H26]+1)))" office:value-type="float" office:value="142" calcext:value-type="float">
            <text:p>142</text:p>
          </table:table-cell>
          <table:table-cell table:formula="of:=IF([.I26]=1;1;(IF(MOD([.I26];2)=0;[.I26]/2;3*[.I26]+1)))" office:value-type="float" office:value="71" calcext:value-type="float">
            <text:p>71</text:p>
          </table:table-cell>
          <table:table-cell table:formula="of:=IF([.J26]=1;1;(IF(MOD([.J26];2)=0;[.J26]/2;3*[.J26]+1)))" office:value-type="float" office:value="214" calcext:value-type="float">
            <text:p>214</text:p>
          </table:table-cell>
          <table:table-cell table:formula="of:=IF([.K26]=1;1;(IF(MOD([.K26];2)=0;[.K26]/2;3*[.K26]+1)))" office:value-type="float" office:value="107" calcext:value-type="float">
            <text:p>107</text:p>
          </table:table-cell>
          <table:table-cell table:formula="of:=IF([.L26]=1;1;(IF(MOD([.L26];2)=0;[.L26]/2;3*[.L26]+1)))" office:value-type="float" office:value="322" calcext:value-type="float">
            <text:p>322</text:p>
          </table:table-cell>
          <table:table-cell table:formula="of:=IF([.M26]=1;1;(IF(MOD([.M26];2)=0;[.M26]/2;3*[.M26]+1)))" office:value-type="float" office:value="161" calcext:value-type="float">
            <text:p>161</text:p>
          </table:table-cell>
          <table:table-cell table:formula="of:=IF([.N26]=1;1;(IF(MOD([.N26];2)=0;[.N26]/2;3*[.N26]+1)))" office:value-type="float" office:value="484" calcext:value-type="float">
            <text:p>484</text:p>
          </table:table-cell>
          <table:table-cell table:formula="of:=IF([.O26]=1;1;(IF(MOD([.O26];2)=0;[.O26]/2;3*[.O26]+1)))" office:value-type="float" office:value="242" calcext:value-type="float">
            <text:p>242</text:p>
          </table:table-cell>
          <table:table-cell table:formula="of:=IF([.P26]=1;1;(IF(MOD([.P26];2)=0;[.P26]/2;3*[.P26]+1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27]=1;1;(IF(MOD([.A27];2)=0;[.A27]/2;3*[.A27]+1)))" office:value-type="float" office:value="14" calcext:value-type="float">
            <text:p>14</text:p>
          </table:table-cell>
          <table:table-cell table:formula="of:=IF([.B27]=1;1;(IF(MOD([.B27];2)=0;[.B27]/2;3*[.B27]+1)))" office:value-type="float" office:value="7" calcext:value-type="float">
            <text:p>7</text:p>
          </table:table-cell>
          <table:table-cell table:formula="of:=IF([.C27]=1;1;(IF(MOD([.C27];2)=0;[.C27]/2;3*[.C27]+1)))" office:value-type="float" office:value="22" calcext:value-type="float">
            <text:p>22</text:p>
          </table:table-cell>
          <table:table-cell table:formula="of:=IF([.D27]=1;1;(IF(MOD([.D27];2)=0;[.D27]/2;3*[.D27]+1)))" office:value-type="float" office:value="11" calcext:value-type="float">
            <text:p>11</text:p>
          </table:table-cell>
          <table:table-cell table:formula="of:=IF([.E27]=1;1;(IF(MOD([.E27];2)=0;[.E27]/2;3*[.E27]+1)))" office:value-type="float" office:value="34" calcext:value-type="float">
            <text:p>34</text:p>
          </table:table-cell>
          <table:table-cell table:formula="of:=IF([.F27]=1;1;(IF(MOD([.F27];2)=0;[.F27]/2;3*[.F27]+1)))" office:value-type="float" office:value="17" calcext:value-type="float">
            <text:p>17</text:p>
          </table:table-cell>
          <table:table-cell table:formula="of:=IF([.G27]=1;1;(IF(MOD([.G27];2)=0;[.G27]/2;3*[.G27]+1)))" office:value-type="float" office:value="52" calcext:value-type="float">
            <text:p>52</text:p>
          </table:table-cell>
          <table:table-cell table:formula="of:=IF([.H27]=1;1;(IF(MOD([.H27];2)=0;[.H27]/2;3*[.H27]+1)))" office:value-type="float" office:value="26" calcext:value-type="float">
            <text:p>26</text:p>
          </table:table-cell>
          <table:table-cell table:formula="of:=IF([.I27]=1;1;(IF(MOD([.I27];2)=0;[.I27]/2;3*[.I27]+1)))" office:value-type="float" office:value="13" calcext:value-type="float">
            <text:p>13</text:p>
          </table:table-cell>
          <table:table-cell table:formula="of:=IF([.J27]=1;1;(IF(MOD([.J27];2)=0;[.J27]/2;3*[.J27]+1)))" office:value-type="float" office:value="40" calcext:value-type="float">
            <text:p>40</text:p>
          </table:table-cell>
          <table:table-cell table:formula="of:=IF([.K27]=1;1;(IF(MOD([.K27];2)=0;[.K27]/2;3*[.K27]+1)))" office:value-type="float" office:value="20" calcext:value-type="float">
            <text:p>20</text:p>
          </table:table-cell>
          <table:table-cell table:formula="of:=IF([.L27]=1;1;(IF(MOD([.L27];2)=0;[.L27]/2;3*[.L27]+1)))" office:value-type="float" office:value="10" calcext:value-type="float">
            <text:p>10</text:p>
          </table:table-cell>
          <table:table-cell table:formula="of:=IF([.M27]=1;1;(IF(MOD([.M27];2)=0;[.M27]/2;3*[.M27]+1)))" office:value-type="float" office:value="5" calcext:value-type="float">
            <text:p>5</text:p>
          </table:table-cell>
          <table:table-cell table:formula="of:=IF([.N27]=1;1;(IF(MOD([.N27];2)=0;[.N27]/2;3*[.N27]+1)))" office:value-type="float" office:value="16" calcext:value-type="float">
            <text:p>16</text:p>
          </table:table-cell>
          <table:table-cell table:formula="of:=IF([.O27]=1;1;(IF(MOD([.O27];2)=0;[.O27]/2;3*[.O27]+1)))" office:value-type="float" office:value="8" calcext:value-type="float">
            <text:p>8</text:p>
          </table:table-cell>
          <table:table-cell table:formula="of:=IF([.P27]=1;1;(IF(MOD([.P27];2)=0;[.P27]/2;3*[.P27]+1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28]=1;1;(IF(MOD([.A28];2)=0;[.A28]/2;3*[.A28]+1)))" office:value-type="float" office:value="88" calcext:value-type="float">
            <text:p>88</text:p>
          </table:table-cell>
          <table:table-cell table:formula="of:=IF([.B28]=1;1;(IF(MOD([.B28];2)=0;[.B28]/2;3*[.B28]+1)))" office:value-type="float" office:value="44" calcext:value-type="float">
            <text:p>44</text:p>
          </table:table-cell>
          <table:table-cell table:formula="of:=IF([.C28]=1;1;(IF(MOD([.C28];2)=0;[.C28]/2;3*[.C28]+1)))" office:value-type="float" office:value="22" calcext:value-type="float">
            <text:p>22</text:p>
          </table:table-cell>
          <table:table-cell table:formula="of:=IF([.D28]=1;1;(IF(MOD([.D28];2)=0;[.D28]/2;3*[.D28]+1)))" office:value-type="float" office:value="11" calcext:value-type="float">
            <text:p>11</text:p>
          </table:table-cell>
          <table:table-cell table:formula="of:=IF([.E28]=1;1;(IF(MOD([.E28];2)=0;[.E28]/2;3*[.E28]+1)))" office:value-type="float" office:value="34" calcext:value-type="float">
            <text:p>34</text:p>
          </table:table-cell>
          <table:table-cell table:formula="of:=IF([.F28]=1;1;(IF(MOD([.F28];2)=0;[.F28]/2;3*[.F28]+1)))" office:value-type="float" office:value="17" calcext:value-type="float">
            <text:p>17</text:p>
          </table:table-cell>
          <table:table-cell table:formula="of:=IF([.G28]=1;1;(IF(MOD([.G28];2)=0;[.G28]/2;3*[.G28]+1)))" office:value-type="float" office:value="52" calcext:value-type="float">
            <text:p>52</text:p>
          </table:table-cell>
          <table:table-cell table:formula="of:=IF([.H28]=1;1;(IF(MOD([.H28];2)=0;[.H28]/2;3*[.H28]+1)))" office:value-type="float" office:value="26" calcext:value-type="float">
            <text:p>26</text:p>
          </table:table-cell>
          <table:table-cell table:formula="of:=IF([.I28]=1;1;(IF(MOD([.I28];2)=0;[.I28]/2;3*[.I28]+1)))" office:value-type="float" office:value="13" calcext:value-type="float">
            <text:p>13</text:p>
          </table:table-cell>
          <table:table-cell table:formula="of:=IF([.J28]=1;1;(IF(MOD([.J28];2)=0;[.J28]/2;3*[.J28]+1)))" office:value-type="float" office:value="40" calcext:value-type="float">
            <text:p>40</text:p>
          </table:table-cell>
          <table:table-cell table:formula="of:=IF([.K28]=1;1;(IF(MOD([.K28];2)=0;[.K28]/2;3*[.K28]+1)))" office:value-type="float" office:value="20" calcext:value-type="float">
            <text:p>20</text:p>
          </table:table-cell>
          <table:table-cell table:formula="of:=IF([.L28]=1;1;(IF(MOD([.L28];2)=0;[.L28]/2;3*[.L28]+1)))" office:value-type="float" office:value="10" calcext:value-type="float">
            <text:p>10</text:p>
          </table:table-cell>
          <table:table-cell table:formula="of:=IF([.M28]=1;1;(IF(MOD([.M28];2)=0;[.M28]/2;3*[.M28]+1)))" office:value-type="float" office:value="5" calcext:value-type="float">
            <text:p>5</text:p>
          </table:table-cell>
          <table:table-cell table:formula="of:=IF([.N28]=1;1;(IF(MOD([.N28];2)=0;[.N28]/2;3*[.N28]+1)))" office:value-type="float" office:value="16" calcext:value-type="float">
            <text:p>16</text:p>
          </table:table-cell>
          <table:table-cell table:formula="of:=IF([.O28]=1;1;(IF(MOD([.O28];2)=0;[.O28]/2;3*[.O28]+1)))" office:value-type="float" office:value="8" calcext:value-type="float">
            <text:p>8</text:p>
          </table:table-cell>
          <table:table-cell table:formula="of:=IF([.P28]=1;1;(IF(MOD([.P28];2)=0;[.P28]/2;3*[.P28]+1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29]=1;1;(IF(MOD([.A29];2)=0;[.A29]/2;3*[.A29]+1)))" office:value-type="float" office:value="15" calcext:value-type="float">
            <text:p>15</text:p>
          </table:table-cell>
          <table:table-cell table:formula="of:=IF([.B29]=1;1;(IF(MOD([.B29];2)=0;[.B29]/2;3*[.B29]+1)))" office:value-type="float" office:value="46" calcext:value-type="float">
            <text:p>46</text:p>
          </table:table-cell>
          <table:table-cell table:formula="of:=IF([.C29]=1;1;(IF(MOD([.C29];2)=0;[.C29]/2;3*[.C29]+1)))" office:value-type="float" office:value="23" calcext:value-type="float">
            <text:p>23</text:p>
          </table:table-cell>
          <table:table-cell table:formula="of:=IF([.D29]=1;1;(IF(MOD([.D29];2)=0;[.D29]/2;3*[.D29]+1)))" office:value-type="float" office:value="70" calcext:value-type="float">
            <text:p>70</text:p>
          </table:table-cell>
          <table:table-cell table:formula="of:=IF([.E29]=1;1;(IF(MOD([.E29];2)=0;[.E29]/2;3*[.E29]+1)))" office:value-type="float" office:value="35" calcext:value-type="float">
            <text:p>35</text:p>
          </table:table-cell>
          <table:table-cell table:formula="of:=IF([.F29]=1;1;(IF(MOD([.F29];2)=0;[.F29]/2;3*[.F29]+1)))" office:value-type="float" office:value="106" calcext:value-type="float">
            <text:p>106</text:p>
          </table:table-cell>
          <table:table-cell table:formula="of:=IF([.G29]=1;1;(IF(MOD([.G29];2)=0;[.G29]/2;3*[.G29]+1)))" office:value-type="float" office:value="53" calcext:value-type="float">
            <text:p>53</text:p>
          </table:table-cell>
          <table:table-cell table:formula="of:=IF([.H29]=1;1;(IF(MOD([.H29];2)=0;[.H29]/2;3*[.H29]+1)))" office:value-type="float" office:value="160" calcext:value-type="float">
            <text:p>160</text:p>
          </table:table-cell>
          <table:table-cell table:formula="of:=IF([.I29]=1;1;(IF(MOD([.I29];2)=0;[.I29]/2;3*[.I29]+1)))" office:value-type="float" office:value="80" calcext:value-type="float">
            <text:p>80</text:p>
          </table:table-cell>
          <table:table-cell table:formula="of:=IF([.J29]=1;1;(IF(MOD([.J29];2)=0;[.J29]/2;3*[.J29]+1)))" office:value-type="float" office:value="40" calcext:value-type="float">
            <text:p>40</text:p>
          </table:table-cell>
          <table:table-cell table:formula="of:=IF([.K29]=1;1;(IF(MOD([.K29];2)=0;[.K29]/2;3*[.K29]+1)))" office:value-type="float" office:value="20" calcext:value-type="float">
            <text:p>20</text:p>
          </table:table-cell>
          <table:table-cell table:formula="of:=IF([.L29]=1;1;(IF(MOD([.L29];2)=0;[.L29]/2;3*[.L29]+1)))" office:value-type="float" office:value="10" calcext:value-type="float">
            <text:p>10</text:p>
          </table:table-cell>
          <table:table-cell table:formula="of:=IF([.M29]=1;1;(IF(MOD([.M29];2)=0;[.M29]/2;3*[.M29]+1)))" office:value-type="float" office:value="5" calcext:value-type="float">
            <text:p>5</text:p>
          </table:table-cell>
          <table:table-cell table:formula="of:=IF([.N29]=1;1;(IF(MOD([.N29];2)=0;[.N29]/2;3*[.N29]+1)))" office:value-type="float" office:value="16" calcext:value-type="float">
            <text:p>16</text:p>
          </table:table-cell>
          <table:table-cell table:formula="of:=IF([.O29]=1;1;(IF(MOD([.O29];2)=0;[.O29]/2;3*[.O29]+1)))" office:value-type="float" office:value="8" calcext:value-type="float">
            <text:p>8</text:p>
          </table:table-cell>
          <table:table-cell table:formula="of:=IF([.P29]=1;1;(IF(MOD([.P29];2)=0;[.P29]/2;3*[.P29]+1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30]=1;1;(IF(MOD([.A30];2)=0;[.A30]/2;3*[.A30]+1)))" office:value-type="float" office:value="94" calcext:value-type="float">
            <text:p>94</text:p>
          </table:table-cell>
          <table:table-cell table:formula="of:=IF([.B30]=1;1;(IF(MOD([.B30];2)=0;[.B30]/2;3*[.B30]+1)))" office:value-type="float" office:value="47" calcext:value-type="float">
            <text:p>47</text:p>
          </table:table-cell>
          <table:table-cell table:formula="of:=IF([.C30]=1;1;(IF(MOD([.C30];2)=0;[.C30]/2;3*[.C30]+1)))" office:value-type="float" office:value="142" calcext:value-type="float">
            <text:p>142</text:p>
          </table:table-cell>
          <table:table-cell table:formula="of:=IF([.D30]=1;1;(IF(MOD([.D30];2)=0;[.D30]/2;3*[.D30]+1)))" office:value-type="float" office:value="71" calcext:value-type="float">
            <text:p>71</text:p>
          </table:table-cell>
          <table:table-cell table:formula="of:=IF([.E30]=1;1;(IF(MOD([.E30];2)=0;[.E30]/2;3*[.E30]+1)))" office:value-type="float" office:value="214" calcext:value-type="float">
            <text:p>214</text:p>
          </table:table-cell>
          <table:table-cell table:formula="of:=IF([.F30]=1;1;(IF(MOD([.F30];2)=0;[.F30]/2;3*[.F30]+1)))" office:value-type="float" office:value="107" calcext:value-type="float">
            <text:p>107</text:p>
          </table:table-cell>
          <table:table-cell table:formula="of:=IF([.G30]=1;1;(IF(MOD([.G30];2)=0;[.G30]/2;3*[.G30]+1)))" office:value-type="float" office:value="322" calcext:value-type="float">
            <text:p>322</text:p>
          </table:table-cell>
          <table:table-cell table:formula="of:=IF([.H30]=1;1;(IF(MOD([.H30];2)=0;[.H30]/2;3*[.H30]+1)))" office:value-type="float" office:value="161" calcext:value-type="float">
            <text:p>161</text:p>
          </table:table-cell>
          <table:table-cell table:formula="of:=IF([.I30]=1;1;(IF(MOD([.I30];2)=0;[.I30]/2;3*[.I30]+1)))" office:value-type="float" office:value="484" calcext:value-type="float">
            <text:p>484</text:p>
          </table:table-cell>
          <table:table-cell table:formula="of:=IF([.J30]=1;1;(IF(MOD([.J30];2)=0;[.J30]/2;3*[.J30]+1)))" office:value-type="float" office:value="242" calcext:value-type="float">
            <text:p>242</text:p>
          </table:table-cell>
          <table:table-cell table:formula="of:=IF([.K30]=1;1;(IF(MOD([.K30];2)=0;[.K30]/2;3*[.K30]+1)))" office:value-type="float" office:value="121" calcext:value-type="float">
            <text:p>121</text:p>
          </table:table-cell>
          <table:table-cell table:formula="of:=IF([.L30]=1;1;(IF(MOD([.L30];2)=0;[.L30]/2;3*[.L30]+1)))" office:value-type="float" office:value="364" calcext:value-type="float">
            <text:p>364</text:p>
          </table:table-cell>
          <table:table-cell table:formula="of:=IF([.M30]=1;1;(IF(MOD([.M30];2)=0;[.M30]/2;3*[.M30]+1)))" office:value-type="float" office:value="182" calcext:value-type="float">
            <text:p>182</text:p>
          </table:table-cell>
          <table:table-cell table:formula="of:=IF([.N30]=1;1;(IF(MOD([.N30];2)=0;[.N30]/2;3*[.N30]+1)))" office:value-type="float" office:value="91" calcext:value-type="float">
            <text:p>91</text:p>
          </table:table-cell>
          <table:table-cell table:formula="of:=IF([.O30]=1;1;(IF(MOD([.O30];2)=0;[.O30]/2;3*[.O30]+1)))" office:value-type="float" office:value="274" calcext:value-type="float">
            <text:p>274</text:p>
          </table:table-cell>
          <table:table-cell table:formula="of:=IF([.P30]=1;1;(IF(MOD([.P30];2)=0;[.P30]/2;3*[.P30]+1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31]=1;1;(IF(MOD([.A31];2)=0;[.A31]/2;3*[.A31]+1)))" office:value-type="float" office:value="16" calcext:value-type="float">
            <text:p>16</text:p>
          </table:table-cell>
          <table:table-cell table:formula="of:=IF([.B31]=1;1;(IF(MOD([.B31];2)=0;[.B31]/2;3*[.B31]+1)))" office:value-type="float" office:value="8" calcext:value-type="float">
            <text:p>8</text:p>
          </table:table-cell>
          <table:table-cell table:formula="of:=IF([.C31]=1;1;(IF(MOD([.C31];2)=0;[.C31]/2;3*[.C31]+1)))" office:value-type="float" office:value="4" calcext:value-type="float">
            <text:p>4</text:p>
          </table:table-cell>
          <table:table-cell table:formula="of:=IF([.D31]=1;1;(IF(MOD([.D31];2)=0;[.D31]/2;3*[.D31]+1)))" office:value-type="float" office:value="2" calcext:value-type="float">
            <text:p>2</text:p>
          </table:table-cell>
          <table:table-cell table:formula="of:=IF([.E31]=1;1;(IF(MOD([.E31];2)=0;[.E31]/2;3*[.E31]+1)))" office:value-type="float" office:value="1" calcext:value-type="float">
            <text:p>1</text:p>
          </table:table-cell>
          <table:table-cell table:formula="of:=IF([.F31]=1;1;(IF(MOD([.F31];2)=0;[.F31]/2;3*[.F31]+1)))" office:value-type="float" office:value="1" calcext:value-type="float">
            <text:p>1</text:p>
          </table:table-cell>
          <table:table-cell table:formula="of:=IF([.G31]=1;1;(IF(MOD([.G31];2)=0;[.G31]/2;3*[.G31]+1)))" office:value-type="float" office:value="1" calcext:value-type="float">
            <text:p>1</text:p>
          </table:table-cell>
          <table:table-cell table:formula="of:=IF([.H31]=1;1;(IF(MOD([.H31];2)=0;[.H31]/2;3*[.H31]+1)))" office:value-type="float" office:value="1" calcext:value-type="float">
            <text:p>1</text:p>
          </table:table-cell>
          <table:table-cell table:formula="of:=IF([.I31]=1;1;(IF(MOD([.I31];2)=0;[.I31]/2;3*[.I31]+1)))" office:value-type="float" office:value="1" calcext:value-type="float">
            <text:p>1</text:p>
          </table:table-cell>
          <table:table-cell table:formula="of:=IF([.J31]=1;1;(IF(MOD([.J31];2)=0;[.J31]/2;3*[.J31]+1)))" office:value-type="float" office:value="1" calcext:value-type="float">
            <text:p>1</text:p>
          </table:table-cell>
          <table:table-cell table:formula="of:=IF([.K31]=1;1;(IF(MOD([.K31];2)=0;[.K31]/2;3*[.K31]+1)))" office:value-type="float" office:value="1" calcext:value-type="float">
            <text:p>1</text:p>
          </table:table-cell>
          <table:table-cell table:formula="of:=IF([.L31]=1;1;(IF(MOD([.L31];2)=0;[.L31]/2;3*[.L31]+1)))" office:value-type="float" office:value="1" calcext:value-type="float">
            <text:p>1</text:p>
          </table:table-cell>
          <table:table-cell table:formula="of:=IF([.M31]=1;1;(IF(MOD([.M31];2)=0;[.M31]/2;3*[.M31]+1)))" office:value-type="float" office:value="1" calcext:value-type="float">
            <text:p>1</text:p>
          </table:table-cell>
          <table:table-cell table:formula="of:=IF([.N31]=1;1;(IF(MOD([.N31];2)=0;[.N31]/2;3*[.N31]+1)))" office:value-type="float" office:value="1" calcext:value-type="float">
            <text:p>1</text:p>
          </table:table-cell>
          <table:table-cell table:formula="of:=IF([.O31]=1;1;(IF(MOD([.O31];2)=0;[.O31]/2;3*[.O31]+1)))" office:value-type="float" office:value="1" calcext:value-type="float">
            <text:p>1</text:p>
          </table:table-cell>
          <table:table-cell table:formula="of:=IF([.P31]=1;1;(IF(MOD([.P31];2)=0;[.P31]/2;3*[.P3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32]=1;1;(IF(MOD([.A32];2)=0;[.A32]/2;3*[.A32]+1)))" office:value-type="float" office:value="100" calcext:value-type="float">
            <text:p>100</text:p>
          </table:table-cell>
          <table:table-cell table:formula="of:=IF([.B32]=1;1;(IF(MOD([.B32];2)=0;[.B32]/2;3*[.B32]+1)))" office:value-type="float" office:value="50" calcext:value-type="float">
            <text:p>50</text:p>
          </table:table-cell>
          <table:table-cell table:formula="of:=IF([.C32]=1;1;(IF(MOD([.C32];2)=0;[.C32]/2;3*[.C32]+1)))" office:value-type="float" office:value="25" calcext:value-type="float">
            <text:p>25</text:p>
          </table:table-cell>
          <table:table-cell table:formula="of:=IF([.D32]=1;1;(IF(MOD([.D32];2)=0;[.D32]/2;3*[.D32]+1)))" office:value-type="float" office:value="76" calcext:value-type="float">
            <text:p>76</text:p>
          </table:table-cell>
          <table:table-cell table:formula="of:=IF([.E32]=1;1;(IF(MOD([.E32];2)=0;[.E32]/2;3*[.E32]+1)))" office:value-type="float" office:value="38" calcext:value-type="float">
            <text:p>38</text:p>
          </table:table-cell>
          <table:table-cell table:formula="of:=IF([.F32]=1;1;(IF(MOD([.F32];2)=0;[.F32]/2;3*[.F32]+1)))" office:value-type="float" office:value="19" calcext:value-type="float">
            <text:p>19</text:p>
          </table:table-cell>
          <table:table-cell table:formula="of:=IF([.G32]=1;1;(IF(MOD([.G32];2)=0;[.G32]/2;3*[.G32]+1)))" office:value-type="float" office:value="58" calcext:value-type="float">
            <text:p>58</text:p>
          </table:table-cell>
          <table:table-cell table:formula="of:=IF([.H32]=1;1;(IF(MOD([.H32];2)=0;[.H32]/2;3*[.H32]+1)))" office:value-type="float" office:value="29" calcext:value-type="float">
            <text:p>29</text:p>
          </table:table-cell>
          <table:table-cell table:formula="of:=IF([.I32]=1;1;(IF(MOD([.I32];2)=0;[.I32]/2;3*[.I32]+1)))" office:value-type="float" office:value="88" calcext:value-type="float">
            <text:p>88</text:p>
          </table:table-cell>
          <table:table-cell table:formula="of:=IF([.J32]=1;1;(IF(MOD([.J32];2)=0;[.J32]/2;3*[.J32]+1)))" office:value-type="float" office:value="44" calcext:value-type="float">
            <text:p>44</text:p>
          </table:table-cell>
          <table:table-cell table:formula="of:=IF([.K32]=1;1;(IF(MOD([.K32];2)=0;[.K32]/2;3*[.K32]+1)))" office:value-type="float" office:value="22" calcext:value-type="float">
            <text:p>22</text:p>
          </table:table-cell>
          <table:table-cell table:formula="of:=IF([.L32]=1;1;(IF(MOD([.L32];2)=0;[.L32]/2;3*[.L32]+1)))" office:value-type="float" office:value="11" calcext:value-type="float">
            <text:p>11</text:p>
          </table:table-cell>
          <table:table-cell table:formula="of:=IF([.M32]=1;1;(IF(MOD([.M32];2)=0;[.M32]/2;3*[.M32]+1)))" office:value-type="float" office:value="34" calcext:value-type="float">
            <text:p>34</text:p>
          </table:table-cell>
          <table:table-cell table:formula="of:=IF([.N32]=1;1;(IF(MOD([.N32];2)=0;[.N32]/2;3*[.N32]+1)))" office:value-type="float" office:value="17" calcext:value-type="float">
            <text:p>17</text:p>
          </table:table-cell>
          <table:table-cell table:formula="of:=IF([.O32]=1;1;(IF(MOD([.O32];2)=0;[.O32]/2;3*[.O32]+1)))" office:value-type="float" office:value="52" calcext:value-type="float">
            <text:p>52</text:p>
          </table:table-cell>
          <table:table-cell table:formula="of:=IF([.P32]=1;1;(IF(MOD([.P32];2)=0;[.P32]/2;3*[.P32]+1)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33]=1;1;(IF(MOD([.A33];2)=0;[.A33]/2;3*[.A33]+1)))" office:value-type="float" office:value="17" calcext:value-type="float">
            <text:p>17</text:p>
          </table:table-cell>
          <table:table-cell table:formula="of:=IF([.B33]=1;1;(IF(MOD([.B33];2)=0;[.B33]/2;3*[.B33]+1)))" office:value-type="float" office:value="52" calcext:value-type="float">
            <text:p>52</text:p>
          </table:table-cell>
          <table:table-cell table:formula="of:=IF([.C33]=1;1;(IF(MOD([.C33];2)=0;[.C33]/2;3*[.C33]+1)))" office:value-type="float" office:value="26" calcext:value-type="float">
            <text:p>26</text:p>
          </table:table-cell>
          <table:table-cell table:formula="of:=IF([.D33]=1;1;(IF(MOD([.D33];2)=0;[.D33]/2;3*[.D33]+1)))" office:value-type="float" office:value="13" calcext:value-type="float">
            <text:p>13</text:p>
          </table:table-cell>
          <table:table-cell table:formula="of:=IF([.E33]=1;1;(IF(MOD([.E33];2)=0;[.E33]/2;3*[.E33]+1)))" office:value-type="float" office:value="40" calcext:value-type="float">
            <text:p>40</text:p>
          </table:table-cell>
          <table:table-cell table:formula="of:=IF([.F33]=1;1;(IF(MOD([.F33];2)=0;[.F33]/2;3*[.F33]+1)))" office:value-type="float" office:value="20" calcext:value-type="float">
            <text:p>20</text:p>
          </table:table-cell>
          <table:table-cell table:formula="of:=IF([.G33]=1;1;(IF(MOD([.G33];2)=0;[.G33]/2;3*[.G33]+1)))" office:value-type="float" office:value="10" calcext:value-type="float">
            <text:p>10</text:p>
          </table:table-cell>
          <table:table-cell table:formula="of:=IF([.H33]=1;1;(IF(MOD([.H33];2)=0;[.H33]/2;3*[.H33]+1)))" office:value-type="float" office:value="5" calcext:value-type="float">
            <text:p>5</text:p>
          </table:table-cell>
          <table:table-cell table:formula="of:=IF([.I33]=1;1;(IF(MOD([.I33];2)=0;[.I33]/2;3*[.I33]+1)))" office:value-type="float" office:value="16" calcext:value-type="float">
            <text:p>16</text:p>
          </table:table-cell>
          <table:table-cell table:formula="of:=IF([.J33]=1;1;(IF(MOD([.J33];2)=0;[.J33]/2;3*[.J33]+1)))" office:value-type="float" office:value="8" calcext:value-type="float">
            <text:p>8</text:p>
          </table:table-cell>
          <table:table-cell table:formula="of:=IF([.K33]=1;1;(IF(MOD([.K33];2)=0;[.K33]/2;3*[.K33]+1)))" office:value-type="float" office:value="4" calcext:value-type="float">
            <text:p>4</text:p>
          </table:table-cell>
          <table:table-cell table:formula="of:=IF([.L33]=1;1;(IF(MOD([.L33];2)=0;[.L33]/2;3*[.L33]+1)))" office:value-type="float" office:value="2" calcext:value-type="float">
            <text:p>2</text:p>
          </table:table-cell>
          <table:table-cell table:formula="of:=IF([.M33]=1;1;(IF(MOD([.M33];2)=0;[.M33]/2;3*[.M33]+1)))" office:value-type="float" office:value="1" calcext:value-type="float">
            <text:p>1</text:p>
          </table:table-cell>
          <table:table-cell table:formula="of:=IF([.N33]=1;1;(IF(MOD([.N33];2)=0;[.N33]/2;3*[.N33]+1)))" office:value-type="float" office:value="1" calcext:value-type="float">
            <text:p>1</text:p>
          </table:table-cell>
          <table:table-cell table:formula="of:=IF([.O33]=1;1;(IF(MOD([.O33];2)=0;[.O33]/2;3*[.O33]+1)))" office:value-type="float" office:value="1" calcext:value-type="float">
            <text:p>1</text:p>
          </table:table-cell>
          <table:table-cell table:formula="of:=IF([.P33]=1;1;(IF(MOD([.P33];2)=0;[.P33]/2;3*[.P33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34]=1;1;(IF(MOD([.A34];2)=0;[.A34]/2;3*[.A34]+1)))" office:value-type="float" office:value="106" calcext:value-type="float">
            <text:p>106</text:p>
          </table:table-cell>
          <table:table-cell table:formula="of:=IF([.B34]=1;1;(IF(MOD([.B34];2)=0;[.B34]/2;3*[.B34]+1)))" office:value-type="float" office:value="53" calcext:value-type="float">
            <text:p>53</text:p>
          </table:table-cell>
          <table:table-cell table:formula="of:=IF([.C34]=1;1;(IF(MOD([.C34];2)=0;[.C34]/2;3*[.C34]+1)))" office:value-type="float" office:value="160" calcext:value-type="float">
            <text:p>160</text:p>
          </table:table-cell>
          <table:table-cell table:formula="of:=IF([.D34]=1;1;(IF(MOD([.D34];2)=0;[.D34]/2;3*[.D34]+1)))" office:value-type="float" office:value="80" calcext:value-type="float">
            <text:p>80</text:p>
          </table:table-cell>
          <table:table-cell table:formula="of:=IF([.E34]=1;1;(IF(MOD([.E34];2)=0;[.E34]/2;3*[.E34]+1)))" office:value-type="float" office:value="40" calcext:value-type="float">
            <text:p>40</text:p>
          </table:table-cell>
          <table:table-cell table:formula="of:=IF([.F34]=1;1;(IF(MOD([.F34];2)=0;[.F34]/2;3*[.F34]+1)))" office:value-type="float" office:value="20" calcext:value-type="float">
            <text:p>20</text:p>
          </table:table-cell>
          <table:table-cell table:formula="of:=IF([.G34]=1;1;(IF(MOD([.G34];2)=0;[.G34]/2;3*[.G34]+1)))" office:value-type="float" office:value="10" calcext:value-type="float">
            <text:p>10</text:p>
          </table:table-cell>
          <table:table-cell table:formula="of:=IF([.H34]=1;1;(IF(MOD([.H34];2)=0;[.H34]/2;3*[.H34]+1)))" office:value-type="float" office:value="5" calcext:value-type="float">
            <text:p>5</text:p>
          </table:table-cell>
          <table:table-cell table:formula="of:=IF([.I34]=1;1;(IF(MOD([.I34];2)=0;[.I34]/2;3*[.I34]+1)))" office:value-type="float" office:value="16" calcext:value-type="float">
            <text:p>16</text:p>
          </table:table-cell>
          <table:table-cell table:formula="of:=IF([.J34]=1;1;(IF(MOD([.J34];2)=0;[.J34]/2;3*[.J34]+1)))" office:value-type="float" office:value="8" calcext:value-type="float">
            <text:p>8</text:p>
          </table:table-cell>
          <table:table-cell table:formula="of:=IF([.K34]=1;1;(IF(MOD([.K34];2)=0;[.K34]/2;3*[.K34]+1)))" office:value-type="float" office:value="4" calcext:value-type="float">
            <text:p>4</text:p>
          </table:table-cell>
          <table:table-cell table:formula="of:=IF([.L34]=1;1;(IF(MOD([.L34];2)=0;[.L34]/2;3*[.L34]+1)))" office:value-type="float" office:value="2" calcext:value-type="float">
            <text:p>2</text:p>
          </table:table-cell>
          <table:table-cell table:formula="of:=IF([.M34]=1;1;(IF(MOD([.M34];2)=0;[.M34]/2;3*[.M34]+1)))" office:value-type="float" office:value="1" calcext:value-type="float">
            <text:p>1</text:p>
          </table:table-cell>
          <table:table-cell table:formula="of:=IF([.N34]=1;1;(IF(MOD([.N34];2)=0;[.N34]/2;3*[.N34]+1)))" office:value-type="float" office:value="1" calcext:value-type="float">
            <text:p>1</text:p>
          </table:table-cell>
          <table:table-cell table:formula="of:=IF([.O34]=1;1;(IF(MOD([.O34];2)=0;[.O34]/2;3*[.O34]+1)))" office:value-type="float" office:value="1" calcext:value-type="float">
            <text:p>1</text:p>
          </table:table-cell>
          <table:table-cell table:formula="of:=IF([.P34]=1;1;(IF(MOD([.P34];2)=0;[.P34]/2;3*[.P34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35]=1;1;(IF(MOD([.A35];2)=0;[.A35]/2;3*[.A35]+1)))" office:value-type="float" office:value="18" calcext:value-type="float">
            <text:p>18</text:p>
          </table:table-cell>
          <table:table-cell table:formula="of:=IF([.B35]=1;1;(IF(MOD([.B35];2)=0;[.B35]/2;3*[.B35]+1)))" office:value-type="float" office:value="9" calcext:value-type="float">
            <text:p>9</text:p>
          </table:table-cell>
          <table:table-cell table:formula="of:=IF([.C35]=1;1;(IF(MOD([.C35];2)=0;[.C35]/2;3*[.C35]+1)))" office:value-type="float" office:value="28" calcext:value-type="float">
            <text:p>28</text:p>
          </table:table-cell>
          <table:table-cell table:formula="of:=IF([.D35]=1;1;(IF(MOD([.D35];2)=0;[.D35]/2;3*[.D35]+1)))" office:value-type="float" office:value="14" calcext:value-type="float">
            <text:p>14</text:p>
          </table:table-cell>
          <table:table-cell table:formula="of:=IF([.E35]=1;1;(IF(MOD([.E35];2)=0;[.E35]/2;3*[.E35]+1)))" office:value-type="float" office:value="7" calcext:value-type="float">
            <text:p>7</text:p>
          </table:table-cell>
          <table:table-cell table:formula="of:=IF([.F35]=1;1;(IF(MOD([.F35];2)=0;[.F35]/2;3*[.F35]+1)))" office:value-type="float" office:value="22" calcext:value-type="float">
            <text:p>22</text:p>
          </table:table-cell>
          <table:table-cell table:formula="of:=IF([.G35]=1;1;(IF(MOD([.G35];2)=0;[.G35]/2;3*[.G35]+1)))" office:value-type="float" office:value="11" calcext:value-type="float">
            <text:p>11</text:p>
          </table:table-cell>
          <table:table-cell table:formula="of:=IF([.H35]=1;1;(IF(MOD([.H35];2)=0;[.H35]/2;3*[.H35]+1)))" office:value-type="float" office:value="34" calcext:value-type="float">
            <text:p>34</text:p>
          </table:table-cell>
          <table:table-cell table:formula="of:=IF([.I35]=1;1;(IF(MOD([.I35];2)=0;[.I35]/2;3*[.I35]+1)))" office:value-type="float" office:value="17" calcext:value-type="float">
            <text:p>17</text:p>
          </table:table-cell>
          <table:table-cell table:formula="of:=IF([.J35]=1;1;(IF(MOD([.J35];2)=0;[.J35]/2;3*[.J35]+1)))" office:value-type="float" office:value="52" calcext:value-type="float">
            <text:p>52</text:p>
          </table:table-cell>
          <table:table-cell table:formula="of:=IF([.K35]=1;1;(IF(MOD([.K35];2)=0;[.K35]/2;3*[.K35]+1)))" office:value-type="float" office:value="26" calcext:value-type="float">
            <text:p>26</text:p>
          </table:table-cell>
          <table:table-cell table:formula="of:=IF([.L35]=1;1;(IF(MOD([.L35];2)=0;[.L35]/2;3*[.L35]+1)))" office:value-type="float" office:value="13" calcext:value-type="float">
            <text:p>13</text:p>
          </table:table-cell>
          <table:table-cell table:formula="of:=IF([.M35]=1;1;(IF(MOD([.M35];2)=0;[.M35]/2;3*[.M35]+1)))" office:value-type="float" office:value="40" calcext:value-type="float">
            <text:p>40</text:p>
          </table:table-cell>
          <table:table-cell table:formula="of:=IF([.N35]=1;1;(IF(MOD([.N35];2)=0;[.N35]/2;3*[.N35]+1)))" office:value-type="float" office:value="20" calcext:value-type="float">
            <text:p>20</text:p>
          </table:table-cell>
          <table:table-cell table:formula="of:=IF([.O35]=1;1;(IF(MOD([.O35];2)=0;[.O35]/2;3*[.O35]+1)))" office:value-type="float" office:value="10" calcext:value-type="float">
            <text:p>10</text:p>
          </table:table-cell>
          <table:table-cell table:formula="of:=IF([.P35]=1;1;(IF(MOD([.P35];2)=0;[.P35]/2;3*[.P35]+1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36]=1;1;(IF(MOD([.A36];2)=0;[.A36]/2;3*[.A36]+1)))" office:value-type="float" office:value="112" calcext:value-type="float">
            <text:p>112</text:p>
          </table:table-cell>
          <table:table-cell table:formula="of:=IF([.B36]=1;1;(IF(MOD([.B36];2)=0;[.B36]/2;3*[.B36]+1)))" office:value-type="float" office:value="56" calcext:value-type="float">
            <text:p>56</text:p>
          </table:table-cell>
          <table:table-cell table:formula="of:=IF([.C36]=1;1;(IF(MOD([.C36];2)=0;[.C36]/2;3*[.C36]+1)))" office:value-type="float" office:value="28" calcext:value-type="float">
            <text:p>28</text:p>
          </table:table-cell>
          <table:table-cell table:formula="of:=IF([.D36]=1;1;(IF(MOD([.D36];2)=0;[.D36]/2;3*[.D36]+1)))" office:value-type="float" office:value="14" calcext:value-type="float">
            <text:p>14</text:p>
          </table:table-cell>
          <table:table-cell table:formula="of:=IF([.E36]=1;1;(IF(MOD([.E36];2)=0;[.E36]/2;3*[.E36]+1)))" office:value-type="float" office:value="7" calcext:value-type="float">
            <text:p>7</text:p>
          </table:table-cell>
          <table:table-cell table:formula="of:=IF([.F36]=1;1;(IF(MOD([.F36];2)=0;[.F36]/2;3*[.F36]+1)))" office:value-type="float" office:value="22" calcext:value-type="float">
            <text:p>22</text:p>
          </table:table-cell>
          <table:table-cell table:formula="of:=IF([.G36]=1;1;(IF(MOD([.G36];2)=0;[.G36]/2;3*[.G36]+1)))" office:value-type="float" office:value="11" calcext:value-type="float">
            <text:p>11</text:p>
          </table:table-cell>
          <table:table-cell table:formula="of:=IF([.H36]=1;1;(IF(MOD([.H36];2)=0;[.H36]/2;3*[.H36]+1)))" office:value-type="float" office:value="34" calcext:value-type="float">
            <text:p>34</text:p>
          </table:table-cell>
          <table:table-cell table:formula="of:=IF([.I36]=1;1;(IF(MOD([.I36];2)=0;[.I36]/2;3*[.I36]+1)))" office:value-type="float" office:value="17" calcext:value-type="float">
            <text:p>17</text:p>
          </table:table-cell>
          <table:table-cell table:formula="of:=IF([.J36]=1;1;(IF(MOD([.J36];2)=0;[.J36]/2;3*[.J36]+1)))" office:value-type="float" office:value="52" calcext:value-type="float">
            <text:p>52</text:p>
          </table:table-cell>
          <table:table-cell table:formula="of:=IF([.K36]=1;1;(IF(MOD([.K36];2)=0;[.K36]/2;3*[.K36]+1)))" office:value-type="float" office:value="26" calcext:value-type="float">
            <text:p>26</text:p>
          </table:table-cell>
          <table:table-cell table:formula="of:=IF([.L36]=1;1;(IF(MOD([.L36];2)=0;[.L36]/2;3*[.L36]+1)))" office:value-type="float" office:value="13" calcext:value-type="float">
            <text:p>13</text:p>
          </table:table-cell>
          <table:table-cell table:formula="of:=IF([.M36]=1;1;(IF(MOD([.M36];2)=0;[.M36]/2;3*[.M36]+1)))" office:value-type="float" office:value="40" calcext:value-type="float">
            <text:p>40</text:p>
          </table:table-cell>
          <table:table-cell table:formula="of:=IF([.N36]=1;1;(IF(MOD([.N36];2)=0;[.N36]/2;3*[.N36]+1)))" office:value-type="float" office:value="20" calcext:value-type="float">
            <text:p>20</text:p>
          </table:table-cell>
          <table:table-cell table:formula="of:=IF([.O36]=1;1;(IF(MOD([.O36];2)=0;[.O36]/2;3*[.O36]+1)))" office:value-type="float" office:value="10" calcext:value-type="float">
            <text:p>10</text:p>
          </table:table-cell>
          <table:table-cell table:formula="of:=IF([.P36]=1;1;(IF(MOD([.P36];2)=0;[.P36]/2;3*[.P36]+1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37]=1;1;(IF(MOD([.A37];2)=0;[.A37]/2;3*[.A37]+1)))" office:value-type="float" office:value="19" calcext:value-type="float">
            <text:p>19</text:p>
          </table:table-cell>
          <table:table-cell table:formula="of:=IF([.B37]=1;1;(IF(MOD([.B37];2)=0;[.B37]/2;3*[.B37]+1)))" office:value-type="float" office:value="58" calcext:value-type="float">
            <text:p>58</text:p>
          </table:table-cell>
          <table:table-cell table:formula="of:=IF([.C37]=1;1;(IF(MOD([.C37];2)=0;[.C37]/2;3*[.C37]+1)))" office:value-type="float" office:value="29" calcext:value-type="float">
            <text:p>29</text:p>
          </table:table-cell>
          <table:table-cell table:formula="of:=IF([.D37]=1;1;(IF(MOD([.D37];2)=0;[.D37]/2;3*[.D37]+1)))" office:value-type="float" office:value="88" calcext:value-type="float">
            <text:p>88</text:p>
          </table:table-cell>
          <table:table-cell table:formula="of:=IF([.E37]=1;1;(IF(MOD([.E37];2)=0;[.E37]/2;3*[.E37]+1)))" office:value-type="float" office:value="44" calcext:value-type="float">
            <text:p>44</text:p>
          </table:table-cell>
          <table:table-cell table:formula="of:=IF([.F37]=1;1;(IF(MOD([.F37];2)=0;[.F37]/2;3*[.F37]+1)))" office:value-type="float" office:value="22" calcext:value-type="float">
            <text:p>22</text:p>
          </table:table-cell>
          <table:table-cell table:formula="of:=IF([.G37]=1;1;(IF(MOD([.G37];2)=0;[.G37]/2;3*[.G37]+1)))" office:value-type="float" office:value="11" calcext:value-type="float">
            <text:p>11</text:p>
          </table:table-cell>
          <table:table-cell table:formula="of:=IF([.H37]=1;1;(IF(MOD([.H37];2)=0;[.H37]/2;3*[.H37]+1)))" office:value-type="float" office:value="34" calcext:value-type="float">
            <text:p>34</text:p>
          </table:table-cell>
          <table:table-cell table:formula="of:=IF([.I37]=1;1;(IF(MOD([.I37];2)=0;[.I37]/2;3*[.I37]+1)))" office:value-type="float" office:value="17" calcext:value-type="float">
            <text:p>17</text:p>
          </table:table-cell>
          <table:table-cell table:formula="of:=IF([.J37]=1;1;(IF(MOD([.J37];2)=0;[.J37]/2;3*[.J37]+1)))" office:value-type="float" office:value="52" calcext:value-type="float">
            <text:p>52</text:p>
          </table:table-cell>
          <table:table-cell table:formula="of:=IF([.K37]=1;1;(IF(MOD([.K37];2)=0;[.K37]/2;3*[.K37]+1)))" office:value-type="float" office:value="26" calcext:value-type="float">
            <text:p>26</text:p>
          </table:table-cell>
          <table:table-cell table:formula="of:=IF([.L37]=1;1;(IF(MOD([.L37];2)=0;[.L37]/2;3*[.L37]+1)))" office:value-type="float" office:value="13" calcext:value-type="float">
            <text:p>13</text:p>
          </table:table-cell>
          <table:table-cell table:formula="of:=IF([.M37]=1;1;(IF(MOD([.M37];2)=0;[.M37]/2;3*[.M37]+1)))" office:value-type="float" office:value="40" calcext:value-type="float">
            <text:p>40</text:p>
          </table:table-cell>
          <table:table-cell table:formula="of:=IF([.N37]=1;1;(IF(MOD([.N37];2)=0;[.N37]/2;3*[.N37]+1)))" office:value-type="float" office:value="20" calcext:value-type="float">
            <text:p>20</text:p>
          </table:table-cell>
          <table:table-cell table:formula="of:=IF([.O37]=1;1;(IF(MOD([.O37];2)=0;[.O37]/2;3*[.O37]+1)))" office:value-type="float" office:value="10" calcext:value-type="float">
            <text:p>10</text:p>
          </table:table-cell>
          <table:table-cell table:formula="of:=IF([.P37]=1;1;(IF(MOD([.P37];2)=0;[.P37]/2;3*[.P37]+1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38]=1;1;(IF(MOD([.A38];2)=0;[.A38]/2;3*[.A38]+1)))" office:value-type="float" office:value="118" calcext:value-type="float">
            <text:p>118</text:p>
          </table:table-cell>
          <table:table-cell table:formula="of:=IF([.B38]=1;1;(IF(MOD([.B38];2)=0;[.B38]/2;3*[.B38]+1)))" office:value-type="float" office:value="59" calcext:value-type="float">
            <text:p>59</text:p>
          </table:table-cell>
          <table:table-cell table:formula="of:=IF([.C38]=1;1;(IF(MOD([.C38];2)=0;[.C38]/2;3*[.C38]+1)))" office:value-type="float" office:value="178" calcext:value-type="float">
            <text:p>178</text:p>
          </table:table-cell>
          <table:table-cell table:formula="of:=IF([.D38]=1;1;(IF(MOD([.D38];2)=0;[.D38]/2;3*[.D38]+1)))" office:value-type="float" office:value="89" calcext:value-type="float">
            <text:p>89</text:p>
          </table:table-cell>
          <table:table-cell table:formula="of:=IF([.E38]=1;1;(IF(MOD([.E38];2)=0;[.E38]/2;3*[.E38]+1)))" office:value-type="float" office:value="268" calcext:value-type="float">
            <text:p>268</text:p>
          </table:table-cell>
          <table:table-cell table:formula="of:=IF([.F38]=1;1;(IF(MOD([.F38];2)=0;[.F38]/2;3*[.F38]+1)))" office:value-type="float" office:value="134" calcext:value-type="float">
            <text:p>134</text:p>
          </table:table-cell>
          <table:table-cell table:formula="of:=IF([.G38]=1;1;(IF(MOD([.G38];2)=0;[.G38]/2;3*[.G38]+1)))" office:value-type="float" office:value="67" calcext:value-type="float">
            <text:p>67</text:p>
          </table:table-cell>
          <table:table-cell table:formula="of:=IF([.H38]=1;1;(IF(MOD([.H38];2)=0;[.H38]/2;3*[.H38]+1)))" office:value-type="float" office:value="202" calcext:value-type="float">
            <text:p>202</text:p>
          </table:table-cell>
          <table:table-cell table:formula="of:=IF([.I38]=1;1;(IF(MOD([.I38];2)=0;[.I38]/2;3*[.I38]+1)))" office:value-type="float" office:value="101" calcext:value-type="float">
            <text:p>101</text:p>
          </table:table-cell>
          <table:table-cell table:formula="of:=IF([.J38]=1;1;(IF(MOD([.J38];2)=0;[.J38]/2;3*[.J38]+1)))" office:value-type="float" office:value="304" calcext:value-type="float">
            <text:p>304</text:p>
          </table:table-cell>
          <table:table-cell table:formula="of:=IF([.K38]=1;1;(IF(MOD([.K38];2)=0;[.K38]/2;3*[.K38]+1)))" office:value-type="float" office:value="152" calcext:value-type="float">
            <text:p>152</text:p>
          </table:table-cell>
          <table:table-cell table:formula="of:=IF([.L38]=1;1;(IF(MOD([.L38];2)=0;[.L38]/2;3*[.L38]+1)))" office:value-type="float" office:value="76" calcext:value-type="float">
            <text:p>76</text:p>
          </table:table-cell>
          <table:table-cell table:formula="of:=IF([.M38]=1;1;(IF(MOD([.M38];2)=0;[.M38]/2;3*[.M38]+1)))" office:value-type="float" office:value="38" calcext:value-type="float">
            <text:p>38</text:p>
          </table:table-cell>
          <table:table-cell table:formula="of:=IF([.N38]=1;1;(IF(MOD([.N38];2)=0;[.N38]/2;3*[.N38]+1)))" office:value-type="float" office:value="19" calcext:value-type="float">
            <text:p>19</text:p>
          </table:table-cell>
          <table:table-cell table:formula="of:=IF([.O38]=1;1;(IF(MOD([.O38];2)=0;[.O38]/2;3*[.O38]+1)))" office:value-type="float" office:value="58" calcext:value-type="float">
            <text:p>58</text:p>
          </table:table-cell>
          <table:table-cell table:formula="of:=IF([.P38]=1;1;(IF(MOD([.P38];2)=0;[.P38]/2;3*[.P38]+1)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39]=1;1;(IF(MOD([.A39];2)=0;[.A39]/2;3*[.A39]+1)))" office:value-type="float" office:value="20" calcext:value-type="float">
            <text:p>20</text:p>
          </table:table-cell>
          <table:table-cell table:formula="of:=IF([.B39]=1;1;(IF(MOD([.B39];2)=0;[.B39]/2;3*[.B39]+1)))" office:value-type="float" office:value="10" calcext:value-type="float">
            <text:p>10</text:p>
          </table:table-cell>
          <table:table-cell table:formula="of:=IF([.C39]=1;1;(IF(MOD([.C39];2)=0;[.C39]/2;3*[.C39]+1)))" office:value-type="float" office:value="5" calcext:value-type="float">
            <text:p>5</text:p>
          </table:table-cell>
          <table:table-cell table:formula="of:=IF([.D39]=1;1;(IF(MOD([.D39];2)=0;[.D39]/2;3*[.D39]+1)))" office:value-type="float" office:value="16" calcext:value-type="float">
            <text:p>16</text:p>
          </table:table-cell>
          <table:table-cell table:formula="of:=IF([.E39]=1;1;(IF(MOD([.E39];2)=0;[.E39]/2;3*[.E39]+1)))" office:value-type="float" office:value="8" calcext:value-type="float">
            <text:p>8</text:p>
          </table:table-cell>
          <table:table-cell table:formula="of:=IF([.F39]=1;1;(IF(MOD([.F39];2)=0;[.F39]/2;3*[.F39]+1)))" office:value-type="float" office:value="4" calcext:value-type="float">
            <text:p>4</text:p>
          </table:table-cell>
          <table:table-cell table:formula="of:=IF([.G39]=1;1;(IF(MOD([.G39];2)=0;[.G39]/2;3*[.G39]+1)))" office:value-type="float" office:value="2" calcext:value-type="float">
            <text:p>2</text:p>
          </table:table-cell>
          <table:table-cell table:formula="of:=IF([.H39]=1;1;(IF(MOD([.H39];2)=0;[.H39]/2;3*[.H39]+1)))" office:value-type="float" office:value="1" calcext:value-type="float">
            <text:p>1</text:p>
          </table:table-cell>
          <table:table-cell table:formula="of:=IF([.I39]=1;1;(IF(MOD([.I39];2)=0;[.I39]/2;3*[.I39]+1)))" office:value-type="float" office:value="1" calcext:value-type="float">
            <text:p>1</text:p>
          </table:table-cell>
          <table:table-cell table:formula="of:=IF([.J39]=1;1;(IF(MOD([.J39];2)=0;[.J39]/2;3*[.J39]+1)))" office:value-type="float" office:value="1" calcext:value-type="float">
            <text:p>1</text:p>
          </table:table-cell>
          <table:table-cell table:formula="of:=IF([.K39]=1;1;(IF(MOD([.K39];2)=0;[.K39]/2;3*[.K39]+1)))" office:value-type="float" office:value="1" calcext:value-type="float">
            <text:p>1</text:p>
          </table:table-cell>
          <table:table-cell table:formula="of:=IF([.L39]=1;1;(IF(MOD([.L39];2)=0;[.L39]/2;3*[.L39]+1)))" office:value-type="float" office:value="1" calcext:value-type="float">
            <text:p>1</text:p>
          </table:table-cell>
          <table:table-cell table:formula="of:=IF([.M39]=1;1;(IF(MOD([.M39];2)=0;[.M39]/2;3*[.M39]+1)))" office:value-type="float" office:value="1" calcext:value-type="float">
            <text:p>1</text:p>
          </table:table-cell>
          <table:table-cell table:formula="of:=IF([.N39]=1;1;(IF(MOD([.N39];2)=0;[.N39]/2;3*[.N39]+1)))" office:value-type="float" office:value="1" calcext:value-type="float">
            <text:p>1</text:p>
          </table:table-cell>
          <table:table-cell table:formula="of:=IF([.O39]=1;1;(IF(MOD([.O39];2)=0;[.O39]/2;3*[.O39]+1)))" office:value-type="float" office:value="1" calcext:value-type="float">
            <text:p>1</text:p>
          </table:table-cell>
          <table:table-cell table:formula="of:=IF([.P39]=1;1;(IF(MOD([.P39];2)=0;[.P39]/2;3*[.P39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40]=1;1;(IF(MOD([.A40];2)=0;[.A40]/2;3*[.A40]+1)))" office:value-type="float" office:value="124" calcext:value-type="float">
            <text:p>124</text:p>
          </table:table-cell>
          <table:table-cell table:formula="of:=IF([.B40]=1;1;(IF(MOD([.B40];2)=0;[.B40]/2;3*[.B40]+1)))" office:value-type="float" office:value="62" calcext:value-type="float">
            <text:p>62</text:p>
          </table:table-cell>
          <table:table-cell table:formula="of:=IF([.C40]=1;1;(IF(MOD([.C40];2)=0;[.C40]/2;3*[.C40]+1)))" office:value-type="float" office:value="31" calcext:value-type="float">
            <text:p>31</text:p>
          </table:table-cell>
          <table:table-cell table:formula="of:=IF([.D40]=1;1;(IF(MOD([.D40];2)=0;[.D40]/2;3*[.D40]+1)))" office:value-type="float" office:value="94" calcext:value-type="float">
            <text:p>94</text:p>
          </table:table-cell>
          <table:table-cell table:formula="of:=IF([.E40]=1;1;(IF(MOD([.E40];2)=0;[.E40]/2;3*[.E40]+1)))" office:value-type="float" office:value="47" calcext:value-type="float">
            <text:p>47</text:p>
          </table:table-cell>
          <table:table-cell table:formula="of:=IF([.F40]=1;1;(IF(MOD([.F40];2)=0;[.F40]/2;3*[.F40]+1)))" office:value-type="float" office:value="142" calcext:value-type="float">
            <text:p>142</text:p>
          </table:table-cell>
          <table:table-cell table:formula="of:=IF([.G40]=1;1;(IF(MOD([.G40];2)=0;[.G40]/2;3*[.G40]+1)))" office:value-type="float" office:value="71" calcext:value-type="float">
            <text:p>71</text:p>
          </table:table-cell>
          <table:table-cell table:formula="of:=IF([.H40]=1;1;(IF(MOD([.H40];2)=0;[.H40]/2;3*[.H40]+1)))" office:value-type="float" office:value="214" calcext:value-type="float">
            <text:p>214</text:p>
          </table:table-cell>
          <table:table-cell table:formula="of:=IF([.I40]=1;1;(IF(MOD([.I40];2)=0;[.I40]/2;3*[.I40]+1)))" office:value-type="float" office:value="107" calcext:value-type="float">
            <text:p>107</text:p>
          </table:table-cell>
          <table:table-cell table:formula="of:=IF([.J40]=1;1;(IF(MOD([.J40];2)=0;[.J40]/2;3*[.J40]+1)))" office:value-type="float" office:value="322" calcext:value-type="float">
            <text:p>322</text:p>
          </table:table-cell>
          <table:table-cell table:formula="of:=IF([.K40]=1;1;(IF(MOD([.K40];2)=0;[.K40]/2;3*[.K40]+1)))" office:value-type="float" office:value="161" calcext:value-type="float">
            <text:p>161</text:p>
          </table:table-cell>
          <table:table-cell table:formula="of:=IF([.L40]=1;1;(IF(MOD([.L40];2)=0;[.L40]/2;3*[.L40]+1)))" office:value-type="float" office:value="484" calcext:value-type="float">
            <text:p>484</text:p>
          </table:table-cell>
          <table:table-cell table:formula="of:=IF([.M40]=1;1;(IF(MOD([.M40];2)=0;[.M40]/2;3*[.M40]+1)))" office:value-type="float" office:value="242" calcext:value-type="float">
            <text:p>242</text:p>
          </table:table-cell>
          <table:table-cell table:formula="of:=IF([.N40]=1;1;(IF(MOD([.N40];2)=0;[.N40]/2;3*[.N40]+1)))" office:value-type="float" office:value="121" calcext:value-type="float">
            <text:p>121</text:p>
          </table:table-cell>
          <table:table-cell table:formula="of:=IF([.O40]=1;1;(IF(MOD([.O40];2)=0;[.O40]/2;3*[.O40]+1)))" office:value-type="float" office:value="364" calcext:value-type="float">
            <text:p>364</text:p>
          </table:table-cell>
          <table:table-cell table:formula="of:=IF([.P40]=1;1;(IF(MOD([.P40];2)=0;[.P40]/2;3*[.P40]+1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41]=1;1;(IF(MOD([.A41];2)=0;[.A41]/2;3*[.A41]+1)))" office:value-type="float" office:value="21" calcext:value-type="float">
            <text:p>21</text:p>
          </table:table-cell>
          <table:table-cell table:formula="of:=IF([.B41]=1;1;(IF(MOD([.B41];2)=0;[.B41]/2;3*[.B41]+1)))" office:value-type="float" office:value="64" calcext:value-type="float">
            <text:p>64</text:p>
          </table:table-cell>
          <table:table-cell table:formula="of:=IF([.C41]=1;1;(IF(MOD([.C41];2)=0;[.C41]/2;3*[.C41]+1)))" office:value-type="float" office:value="32" calcext:value-type="float">
            <text:p>32</text:p>
          </table:table-cell>
          <table:table-cell table:formula="of:=IF([.D41]=1;1;(IF(MOD([.D41];2)=0;[.D41]/2;3*[.D41]+1)))" office:value-type="float" office:value="16" calcext:value-type="float">
            <text:p>16</text:p>
          </table:table-cell>
          <table:table-cell table:formula="of:=IF([.E41]=1;1;(IF(MOD([.E41];2)=0;[.E41]/2;3*[.E41]+1)))" office:value-type="float" office:value="8" calcext:value-type="float">
            <text:p>8</text:p>
          </table:table-cell>
          <table:table-cell table:formula="of:=IF([.F41]=1;1;(IF(MOD([.F41];2)=0;[.F41]/2;3*[.F41]+1)))" office:value-type="float" office:value="4" calcext:value-type="float">
            <text:p>4</text:p>
          </table:table-cell>
          <table:table-cell table:formula="of:=IF([.G41]=1;1;(IF(MOD([.G41];2)=0;[.G41]/2;3*[.G41]+1)))" office:value-type="float" office:value="2" calcext:value-type="float">
            <text:p>2</text:p>
          </table:table-cell>
          <table:table-cell table:formula="of:=IF([.H41]=1;1;(IF(MOD([.H41];2)=0;[.H41]/2;3*[.H41]+1)))" office:value-type="float" office:value="1" calcext:value-type="float">
            <text:p>1</text:p>
          </table:table-cell>
          <table:table-cell table:formula="of:=IF([.I41]=1;1;(IF(MOD([.I41];2)=0;[.I41]/2;3*[.I41]+1)))" office:value-type="float" office:value="1" calcext:value-type="float">
            <text:p>1</text:p>
          </table:table-cell>
          <table:table-cell table:formula="of:=IF([.J41]=1;1;(IF(MOD([.J41];2)=0;[.J41]/2;3*[.J41]+1)))" office:value-type="float" office:value="1" calcext:value-type="float">
            <text:p>1</text:p>
          </table:table-cell>
          <table:table-cell table:formula="of:=IF([.K41]=1;1;(IF(MOD([.K41];2)=0;[.K41]/2;3*[.K41]+1)))" office:value-type="float" office:value="1" calcext:value-type="float">
            <text:p>1</text:p>
          </table:table-cell>
          <table:table-cell table:formula="of:=IF([.L41]=1;1;(IF(MOD([.L41];2)=0;[.L41]/2;3*[.L41]+1)))" office:value-type="float" office:value="1" calcext:value-type="float">
            <text:p>1</text:p>
          </table:table-cell>
          <table:table-cell table:formula="of:=IF([.M41]=1;1;(IF(MOD([.M41];2)=0;[.M41]/2;3*[.M41]+1)))" office:value-type="float" office:value="1" calcext:value-type="float">
            <text:p>1</text:p>
          </table:table-cell>
          <table:table-cell table:formula="of:=IF([.N41]=1;1;(IF(MOD([.N41];2)=0;[.N41]/2;3*[.N41]+1)))" office:value-type="float" office:value="1" calcext:value-type="float">
            <text:p>1</text:p>
          </table:table-cell>
          <table:table-cell table:formula="of:=IF([.O41]=1;1;(IF(MOD([.O41];2)=0;[.O41]/2;3*[.O41]+1)))" office:value-type="float" office:value="1" calcext:value-type="float">
            <text:p>1</text:p>
          </table:table-cell>
          <table:table-cell table:formula="of:=IF([.P41]=1;1;(IF(MOD([.P41];2)=0;[.P41]/2;3*[.P4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42]=1;1;(IF(MOD([.A42];2)=0;[.A42]/2;3*[.A42]+1)))" office:value-type="float" office:value="130" calcext:value-type="float">
            <text:p>130</text:p>
          </table:table-cell>
          <table:table-cell table:formula="of:=IF([.B42]=1;1;(IF(MOD([.B42];2)=0;[.B42]/2;3*[.B42]+1)))" office:value-type="float" office:value="65" calcext:value-type="float">
            <text:p>65</text:p>
          </table:table-cell>
          <table:table-cell table:formula="of:=IF([.C42]=1;1;(IF(MOD([.C42];2)=0;[.C42]/2;3*[.C42]+1)))" office:value-type="float" office:value="196" calcext:value-type="float">
            <text:p>196</text:p>
          </table:table-cell>
          <table:table-cell table:formula="of:=IF([.D42]=1;1;(IF(MOD([.D42];2)=0;[.D42]/2;3*[.D42]+1)))" office:value-type="float" office:value="98" calcext:value-type="float">
            <text:p>98</text:p>
          </table:table-cell>
          <table:table-cell table:formula="of:=IF([.E42]=1;1;(IF(MOD([.E42];2)=0;[.E42]/2;3*[.E42]+1)))" office:value-type="float" office:value="49" calcext:value-type="float">
            <text:p>49</text:p>
          </table:table-cell>
          <table:table-cell table:formula="of:=IF([.F42]=1;1;(IF(MOD([.F42];2)=0;[.F42]/2;3*[.F42]+1)))" office:value-type="float" office:value="148" calcext:value-type="float">
            <text:p>148</text:p>
          </table:table-cell>
          <table:table-cell table:formula="of:=IF([.G42]=1;1;(IF(MOD([.G42];2)=0;[.G42]/2;3*[.G42]+1)))" office:value-type="float" office:value="74" calcext:value-type="float">
            <text:p>74</text:p>
          </table:table-cell>
          <table:table-cell table:formula="of:=IF([.H42]=1;1;(IF(MOD([.H42];2)=0;[.H42]/2;3*[.H42]+1)))" office:value-type="float" office:value="37" calcext:value-type="float">
            <text:p>37</text:p>
          </table:table-cell>
          <table:table-cell table:formula="of:=IF([.I42]=1;1;(IF(MOD([.I42];2)=0;[.I42]/2;3*[.I42]+1)))" office:value-type="float" office:value="112" calcext:value-type="float">
            <text:p>112</text:p>
          </table:table-cell>
          <table:table-cell table:formula="of:=IF([.J42]=1;1;(IF(MOD([.J42];2)=0;[.J42]/2;3*[.J42]+1)))" office:value-type="float" office:value="56" calcext:value-type="float">
            <text:p>56</text:p>
          </table:table-cell>
          <table:table-cell table:formula="of:=IF([.K42]=1;1;(IF(MOD([.K42];2)=0;[.K42]/2;3*[.K42]+1)))" office:value-type="float" office:value="28" calcext:value-type="float">
            <text:p>28</text:p>
          </table:table-cell>
          <table:table-cell table:formula="of:=IF([.L42]=1;1;(IF(MOD([.L42];2)=0;[.L42]/2;3*[.L42]+1)))" office:value-type="float" office:value="14" calcext:value-type="float">
            <text:p>14</text:p>
          </table:table-cell>
          <table:table-cell table:formula="of:=IF([.M42]=1;1;(IF(MOD([.M42];2)=0;[.M42]/2;3*[.M42]+1)))" office:value-type="float" office:value="7" calcext:value-type="float">
            <text:p>7</text:p>
          </table:table-cell>
          <table:table-cell table:formula="of:=IF([.N42]=1;1;(IF(MOD([.N42];2)=0;[.N42]/2;3*[.N42]+1)))" office:value-type="float" office:value="22" calcext:value-type="float">
            <text:p>22</text:p>
          </table:table-cell>
          <table:table-cell table:formula="of:=IF([.O42]=1;1;(IF(MOD([.O42];2)=0;[.O42]/2;3*[.O42]+1)))" office:value-type="float" office:value="11" calcext:value-type="float">
            <text:p>11</text:p>
          </table:table-cell>
          <table:table-cell table:formula="of:=IF([.P42]=1;1;(IF(MOD([.P42];2)=0;[.P42]/2;3*[.P42]+1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43]=1;1;(IF(MOD([.A43];2)=0;[.A43]/2;3*[.A43]+1)))" office:value-type="float" office:value="22" calcext:value-type="float">
            <text:p>22</text:p>
          </table:table-cell>
          <table:table-cell table:formula="of:=IF([.B43]=1;1;(IF(MOD([.B43];2)=0;[.B43]/2;3*[.B43]+1)))" office:value-type="float" office:value="11" calcext:value-type="float">
            <text:p>11</text:p>
          </table:table-cell>
          <table:table-cell table:formula="of:=IF([.C43]=1;1;(IF(MOD([.C43];2)=0;[.C43]/2;3*[.C43]+1)))" office:value-type="float" office:value="34" calcext:value-type="float">
            <text:p>34</text:p>
          </table:table-cell>
          <table:table-cell table:formula="of:=IF([.D43]=1;1;(IF(MOD([.D43];2)=0;[.D43]/2;3*[.D43]+1)))" office:value-type="float" office:value="17" calcext:value-type="float">
            <text:p>17</text:p>
          </table:table-cell>
          <table:table-cell table:formula="of:=IF([.E43]=1;1;(IF(MOD([.E43];2)=0;[.E43]/2;3*[.E43]+1)))" office:value-type="float" office:value="52" calcext:value-type="float">
            <text:p>52</text:p>
          </table:table-cell>
          <table:table-cell table:formula="of:=IF([.F43]=1;1;(IF(MOD([.F43];2)=0;[.F43]/2;3*[.F43]+1)))" office:value-type="float" office:value="26" calcext:value-type="float">
            <text:p>26</text:p>
          </table:table-cell>
          <table:table-cell table:formula="of:=IF([.G43]=1;1;(IF(MOD([.G43];2)=0;[.G43]/2;3*[.G43]+1)))" office:value-type="float" office:value="13" calcext:value-type="float">
            <text:p>13</text:p>
          </table:table-cell>
          <table:table-cell table:formula="of:=IF([.H43]=1;1;(IF(MOD([.H43];2)=0;[.H43]/2;3*[.H43]+1)))" office:value-type="float" office:value="40" calcext:value-type="float">
            <text:p>40</text:p>
          </table:table-cell>
          <table:table-cell table:formula="of:=IF([.I43]=1;1;(IF(MOD([.I43];2)=0;[.I43]/2;3*[.I43]+1)))" office:value-type="float" office:value="20" calcext:value-type="float">
            <text:p>20</text:p>
          </table:table-cell>
          <table:table-cell table:formula="of:=IF([.J43]=1;1;(IF(MOD([.J43];2)=0;[.J43]/2;3*[.J43]+1)))" office:value-type="float" office:value="10" calcext:value-type="float">
            <text:p>10</text:p>
          </table:table-cell>
          <table:table-cell table:formula="of:=IF([.K43]=1;1;(IF(MOD([.K43];2)=0;[.K43]/2;3*[.K43]+1)))" office:value-type="float" office:value="5" calcext:value-type="float">
            <text:p>5</text:p>
          </table:table-cell>
          <table:table-cell table:formula="of:=IF([.L43]=1;1;(IF(MOD([.L43];2)=0;[.L43]/2;3*[.L43]+1)))" office:value-type="float" office:value="16" calcext:value-type="float">
            <text:p>16</text:p>
          </table:table-cell>
          <table:table-cell table:formula="of:=IF([.M43]=1;1;(IF(MOD([.M43];2)=0;[.M43]/2;3*[.M43]+1)))" office:value-type="float" office:value="8" calcext:value-type="float">
            <text:p>8</text:p>
          </table:table-cell>
          <table:table-cell table:formula="of:=IF([.N43]=1;1;(IF(MOD([.N43];2)=0;[.N43]/2;3*[.N43]+1)))" office:value-type="float" office:value="4" calcext:value-type="float">
            <text:p>4</text:p>
          </table:table-cell>
          <table:table-cell table:formula="of:=IF([.O43]=1;1;(IF(MOD([.O43];2)=0;[.O43]/2;3*[.O43]+1)))" office:value-type="float" office:value="2" calcext:value-type="float">
            <text:p>2</text:p>
          </table:table-cell>
          <table:table-cell table:formula="of:=IF([.P43]=1;1;(IF(MOD([.P43];2)=0;[.P43]/2;3*[.P43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44]=1;1;(IF(MOD([.A44];2)=0;[.A44]/2;3*[.A44]+1)))" office:value-type="float" office:value="136" calcext:value-type="float">
            <text:p>136</text:p>
          </table:table-cell>
          <table:table-cell table:formula="of:=IF([.B44]=1;1;(IF(MOD([.B44];2)=0;[.B44]/2;3*[.B44]+1)))" office:value-type="float" office:value="68" calcext:value-type="float">
            <text:p>68</text:p>
          </table:table-cell>
          <table:table-cell table:formula="of:=IF([.C44]=1;1;(IF(MOD([.C44];2)=0;[.C44]/2;3*[.C44]+1)))" office:value-type="float" office:value="34" calcext:value-type="float">
            <text:p>34</text:p>
          </table:table-cell>
          <table:table-cell table:formula="of:=IF([.D44]=1;1;(IF(MOD([.D44];2)=0;[.D44]/2;3*[.D44]+1)))" office:value-type="float" office:value="17" calcext:value-type="float">
            <text:p>17</text:p>
          </table:table-cell>
          <table:table-cell table:formula="of:=IF([.E44]=1;1;(IF(MOD([.E44];2)=0;[.E44]/2;3*[.E44]+1)))" office:value-type="float" office:value="52" calcext:value-type="float">
            <text:p>52</text:p>
          </table:table-cell>
          <table:table-cell table:formula="of:=IF([.F44]=1;1;(IF(MOD([.F44];2)=0;[.F44]/2;3*[.F44]+1)))" office:value-type="float" office:value="26" calcext:value-type="float">
            <text:p>26</text:p>
          </table:table-cell>
          <table:table-cell table:formula="of:=IF([.G44]=1;1;(IF(MOD([.G44];2)=0;[.G44]/2;3*[.G44]+1)))" office:value-type="float" office:value="13" calcext:value-type="float">
            <text:p>13</text:p>
          </table:table-cell>
          <table:table-cell table:formula="of:=IF([.H44]=1;1;(IF(MOD([.H44];2)=0;[.H44]/2;3*[.H44]+1)))" office:value-type="float" office:value="40" calcext:value-type="float">
            <text:p>40</text:p>
          </table:table-cell>
          <table:table-cell table:formula="of:=IF([.I44]=1;1;(IF(MOD([.I44];2)=0;[.I44]/2;3*[.I44]+1)))" office:value-type="float" office:value="20" calcext:value-type="float">
            <text:p>20</text:p>
          </table:table-cell>
          <table:table-cell table:formula="of:=IF([.J44]=1;1;(IF(MOD([.J44];2)=0;[.J44]/2;3*[.J44]+1)))" office:value-type="float" office:value="10" calcext:value-type="float">
            <text:p>10</text:p>
          </table:table-cell>
          <table:table-cell table:formula="of:=IF([.K44]=1;1;(IF(MOD([.K44];2)=0;[.K44]/2;3*[.K44]+1)))" office:value-type="float" office:value="5" calcext:value-type="float">
            <text:p>5</text:p>
          </table:table-cell>
          <table:table-cell table:formula="of:=IF([.L44]=1;1;(IF(MOD([.L44];2)=0;[.L44]/2;3*[.L44]+1)))" office:value-type="float" office:value="16" calcext:value-type="float">
            <text:p>16</text:p>
          </table:table-cell>
          <table:table-cell table:formula="of:=IF([.M44]=1;1;(IF(MOD([.M44];2)=0;[.M44]/2;3*[.M44]+1)))" office:value-type="float" office:value="8" calcext:value-type="float">
            <text:p>8</text:p>
          </table:table-cell>
          <table:table-cell table:formula="of:=IF([.N44]=1;1;(IF(MOD([.N44];2)=0;[.N44]/2;3*[.N44]+1)))" office:value-type="float" office:value="4" calcext:value-type="float">
            <text:p>4</text:p>
          </table:table-cell>
          <table:table-cell table:formula="of:=IF([.O44]=1;1;(IF(MOD([.O44];2)=0;[.O44]/2;3*[.O44]+1)))" office:value-type="float" office:value="2" calcext:value-type="float">
            <text:p>2</text:p>
          </table:table-cell>
          <table:table-cell table:formula="of:=IF([.P44]=1;1;(IF(MOD([.P44];2)=0;[.P44]/2;3*[.P44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45]=1;1;(IF(MOD([.A45];2)=0;[.A45]/2;3*[.A45]+1)))" office:value-type="float" office:value="23" calcext:value-type="float">
            <text:p>23</text:p>
          </table:table-cell>
          <table:table-cell table:formula="of:=IF([.B45]=1;1;(IF(MOD([.B45];2)=0;[.B45]/2;3*[.B45]+1)))" office:value-type="float" office:value="70" calcext:value-type="float">
            <text:p>70</text:p>
          </table:table-cell>
          <table:table-cell table:formula="of:=IF([.C45]=1;1;(IF(MOD([.C45];2)=0;[.C45]/2;3*[.C45]+1)))" office:value-type="float" office:value="35" calcext:value-type="float">
            <text:p>35</text:p>
          </table:table-cell>
          <table:table-cell table:formula="of:=IF([.D45]=1;1;(IF(MOD([.D45];2)=0;[.D45]/2;3*[.D45]+1)))" office:value-type="float" office:value="106" calcext:value-type="float">
            <text:p>106</text:p>
          </table:table-cell>
          <table:table-cell table:formula="of:=IF([.E45]=1;1;(IF(MOD([.E45];2)=0;[.E45]/2;3*[.E45]+1)))" office:value-type="float" office:value="53" calcext:value-type="float">
            <text:p>53</text:p>
          </table:table-cell>
          <table:table-cell table:formula="of:=IF([.F45]=1;1;(IF(MOD([.F45];2)=0;[.F45]/2;3*[.F45]+1)))" office:value-type="float" office:value="160" calcext:value-type="float">
            <text:p>160</text:p>
          </table:table-cell>
          <table:table-cell table:formula="of:=IF([.G45]=1;1;(IF(MOD([.G45];2)=0;[.G45]/2;3*[.G45]+1)))" office:value-type="float" office:value="80" calcext:value-type="float">
            <text:p>80</text:p>
          </table:table-cell>
          <table:table-cell table:formula="of:=IF([.H45]=1;1;(IF(MOD([.H45];2)=0;[.H45]/2;3*[.H45]+1)))" office:value-type="float" office:value="40" calcext:value-type="float">
            <text:p>40</text:p>
          </table:table-cell>
          <table:table-cell table:formula="of:=IF([.I45]=1;1;(IF(MOD([.I45];2)=0;[.I45]/2;3*[.I45]+1)))" office:value-type="float" office:value="20" calcext:value-type="float">
            <text:p>20</text:p>
          </table:table-cell>
          <table:table-cell table:formula="of:=IF([.J45]=1;1;(IF(MOD([.J45];2)=0;[.J45]/2;3*[.J45]+1)))" office:value-type="float" office:value="10" calcext:value-type="float">
            <text:p>10</text:p>
          </table:table-cell>
          <table:table-cell table:formula="of:=IF([.K45]=1;1;(IF(MOD([.K45];2)=0;[.K45]/2;3*[.K45]+1)))" office:value-type="float" office:value="5" calcext:value-type="float">
            <text:p>5</text:p>
          </table:table-cell>
          <table:table-cell table:formula="of:=IF([.L45]=1;1;(IF(MOD([.L45];2)=0;[.L45]/2;3*[.L45]+1)))" office:value-type="float" office:value="16" calcext:value-type="float">
            <text:p>16</text:p>
          </table:table-cell>
          <table:table-cell table:formula="of:=IF([.M45]=1;1;(IF(MOD([.M45];2)=0;[.M45]/2;3*[.M45]+1)))" office:value-type="float" office:value="8" calcext:value-type="float">
            <text:p>8</text:p>
          </table:table-cell>
          <table:table-cell table:formula="of:=IF([.N45]=1;1;(IF(MOD([.N45];2)=0;[.N45]/2;3*[.N45]+1)))" office:value-type="float" office:value="4" calcext:value-type="float">
            <text:p>4</text:p>
          </table:table-cell>
          <table:table-cell table:formula="of:=IF([.O45]=1;1;(IF(MOD([.O45];2)=0;[.O45]/2;3*[.O45]+1)))" office:value-type="float" office:value="2" calcext:value-type="float">
            <text:p>2</text:p>
          </table:table-cell>
          <table:table-cell table:formula="of:=IF([.P45]=1;1;(IF(MOD([.P45];2)=0;[.P45]/2;3*[.P45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46]=1;1;(IF(MOD([.A46];2)=0;[.A46]/2;3*[.A46]+1)))" office:value-type="float" office:value="142" calcext:value-type="float">
            <text:p>142</text:p>
          </table:table-cell>
          <table:table-cell table:formula="of:=IF([.B46]=1;1;(IF(MOD([.B46];2)=0;[.B46]/2;3*[.B46]+1)))" office:value-type="float" office:value="71" calcext:value-type="float">
            <text:p>71</text:p>
          </table:table-cell>
          <table:table-cell table:formula="of:=IF([.C46]=1;1;(IF(MOD([.C46];2)=0;[.C46]/2;3*[.C46]+1)))" office:value-type="float" office:value="214" calcext:value-type="float">
            <text:p>214</text:p>
          </table:table-cell>
          <table:table-cell table:formula="of:=IF([.D46]=1;1;(IF(MOD([.D46];2)=0;[.D46]/2;3*[.D46]+1)))" office:value-type="float" office:value="107" calcext:value-type="float">
            <text:p>107</text:p>
          </table:table-cell>
          <table:table-cell table:formula="of:=IF([.E46]=1;1;(IF(MOD([.E46];2)=0;[.E46]/2;3*[.E46]+1)))" office:value-type="float" office:value="322" calcext:value-type="float">
            <text:p>322</text:p>
          </table:table-cell>
          <table:table-cell table:formula="of:=IF([.F46]=1;1;(IF(MOD([.F46];2)=0;[.F46]/2;3*[.F46]+1)))" office:value-type="float" office:value="161" calcext:value-type="float">
            <text:p>161</text:p>
          </table:table-cell>
          <table:table-cell table:formula="of:=IF([.G46]=1;1;(IF(MOD([.G46];2)=0;[.G46]/2;3*[.G46]+1)))" office:value-type="float" office:value="484" calcext:value-type="float">
            <text:p>484</text:p>
          </table:table-cell>
          <table:table-cell table:formula="of:=IF([.H46]=1;1;(IF(MOD([.H46];2)=0;[.H46]/2;3*[.H46]+1)))" office:value-type="float" office:value="242" calcext:value-type="float">
            <text:p>242</text:p>
          </table:table-cell>
          <table:table-cell table:formula="of:=IF([.I46]=1;1;(IF(MOD([.I46];2)=0;[.I46]/2;3*[.I46]+1)))" office:value-type="float" office:value="121" calcext:value-type="float">
            <text:p>121</text:p>
          </table:table-cell>
          <table:table-cell table:formula="of:=IF([.J46]=1;1;(IF(MOD([.J46];2)=0;[.J46]/2;3*[.J46]+1)))" office:value-type="float" office:value="364" calcext:value-type="float">
            <text:p>364</text:p>
          </table:table-cell>
          <table:table-cell table:formula="of:=IF([.K46]=1;1;(IF(MOD([.K46];2)=0;[.K46]/2;3*[.K46]+1)))" office:value-type="float" office:value="182" calcext:value-type="float">
            <text:p>182</text:p>
          </table:table-cell>
          <table:table-cell table:formula="of:=IF([.L46]=1;1;(IF(MOD([.L46];2)=0;[.L46]/2;3*[.L46]+1)))" office:value-type="float" office:value="91" calcext:value-type="float">
            <text:p>91</text:p>
          </table:table-cell>
          <table:table-cell table:formula="of:=IF([.M46]=1;1;(IF(MOD([.M46];2)=0;[.M46]/2;3*[.M46]+1)))" office:value-type="float" office:value="274" calcext:value-type="float">
            <text:p>274</text:p>
          </table:table-cell>
          <table:table-cell table:formula="of:=IF([.N46]=1;1;(IF(MOD([.N46];2)=0;[.N46]/2;3*[.N46]+1)))" office:value-type="float" office:value="137" calcext:value-type="float">
            <text:p>137</text:p>
          </table:table-cell>
          <table:table-cell table:formula="of:=IF([.O46]=1;1;(IF(MOD([.O46];2)=0;[.O46]/2;3*[.O46]+1)))" office:value-type="float" office:value="412" calcext:value-type="float">
            <text:p>412</text:p>
          </table:table-cell>
          <table:table-cell table:formula="of:=IF([.P46]=1;1;(IF(MOD([.P46];2)=0;[.P46]/2;3*[.P46]+1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47]=1;1;(IF(MOD([.A47];2)=0;[.A47]/2;3*[.A47]+1)))" office:value-type="float" office:value="24" calcext:value-type="float">
            <text:p>24</text:p>
          </table:table-cell>
          <table:table-cell table:formula="of:=IF([.B47]=1;1;(IF(MOD([.B47];2)=0;[.B47]/2;3*[.B47]+1)))" office:value-type="float" office:value="12" calcext:value-type="float">
            <text:p>12</text:p>
          </table:table-cell>
          <table:table-cell table:formula="of:=IF([.C47]=1;1;(IF(MOD([.C47];2)=0;[.C47]/2;3*[.C47]+1)))" office:value-type="float" office:value="6" calcext:value-type="float">
            <text:p>6</text:p>
          </table:table-cell>
          <table:table-cell table:formula="of:=IF([.D47]=1;1;(IF(MOD([.D47];2)=0;[.D47]/2;3*[.D47]+1)))" office:value-type="float" office:value="3" calcext:value-type="float">
            <text:p>3</text:p>
          </table:table-cell>
          <table:table-cell table:formula="of:=IF([.E47]=1;1;(IF(MOD([.E47];2)=0;[.E47]/2;3*[.E47]+1)))" office:value-type="float" office:value="10" calcext:value-type="float">
            <text:p>10</text:p>
          </table:table-cell>
          <table:table-cell table:formula="of:=IF([.F47]=1;1;(IF(MOD([.F47];2)=0;[.F47]/2;3*[.F47]+1)))" office:value-type="float" office:value="5" calcext:value-type="float">
            <text:p>5</text:p>
          </table:table-cell>
          <table:table-cell table:formula="of:=IF([.G47]=1;1;(IF(MOD([.G47];2)=0;[.G47]/2;3*[.G47]+1)))" office:value-type="float" office:value="16" calcext:value-type="float">
            <text:p>16</text:p>
          </table:table-cell>
          <table:table-cell table:formula="of:=IF([.H47]=1;1;(IF(MOD([.H47];2)=0;[.H47]/2;3*[.H47]+1)))" office:value-type="float" office:value="8" calcext:value-type="float">
            <text:p>8</text:p>
          </table:table-cell>
          <table:table-cell table:formula="of:=IF([.I47]=1;1;(IF(MOD([.I47];2)=0;[.I47]/2;3*[.I47]+1)))" office:value-type="float" office:value="4" calcext:value-type="float">
            <text:p>4</text:p>
          </table:table-cell>
          <table:table-cell table:formula="of:=IF([.J47]=1;1;(IF(MOD([.J47];2)=0;[.J47]/2;3*[.J47]+1)))" office:value-type="float" office:value="2" calcext:value-type="float">
            <text:p>2</text:p>
          </table:table-cell>
          <table:table-cell table:formula="of:=IF([.K47]=1;1;(IF(MOD([.K47];2)=0;[.K47]/2;3*[.K47]+1)))" office:value-type="float" office:value="1" calcext:value-type="float">
            <text:p>1</text:p>
          </table:table-cell>
          <table:table-cell table:formula="of:=IF([.L47]=1;1;(IF(MOD([.L47];2)=0;[.L47]/2;3*[.L47]+1)))" office:value-type="float" office:value="1" calcext:value-type="float">
            <text:p>1</text:p>
          </table:table-cell>
          <table:table-cell table:formula="of:=IF([.M47]=1;1;(IF(MOD([.M47];2)=0;[.M47]/2;3*[.M47]+1)))" office:value-type="float" office:value="1" calcext:value-type="float">
            <text:p>1</text:p>
          </table:table-cell>
          <table:table-cell table:formula="of:=IF([.N47]=1;1;(IF(MOD([.N47];2)=0;[.N47]/2;3*[.N47]+1)))" office:value-type="float" office:value="1" calcext:value-type="float">
            <text:p>1</text:p>
          </table:table-cell>
          <table:table-cell table:formula="of:=IF([.O47]=1;1;(IF(MOD([.O47];2)=0;[.O47]/2;3*[.O47]+1)))" office:value-type="float" office:value="1" calcext:value-type="float">
            <text:p>1</text:p>
          </table:table-cell>
          <table:table-cell table:formula="of:=IF([.P47]=1;1;(IF(MOD([.P47];2)=0;[.P47]/2;3*[.P47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48]=1;1;(IF(MOD([.A48];2)=0;[.A48]/2;3*[.A48]+1)))" office:value-type="float" office:value="148" calcext:value-type="float">
            <text:p>148</text:p>
          </table:table-cell>
          <table:table-cell table:formula="of:=IF([.B48]=1;1;(IF(MOD([.B48];2)=0;[.B48]/2;3*[.B48]+1)))" office:value-type="float" office:value="74" calcext:value-type="float">
            <text:p>74</text:p>
          </table:table-cell>
          <table:table-cell table:formula="of:=IF([.C48]=1;1;(IF(MOD([.C48];2)=0;[.C48]/2;3*[.C48]+1)))" office:value-type="float" office:value="37" calcext:value-type="float">
            <text:p>37</text:p>
          </table:table-cell>
          <table:table-cell table:formula="of:=IF([.D48]=1;1;(IF(MOD([.D48];2)=0;[.D48]/2;3*[.D48]+1)))" office:value-type="float" office:value="112" calcext:value-type="float">
            <text:p>112</text:p>
          </table:table-cell>
          <table:table-cell table:formula="of:=IF([.E48]=1;1;(IF(MOD([.E48];2)=0;[.E48]/2;3*[.E48]+1)))" office:value-type="float" office:value="56" calcext:value-type="float">
            <text:p>56</text:p>
          </table:table-cell>
          <table:table-cell table:formula="of:=IF([.F48]=1;1;(IF(MOD([.F48];2)=0;[.F48]/2;3*[.F48]+1)))" office:value-type="float" office:value="28" calcext:value-type="float">
            <text:p>28</text:p>
          </table:table-cell>
          <table:table-cell table:formula="of:=IF([.G48]=1;1;(IF(MOD([.G48];2)=0;[.G48]/2;3*[.G48]+1)))" office:value-type="float" office:value="14" calcext:value-type="float">
            <text:p>14</text:p>
          </table:table-cell>
          <table:table-cell table:formula="of:=IF([.H48]=1;1;(IF(MOD([.H48];2)=0;[.H48]/2;3*[.H48]+1)))" office:value-type="float" office:value="7" calcext:value-type="float">
            <text:p>7</text:p>
          </table:table-cell>
          <table:table-cell table:formula="of:=IF([.I48]=1;1;(IF(MOD([.I48];2)=0;[.I48]/2;3*[.I48]+1)))" office:value-type="float" office:value="22" calcext:value-type="float">
            <text:p>22</text:p>
          </table:table-cell>
          <table:table-cell table:formula="of:=IF([.J48]=1;1;(IF(MOD([.J48];2)=0;[.J48]/2;3*[.J48]+1)))" office:value-type="float" office:value="11" calcext:value-type="float">
            <text:p>11</text:p>
          </table:table-cell>
          <table:table-cell table:formula="of:=IF([.K48]=1;1;(IF(MOD([.K48];2)=0;[.K48]/2;3*[.K48]+1)))" office:value-type="float" office:value="34" calcext:value-type="float">
            <text:p>34</text:p>
          </table:table-cell>
          <table:table-cell table:formula="of:=IF([.L48]=1;1;(IF(MOD([.L48];2)=0;[.L48]/2;3*[.L48]+1)))" office:value-type="float" office:value="17" calcext:value-type="float">
            <text:p>17</text:p>
          </table:table-cell>
          <table:table-cell table:formula="of:=IF([.M48]=1;1;(IF(MOD([.M48];2)=0;[.M48]/2;3*[.M48]+1)))" office:value-type="float" office:value="52" calcext:value-type="float">
            <text:p>52</text:p>
          </table:table-cell>
          <table:table-cell table:formula="of:=IF([.N48]=1;1;(IF(MOD([.N48];2)=0;[.N48]/2;3*[.N48]+1)))" office:value-type="float" office:value="26" calcext:value-type="float">
            <text:p>26</text:p>
          </table:table-cell>
          <table:table-cell table:formula="of:=IF([.O48]=1;1;(IF(MOD([.O48];2)=0;[.O48]/2;3*[.O48]+1)))" office:value-type="float" office:value="13" calcext:value-type="float">
            <text:p>13</text:p>
          </table:table-cell>
          <table:table-cell table:formula="of:=IF([.P48]=1;1;(IF(MOD([.P48];2)=0;[.P48]/2;3*[.P48]+1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49]=1;1;(IF(MOD([.A49];2)=0;[.A49]/2;3*[.A49]+1)))" office:value-type="float" office:value="25" calcext:value-type="float">
            <text:p>25</text:p>
          </table:table-cell>
          <table:table-cell table:formula="of:=IF([.B49]=1;1;(IF(MOD([.B49];2)=0;[.B49]/2;3*[.B49]+1)))" office:value-type="float" office:value="76" calcext:value-type="float">
            <text:p>76</text:p>
          </table:table-cell>
          <table:table-cell table:formula="of:=IF([.C49]=1;1;(IF(MOD([.C49];2)=0;[.C49]/2;3*[.C49]+1)))" office:value-type="float" office:value="38" calcext:value-type="float">
            <text:p>38</text:p>
          </table:table-cell>
          <table:table-cell table:formula="of:=IF([.D49]=1;1;(IF(MOD([.D49];2)=0;[.D49]/2;3*[.D49]+1)))" office:value-type="float" office:value="19" calcext:value-type="float">
            <text:p>19</text:p>
          </table:table-cell>
          <table:table-cell table:formula="of:=IF([.E49]=1;1;(IF(MOD([.E49];2)=0;[.E49]/2;3*[.E49]+1)))" office:value-type="float" office:value="58" calcext:value-type="float">
            <text:p>58</text:p>
          </table:table-cell>
          <table:table-cell table:formula="of:=IF([.F49]=1;1;(IF(MOD([.F49];2)=0;[.F49]/2;3*[.F49]+1)))" office:value-type="float" office:value="29" calcext:value-type="float">
            <text:p>29</text:p>
          </table:table-cell>
          <table:table-cell table:formula="of:=IF([.G49]=1;1;(IF(MOD([.G49];2)=0;[.G49]/2;3*[.G49]+1)))" office:value-type="float" office:value="88" calcext:value-type="float">
            <text:p>88</text:p>
          </table:table-cell>
          <table:table-cell table:formula="of:=IF([.H49]=1;1;(IF(MOD([.H49];2)=0;[.H49]/2;3*[.H49]+1)))" office:value-type="float" office:value="44" calcext:value-type="float">
            <text:p>44</text:p>
          </table:table-cell>
          <table:table-cell table:formula="of:=IF([.I49]=1;1;(IF(MOD([.I49];2)=0;[.I49]/2;3*[.I49]+1)))" office:value-type="float" office:value="22" calcext:value-type="float">
            <text:p>22</text:p>
          </table:table-cell>
          <table:table-cell table:formula="of:=IF([.J49]=1;1;(IF(MOD([.J49];2)=0;[.J49]/2;3*[.J49]+1)))" office:value-type="float" office:value="11" calcext:value-type="float">
            <text:p>11</text:p>
          </table:table-cell>
          <table:table-cell table:formula="of:=IF([.K49]=1;1;(IF(MOD([.K49];2)=0;[.K49]/2;3*[.K49]+1)))" office:value-type="float" office:value="34" calcext:value-type="float">
            <text:p>34</text:p>
          </table:table-cell>
          <table:table-cell table:formula="of:=IF([.L49]=1;1;(IF(MOD([.L49];2)=0;[.L49]/2;3*[.L49]+1)))" office:value-type="float" office:value="17" calcext:value-type="float">
            <text:p>17</text:p>
          </table:table-cell>
          <table:table-cell table:formula="of:=IF([.M49]=1;1;(IF(MOD([.M49];2)=0;[.M49]/2;3*[.M49]+1)))" office:value-type="float" office:value="52" calcext:value-type="float">
            <text:p>52</text:p>
          </table:table-cell>
          <table:table-cell table:formula="of:=IF([.N49]=1;1;(IF(MOD([.N49];2)=0;[.N49]/2;3*[.N49]+1)))" office:value-type="float" office:value="26" calcext:value-type="float">
            <text:p>26</text:p>
          </table:table-cell>
          <table:table-cell table:formula="of:=IF([.O49]=1;1;(IF(MOD([.O49];2)=0;[.O49]/2;3*[.O49]+1)))" office:value-type="float" office:value="13" calcext:value-type="float">
            <text:p>13</text:p>
          </table:table-cell>
          <table:table-cell table:formula="of:=IF([.P49]=1;1;(IF(MOD([.P49];2)=0;[.P49]/2;3*[.P49]+1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50]=1;1;(IF(MOD([.A50];2)=0;[.A50]/2;3*[.A50]+1)))" office:value-type="float" office:value="154" calcext:value-type="float">
            <text:p>154</text:p>
          </table:table-cell>
          <table:table-cell table:formula="of:=IF([.B50]=1;1;(IF(MOD([.B50];2)=0;[.B50]/2;3*[.B50]+1)))" office:value-type="float" office:value="77" calcext:value-type="float">
            <text:p>77</text:p>
          </table:table-cell>
          <table:table-cell table:formula="of:=IF([.C50]=1;1;(IF(MOD([.C50];2)=0;[.C50]/2;3*[.C50]+1)))" office:value-type="float" office:value="232" calcext:value-type="float">
            <text:p>232</text:p>
          </table:table-cell>
          <table:table-cell table:formula="of:=IF([.D50]=1;1;(IF(MOD([.D50];2)=0;[.D50]/2;3*[.D50]+1)))" office:value-type="float" office:value="116" calcext:value-type="float">
            <text:p>116</text:p>
          </table:table-cell>
          <table:table-cell table:formula="of:=IF([.E50]=1;1;(IF(MOD([.E50];2)=0;[.E50]/2;3*[.E50]+1)))" office:value-type="float" office:value="58" calcext:value-type="float">
            <text:p>58</text:p>
          </table:table-cell>
          <table:table-cell table:formula="of:=IF([.F50]=1;1;(IF(MOD([.F50];2)=0;[.F50]/2;3*[.F50]+1)))" office:value-type="float" office:value="29" calcext:value-type="float">
            <text:p>29</text:p>
          </table:table-cell>
          <table:table-cell table:formula="of:=IF([.G50]=1;1;(IF(MOD([.G50];2)=0;[.G50]/2;3*[.G50]+1)))" office:value-type="float" office:value="88" calcext:value-type="float">
            <text:p>88</text:p>
          </table:table-cell>
          <table:table-cell table:formula="of:=IF([.H50]=1;1;(IF(MOD([.H50];2)=0;[.H50]/2;3*[.H50]+1)))" office:value-type="float" office:value="44" calcext:value-type="float">
            <text:p>44</text:p>
          </table:table-cell>
          <table:table-cell table:formula="of:=IF([.I50]=1;1;(IF(MOD([.I50];2)=0;[.I50]/2;3*[.I50]+1)))" office:value-type="float" office:value="22" calcext:value-type="float">
            <text:p>22</text:p>
          </table:table-cell>
          <table:table-cell table:formula="of:=IF([.J50]=1;1;(IF(MOD([.J50];2)=0;[.J50]/2;3*[.J50]+1)))" office:value-type="float" office:value="11" calcext:value-type="float">
            <text:p>11</text:p>
          </table:table-cell>
          <table:table-cell table:formula="of:=IF([.K50]=1;1;(IF(MOD([.K50];2)=0;[.K50]/2;3*[.K50]+1)))" office:value-type="float" office:value="34" calcext:value-type="float">
            <text:p>34</text:p>
          </table:table-cell>
          <table:table-cell table:formula="of:=IF([.L50]=1;1;(IF(MOD([.L50];2)=0;[.L50]/2;3*[.L50]+1)))" office:value-type="float" office:value="17" calcext:value-type="float">
            <text:p>17</text:p>
          </table:table-cell>
          <table:table-cell table:formula="of:=IF([.M50]=1;1;(IF(MOD([.M50];2)=0;[.M50]/2;3*[.M50]+1)))" office:value-type="float" office:value="52" calcext:value-type="float">
            <text:p>52</text:p>
          </table:table-cell>
          <table:table-cell table:formula="of:=IF([.N50]=1;1;(IF(MOD([.N50];2)=0;[.N50]/2;3*[.N50]+1)))" office:value-type="float" office:value="26" calcext:value-type="float">
            <text:p>26</text:p>
          </table:table-cell>
          <table:table-cell table:formula="of:=IF([.O50]=1;1;(IF(MOD([.O50];2)=0;[.O50]/2;3*[.O50]+1)))" office:value-type="float" office:value="13" calcext:value-type="float">
            <text:p>13</text:p>
          </table:table-cell>
          <table:table-cell table:formula="of:=IF([.P50]=1;1;(IF(MOD([.P50];2)=0;[.P50]/2;3*[.P50]+1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51]=1;1;(IF(MOD([.A51];2)=0;[.A51]/2;3*[.A51]+1)))" office:value-type="float" office:value="26" calcext:value-type="float">
            <text:p>26</text:p>
          </table:table-cell>
          <table:table-cell table:formula="of:=IF([.B51]=1;1;(IF(MOD([.B51];2)=0;[.B51]/2;3*[.B51]+1)))" office:value-type="float" office:value="13" calcext:value-type="float">
            <text:p>13</text:p>
          </table:table-cell>
          <table:table-cell table:formula="of:=IF([.C51]=1;1;(IF(MOD([.C51];2)=0;[.C51]/2;3*[.C51]+1)))" office:value-type="float" office:value="40" calcext:value-type="float">
            <text:p>40</text:p>
          </table:table-cell>
          <table:table-cell table:formula="of:=IF([.D51]=1;1;(IF(MOD([.D51];2)=0;[.D51]/2;3*[.D51]+1)))" office:value-type="float" office:value="20" calcext:value-type="float">
            <text:p>20</text:p>
          </table:table-cell>
          <table:table-cell table:formula="of:=IF([.E51]=1;1;(IF(MOD([.E51];2)=0;[.E51]/2;3*[.E51]+1)))" office:value-type="float" office:value="10" calcext:value-type="float">
            <text:p>10</text:p>
          </table:table-cell>
          <table:table-cell table:formula="of:=IF([.F51]=1;1;(IF(MOD([.F51];2)=0;[.F51]/2;3*[.F51]+1)))" office:value-type="float" office:value="5" calcext:value-type="float">
            <text:p>5</text:p>
          </table:table-cell>
          <table:table-cell table:formula="of:=IF([.G51]=1;1;(IF(MOD([.G51];2)=0;[.G51]/2;3*[.G51]+1)))" office:value-type="float" office:value="16" calcext:value-type="float">
            <text:p>16</text:p>
          </table:table-cell>
          <table:table-cell table:formula="of:=IF([.H51]=1;1;(IF(MOD([.H51];2)=0;[.H51]/2;3*[.H51]+1)))" office:value-type="float" office:value="8" calcext:value-type="float">
            <text:p>8</text:p>
          </table:table-cell>
          <table:table-cell table:formula="of:=IF([.I51]=1;1;(IF(MOD([.I51];2)=0;[.I51]/2;3*[.I51]+1)))" office:value-type="float" office:value="4" calcext:value-type="float">
            <text:p>4</text:p>
          </table:table-cell>
          <table:table-cell table:formula="of:=IF([.J51]=1;1;(IF(MOD([.J51];2)=0;[.J51]/2;3*[.J51]+1)))" office:value-type="float" office:value="2" calcext:value-type="float">
            <text:p>2</text:p>
          </table:table-cell>
          <table:table-cell table:formula="of:=IF([.K51]=1;1;(IF(MOD([.K51];2)=0;[.K51]/2;3*[.K51]+1)))" office:value-type="float" office:value="1" calcext:value-type="float">
            <text:p>1</text:p>
          </table:table-cell>
          <table:table-cell table:formula="of:=IF([.L51]=1;1;(IF(MOD([.L51];2)=0;[.L51]/2;3*[.L51]+1)))" office:value-type="float" office:value="1" calcext:value-type="float">
            <text:p>1</text:p>
          </table:table-cell>
          <table:table-cell table:formula="of:=IF([.M51]=1;1;(IF(MOD([.M51];2)=0;[.M51]/2;3*[.M51]+1)))" office:value-type="float" office:value="1" calcext:value-type="float">
            <text:p>1</text:p>
          </table:table-cell>
          <table:table-cell table:formula="of:=IF([.N51]=1;1;(IF(MOD([.N51];2)=0;[.N51]/2;3*[.N51]+1)))" office:value-type="float" office:value="1" calcext:value-type="float">
            <text:p>1</text:p>
          </table:table-cell>
          <table:table-cell table:formula="of:=IF([.O51]=1;1;(IF(MOD([.O51];2)=0;[.O51]/2;3*[.O51]+1)))" office:value-type="float" office:value="1" calcext:value-type="float">
            <text:p>1</text:p>
          </table:table-cell>
          <table:table-cell table:formula="of:=IF([.P51]=1;1;(IF(MOD([.P51];2)=0;[.P51]/2;3*[.P51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52]=1;1;(IF(MOD([.A52];2)=0;[.A52]/2;3*[.A52]+1)))" office:value-type="float" office:value="160" calcext:value-type="float">
            <text:p>160</text:p>
          </table:table-cell>
          <table:table-cell table:formula="of:=IF([.B52]=1;1;(IF(MOD([.B52];2)=0;[.B52]/2;3*[.B52]+1)))" office:value-type="float" office:value="80" calcext:value-type="float">
            <text:p>80</text:p>
          </table:table-cell>
          <table:table-cell table:formula="of:=IF([.C52]=1;1;(IF(MOD([.C52];2)=0;[.C52]/2;3*[.C52]+1)))" office:value-type="float" office:value="40" calcext:value-type="float">
            <text:p>40</text:p>
          </table:table-cell>
          <table:table-cell table:formula="of:=IF([.D52]=1;1;(IF(MOD([.D52];2)=0;[.D52]/2;3*[.D52]+1)))" office:value-type="float" office:value="20" calcext:value-type="float">
            <text:p>20</text:p>
          </table:table-cell>
          <table:table-cell table:formula="of:=IF([.E52]=1;1;(IF(MOD([.E52];2)=0;[.E52]/2;3*[.E52]+1)))" office:value-type="float" office:value="10" calcext:value-type="float">
            <text:p>10</text:p>
          </table:table-cell>
          <table:table-cell table:formula="of:=IF([.F52]=1;1;(IF(MOD([.F52];2)=0;[.F52]/2;3*[.F52]+1)))" office:value-type="float" office:value="5" calcext:value-type="float">
            <text:p>5</text:p>
          </table:table-cell>
          <table:table-cell table:formula="of:=IF([.G52]=1;1;(IF(MOD([.G52];2)=0;[.G52]/2;3*[.G52]+1)))" office:value-type="float" office:value="16" calcext:value-type="float">
            <text:p>16</text:p>
          </table:table-cell>
          <table:table-cell table:formula="of:=IF([.H52]=1;1;(IF(MOD([.H52];2)=0;[.H52]/2;3*[.H52]+1)))" office:value-type="float" office:value="8" calcext:value-type="float">
            <text:p>8</text:p>
          </table:table-cell>
          <table:table-cell table:formula="of:=IF([.I52]=1;1;(IF(MOD([.I52];2)=0;[.I52]/2;3*[.I52]+1)))" office:value-type="float" office:value="4" calcext:value-type="float">
            <text:p>4</text:p>
          </table:table-cell>
          <table:table-cell table:formula="of:=IF([.J52]=1;1;(IF(MOD([.J52];2)=0;[.J52]/2;3*[.J52]+1)))" office:value-type="float" office:value="2" calcext:value-type="float">
            <text:p>2</text:p>
          </table:table-cell>
          <table:table-cell table:formula="of:=IF([.K52]=1;1;(IF(MOD([.K52];2)=0;[.K52]/2;3*[.K52]+1)))" office:value-type="float" office:value="1" calcext:value-type="float">
            <text:p>1</text:p>
          </table:table-cell>
          <table:table-cell table:formula="of:=IF([.L52]=1;1;(IF(MOD([.L52];2)=0;[.L52]/2;3*[.L52]+1)))" office:value-type="float" office:value="1" calcext:value-type="float">
            <text:p>1</text:p>
          </table:table-cell>
          <table:table-cell table:formula="of:=IF([.M52]=1;1;(IF(MOD([.M52];2)=0;[.M52]/2;3*[.M52]+1)))" office:value-type="float" office:value="1" calcext:value-type="float">
            <text:p>1</text:p>
          </table:table-cell>
          <table:table-cell table:formula="of:=IF([.N52]=1;1;(IF(MOD([.N52];2)=0;[.N52]/2;3*[.N52]+1)))" office:value-type="float" office:value="1" calcext:value-type="float">
            <text:p>1</text:p>
          </table:table-cell>
          <table:table-cell table:formula="of:=IF([.O52]=1;1;(IF(MOD([.O52];2)=0;[.O52]/2;3*[.O52]+1)))" office:value-type="float" office:value="1" calcext:value-type="float">
            <text:p>1</text:p>
          </table:table-cell>
          <table:table-cell table:formula="of:=IF([.P52]=1;1;(IF(MOD([.P52];2)=0;[.P52]/2;3*[.P52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53]=1;1;(IF(MOD([.A53];2)=0;[.A53]/2;3*[.A53]+1)))" office:value-type="float" office:value="27" calcext:value-type="float">
            <text:p>27</text:p>
          </table:table-cell>
          <table:table-cell table:formula="of:=IF([.B53]=1;1;(IF(MOD([.B53];2)=0;[.B53]/2;3*[.B53]+1)))" office:value-type="float" office:value="82" calcext:value-type="float">
            <text:p>82</text:p>
          </table:table-cell>
          <table:table-cell table:formula="of:=IF([.C53]=1;1;(IF(MOD([.C53];2)=0;[.C53]/2;3*[.C53]+1)))" office:value-type="float" office:value="41" calcext:value-type="float">
            <text:p>41</text:p>
          </table:table-cell>
          <table:table-cell table:formula="of:=IF([.D53]=1;1;(IF(MOD([.D53];2)=0;[.D53]/2;3*[.D53]+1)))" office:value-type="float" office:value="124" calcext:value-type="float">
            <text:p>124</text:p>
          </table:table-cell>
          <table:table-cell table:formula="of:=IF([.E53]=1;1;(IF(MOD([.E53];2)=0;[.E53]/2;3*[.E53]+1)))" office:value-type="float" office:value="62" calcext:value-type="float">
            <text:p>62</text:p>
          </table:table-cell>
          <table:table-cell table:formula="of:=IF([.F53]=1;1;(IF(MOD([.F53];2)=0;[.F53]/2;3*[.F53]+1)))" office:value-type="float" office:value="31" calcext:value-type="float">
            <text:p>31</text:p>
          </table:table-cell>
          <table:table-cell table:formula="of:=IF([.G53]=1;1;(IF(MOD([.G53];2)=0;[.G53]/2;3*[.G53]+1)))" office:value-type="float" office:value="94" calcext:value-type="float">
            <text:p>94</text:p>
          </table:table-cell>
          <table:table-cell table:formula="of:=IF([.H53]=1;1;(IF(MOD([.H53];2)=0;[.H53]/2;3*[.H53]+1)))" office:value-type="float" office:value="47" calcext:value-type="float">
            <text:p>47</text:p>
          </table:table-cell>
          <table:table-cell table:formula="of:=IF([.I53]=1;1;(IF(MOD([.I53];2)=0;[.I53]/2;3*[.I53]+1)))" office:value-type="float" office:value="142" calcext:value-type="float">
            <text:p>142</text:p>
          </table:table-cell>
          <table:table-cell table:formula="of:=IF([.J53]=1;1;(IF(MOD([.J53];2)=0;[.J53]/2;3*[.J53]+1)))" office:value-type="float" office:value="71" calcext:value-type="float">
            <text:p>71</text:p>
          </table:table-cell>
          <table:table-cell table:formula="of:=IF([.K53]=1;1;(IF(MOD([.K53];2)=0;[.K53]/2;3*[.K53]+1)))" office:value-type="float" office:value="214" calcext:value-type="float">
            <text:p>214</text:p>
          </table:table-cell>
          <table:table-cell table:formula="of:=IF([.L53]=1;1;(IF(MOD([.L53];2)=0;[.L53]/2;3*[.L53]+1)))" office:value-type="float" office:value="107" calcext:value-type="float">
            <text:p>107</text:p>
          </table:table-cell>
          <table:table-cell table:formula="of:=IF([.M53]=1;1;(IF(MOD([.M53];2)=0;[.M53]/2;3*[.M53]+1)))" office:value-type="float" office:value="322" calcext:value-type="float">
            <text:p>322</text:p>
          </table:table-cell>
          <table:table-cell table:formula="of:=IF([.N53]=1;1;(IF(MOD([.N53];2)=0;[.N53]/2;3*[.N53]+1)))" office:value-type="float" office:value="161" calcext:value-type="float">
            <text:p>161</text:p>
          </table:table-cell>
          <table:table-cell table:formula="of:=IF([.O53]=1;1;(IF(MOD([.O53];2)=0;[.O53]/2;3*[.O53]+1)))" office:value-type="float" office:value="484" calcext:value-type="float">
            <text:p>484</text:p>
          </table:table-cell>
          <table:table-cell table:formula="of:=IF([.P53]=1;1;(IF(MOD([.P53];2)=0;[.P53]/2;3*[.P53]+1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54]=1;1;(IF(MOD([.A54];2)=0;[.A54]/2;3*[.A54]+1)))" office:value-type="float" office:value="166" calcext:value-type="float">
            <text:p>166</text:p>
          </table:table-cell>
          <table:table-cell table:formula="of:=IF([.B54]=1;1;(IF(MOD([.B54];2)=0;[.B54]/2;3*[.B54]+1)))" office:value-type="float" office:value="83" calcext:value-type="float">
            <text:p>83</text:p>
          </table:table-cell>
          <table:table-cell table:formula="of:=IF([.C54]=1;1;(IF(MOD([.C54];2)=0;[.C54]/2;3*[.C54]+1)))" office:value-type="float" office:value="250" calcext:value-type="float">
            <text:p>250</text:p>
          </table:table-cell>
          <table:table-cell table:formula="of:=IF([.D54]=1;1;(IF(MOD([.D54];2)=0;[.D54]/2;3*[.D54]+1)))" office:value-type="float" office:value="125" calcext:value-type="float">
            <text:p>125</text:p>
          </table:table-cell>
          <table:table-cell table:formula="of:=IF([.E54]=1;1;(IF(MOD([.E54];2)=0;[.E54]/2;3*[.E54]+1)))" office:value-type="float" office:value="376" calcext:value-type="float">
            <text:p>376</text:p>
          </table:table-cell>
          <table:table-cell table:formula="of:=IF([.F54]=1;1;(IF(MOD([.F54];2)=0;[.F54]/2;3*[.F54]+1)))" office:value-type="float" office:value="188" calcext:value-type="float">
            <text:p>188</text:p>
          </table:table-cell>
          <table:table-cell table:formula="of:=IF([.G54]=1;1;(IF(MOD([.G54];2)=0;[.G54]/2;3*[.G54]+1)))" office:value-type="float" office:value="94" calcext:value-type="float">
            <text:p>94</text:p>
          </table:table-cell>
          <table:table-cell table:formula="of:=IF([.H54]=1;1;(IF(MOD([.H54];2)=0;[.H54]/2;3*[.H54]+1)))" office:value-type="float" office:value="47" calcext:value-type="float">
            <text:p>47</text:p>
          </table:table-cell>
          <table:table-cell table:formula="of:=IF([.I54]=1;1;(IF(MOD([.I54];2)=0;[.I54]/2;3*[.I54]+1)))" office:value-type="float" office:value="142" calcext:value-type="float">
            <text:p>142</text:p>
          </table:table-cell>
          <table:table-cell table:formula="of:=IF([.J54]=1;1;(IF(MOD([.J54];2)=0;[.J54]/2;3*[.J54]+1)))" office:value-type="float" office:value="71" calcext:value-type="float">
            <text:p>71</text:p>
          </table:table-cell>
          <table:table-cell table:formula="of:=IF([.K54]=1;1;(IF(MOD([.K54];2)=0;[.K54]/2;3*[.K54]+1)))" office:value-type="float" office:value="214" calcext:value-type="float">
            <text:p>214</text:p>
          </table:table-cell>
          <table:table-cell table:formula="of:=IF([.L54]=1;1;(IF(MOD([.L54];2)=0;[.L54]/2;3*[.L54]+1)))" office:value-type="float" office:value="107" calcext:value-type="float">
            <text:p>107</text:p>
          </table:table-cell>
          <table:table-cell table:formula="of:=IF([.M54]=1;1;(IF(MOD([.M54];2)=0;[.M54]/2;3*[.M54]+1)))" office:value-type="float" office:value="322" calcext:value-type="float">
            <text:p>322</text:p>
          </table:table-cell>
          <table:table-cell table:formula="of:=IF([.N54]=1;1;(IF(MOD([.N54];2)=0;[.N54]/2;3*[.N54]+1)))" office:value-type="float" office:value="161" calcext:value-type="float">
            <text:p>161</text:p>
          </table:table-cell>
          <table:table-cell table:formula="of:=IF([.O54]=1;1;(IF(MOD([.O54];2)=0;[.O54]/2;3*[.O54]+1)))" office:value-type="float" office:value="484" calcext:value-type="float">
            <text:p>484</text:p>
          </table:table-cell>
          <table:table-cell table:formula="of:=IF([.P54]=1;1;(IF(MOD([.P54];2)=0;[.P54]/2;3*[.P54]+1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55]=1;1;(IF(MOD([.A55];2)=0;[.A55]/2;3*[.A55]+1)))" office:value-type="float" office:value="28" calcext:value-type="float">
            <text:p>28</text:p>
          </table:table-cell>
          <table:table-cell table:formula="of:=IF([.B55]=1;1;(IF(MOD([.B55];2)=0;[.B55]/2;3*[.B55]+1)))" office:value-type="float" office:value="14" calcext:value-type="float">
            <text:p>14</text:p>
          </table:table-cell>
          <table:table-cell table:formula="of:=IF([.C55]=1;1;(IF(MOD([.C55];2)=0;[.C55]/2;3*[.C55]+1)))" office:value-type="float" office:value="7" calcext:value-type="float">
            <text:p>7</text:p>
          </table:table-cell>
          <table:table-cell table:formula="of:=IF([.D55]=1;1;(IF(MOD([.D55];2)=0;[.D55]/2;3*[.D55]+1)))" office:value-type="float" office:value="22" calcext:value-type="float">
            <text:p>22</text:p>
          </table:table-cell>
          <table:table-cell table:formula="of:=IF([.E55]=1;1;(IF(MOD([.E55];2)=0;[.E55]/2;3*[.E55]+1)))" office:value-type="float" office:value="11" calcext:value-type="float">
            <text:p>11</text:p>
          </table:table-cell>
          <table:table-cell table:formula="of:=IF([.F55]=1;1;(IF(MOD([.F55];2)=0;[.F55]/2;3*[.F55]+1)))" office:value-type="float" office:value="34" calcext:value-type="float">
            <text:p>34</text:p>
          </table:table-cell>
          <table:table-cell table:formula="of:=IF([.G55]=1;1;(IF(MOD([.G55];2)=0;[.G55]/2;3*[.G55]+1)))" office:value-type="float" office:value="17" calcext:value-type="float">
            <text:p>17</text:p>
          </table:table-cell>
          <table:table-cell table:formula="of:=IF([.H55]=1;1;(IF(MOD([.H55];2)=0;[.H55]/2;3*[.H55]+1)))" office:value-type="float" office:value="52" calcext:value-type="float">
            <text:p>52</text:p>
          </table:table-cell>
          <table:table-cell table:formula="of:=IF([.I55]=1;1;(IF(MOD([.I55];2)=0;[.I55]/2;3*[.I55]+1)))" office:value-type="float" office:value="26" calcext:value-type="float">
            <text:p>26</text:p>
          </table:table-cell>
          <table:table-cell table:formula="of:=IF([.J55]=1;1;(IF(MOD([.J55];2)=0;[.J55]/2;3*[.J55]+1)))" office:value-type="float" office:value="13" calcext:value-type="float">
            <text:p>13</text:p>
          </table:table-cell>
          <table:table-cell table:formula="of:=IF([.K55]=1;1;(IF(MOD([.K55];2)=0;[.K55]/2;3*[.K55]+1)))" office:value-type="float" office:value="40" calcext:value-type="float">
            <text:p>40</text:p>
          </table:table-cell>
          <table:table-cell table:formula="of:=IF([.L55]=1;1;(IF(MOD([.L55];2)=0;[.L55]/2;3*[.L55]+1)))" office:value-type="float" office:value="20" calcext:value-type="float">
            <text:p>20</text:p>
          </table:table-cell>
          <table:table-cell table:formula="of:=IF([.M55]=1;1;(IF(MOD([.M55];2)=0;[.M55]/2;3*[.M55]+1)))" office:value-type="float" office:value="10" calcext:value-type="float">
            <text:p>10</text:p>
          </table:table-cell>
          <table:table-cell table:formula="of:=IF([.N55]=1;1;(IF(MOD([.N55];2)=0;[.N55]/2;3*[.N55]+1)))" office:value-type="float" office:value="5" calcext:value-type="float">
            <text:p>5</text:p>
          </table:table-cell>
          <table:table-cell table:formula="of:=IF([.O55]=1;1;(IF(MOD([.O55];2)=0;[.O55]/2;3*[.O55]+1)))" office:value-type="float" office:value="16" calcext:value-type="float">
            <text:p>16</text:p>
          </table:table-cell>
          <table:table-cell table:formula="of:=IF([.P55]=1;1;(IF(MOD([.P55];2)=0;[.P55]/2;3*[.P55]+1)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56]=1;1;(IF(MOD([.A56];2)=0;[.A56]/2;3*[.A56]+1)))" office:value-type="float" office:value="172" calcext:value-type="float">
            <text:p>172</text:p>
          </table:table-cell>
          <table:table-cell table:formula="of:=IF([.B56]=1;1;(IF(MOD([.B56];2)=0;[.B56]/2;3*[.B56]+1)))" office:value-type="float" office:value="86" calcext:value-type="float">
            <text:p>86</text:p>
          </table:table-cell>
          <table:table-cell table:formula="of:=IF([.C56]=1;1;(IF(MOD([.C56];2)=0;[.C56]/2;3*[.C56]+1)))" office:value-type="float" office:value="43" calcext:value-type="float">
            <text:p>43</text:p>
          </table:table-cell>
          <table:table-cell table:formula="of:=IF([.D56]=1;1;(IF(MOD([.D56];2)=0;[.D56]/2;3*[.D56]+1)))" office:value-type="float" office:value="130" calcext:value-type="float">
            <text:p>130</text:p>
          </table:table-cell>
          <table:table-cell table:formula="of:=IF([.E56]=1;1;(IF(MOD([.E56];2)=0;[.E56]/2;3*[.E56]+1)))" office:value-type="float" office:value="65" calcext:value-type="float">
            <text:p>65</text:p>
          </table:table-cell>
          <table:table-cell table:formula="of:=IF([.F56]=1;1;(IF(MOD([.F56];2)=0;[.F56]/2;3*[.F56]+1)))" office:value-type="float" office:value="196" calcext:value-type="float">
            <text:p>196</text:p>
          </table:table-cell>
          <table:table-cell table:formula="of:=IF([.G56]=1;1;(IF(MOD([.G56];2)=0;[.G56]/2;3*[.G56]+1)))" office:value-type="float" office:value="98" calcext:value-type="float">
            <text:p>98</text:p>
          </table:table-cell>
          <table:table-cell table:formula="of:=IF([.H56]=1;1;(IF(MOD([.H56];2)=0;[.H56]/2;3*[.H56]+1)))" office:value-type="float" office:value="49" calcext:value-type="float">
            <text:p>49</text:p>
          </table:table-cell>
          <table:table-cell table:formula="of:=IF([.I56]=1;1;(IF(MOD([.I56];2)=0;[.I56]/2;3*[.I56]+1)))" office:value-type="float" office:value="148" calcext:value-type="float">
            <text:p>148</text:p>
          </table:table-cell>
          <table:table-cell table:formula="of:=IF([.J56]=1;1;(IF(MOD([.J56];2)=0;[.J56]/2;3*[.J56]+1)))" office:value-type="float" office:value="74" calcext:value-type="float">
            <text:p>74</text:p>
          </table:table-cell>
          <table:table-cell table:formula="of:=IF([.K56]=1;1;(IF(MOD([.K56];2)=0;[.K56]/2;3*[.K56]+1)))" office:value-type="float" office:value="37" calcext:value-type="float">
            <text:p>37</text:p>
          </table:table-cell>
          <table:table-cell table:formula="of:=IF([.L56]=1;1;(IF(MOD([.L56];2)=0;[.L56]/2;3*[.L56]+1)))" office:value-type="float" office:value="112" calcext:value-type="float">
            <text:p>112</text:p>
          </table:table-cell>
          <table:table-cell table:formula="of:=IF([.M56]=1;1;(IF(MOD([.M56];2)=0;[.M56]/2;3*[.M56]+1)))" office:value-type="float" office:value="56" calcext:value-type="float">
            <text:p>56</text:p>
          </table:table-cell>
          <table:table-cell table:formula="of:=IF([.N56]=1;1;(IF(MOD([.N56];2)=0;[.N56]/2;3*[.N56]+1)))" office:value-type="float" office:value="28" calcext:value-type="float">
            <text:p>28</text:p>
          </table:table-cell>
          <table:table-cell table:formula="of:=IF([.O56]=1;1;(IF(MOD([.O56];2)=0;[.O56]/2;3*[.O56]+1)))" office:value-type="float" office:value="14" calcext:value-type="float">
            <text:p>14</text:p>
          </table:table-cell>
          <table:table-cell table:formula="of:=IF([.P56]=1;1;(IF(MOD([.P56];2)=0;[.P56]/2;3*[.P56]+1)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57]=1;1;(IF(MOD([.A57];2)=0;[.A57]/2;3*[.A57]+1)))" office:value-type="float" office:value="29" calcext:value-type="float">
            <text:p>29</text:p>
          </table:table-cell>
          <table:table-cell table:formula="of:=IF([.B57]=1;1;(IF(MOD([.B57];2)=0;[.B57]/2;3*[.B57]+1)))" office:value-type="float" office:value="88" calcext:value-type="float">
            <text:p>88</text:p>
          </table:table-cell>
          <table:table-cell table:formula="of:=IF([.C57]=1;1;(IF(MOD([.C57];2)=0;[.C57]/2;3*[.C57]+1)))" office:value-type="float" office:value="44" calcext:value-type="float">
            <text:p>44</text:p>
          </table:table-cell>
          <table:table-cell table:formula="of:=IF([.D57]=1;1;(IF(MOD([.D57];2)=0;[.D57]/2;3*[.D57]+1)))" office:value-type="float" office:value="22" calcext:value-type="float">
            <text:p>22</text:p>
          </table:table-cell>
          <table:table-cell table:formula="of:=IF([.E57]=1;1;(IF(MOD([.E57];2)=0;[.E57]/2;3*[.E57]+1)))" office:value-type="float" office:value="11" calcext:value-type="float">
            <text:p>11</text:p>
          </table:table-cell>
          <table:table-cell table:formula="of:=IF([.F57]=1;1;(IF(MOD([.F57];2)=0;[.F57]/2;3*[.F57]+1)))" office:value-type="float" office:value="34" calcext:value-type="float">
            <text:p>34</text:p>
          </table:table-cell>
          <table:table-cell table:formula="of:=IF([.G57]=1;1;(IF(MOD([.G57];2)=0;[.G57]/2;3*[.G57]+1)))" office:value-type="float" office:value="17" calcext:value-type="float">
            <text:p>17</text:p>
          </table:table-cell>
          <table:table-cell table:formula="of:=IF([.H57]=1;1;(IF(MOD([.H57];2)=0;[.H57]/2;3*[.H57]+1)))" office:value-type="float" office:value="52" calcext:value-type="float">
            <text:p>52</text:p>
          </table:table-cell>
          <table:table-cell table:formula="of:=IF([.I57]=1;1;(IF(MOD([.I57];2)=0;[.I57]/2;3*[.I57]+1)))" office:value-type="float" office:value="26" calcext:value-type="float">
            <text:p>26</text:p>
          </table:table-cell>
          <table:table-cell table:formula="of:=IF([.J57]=1;1;(IF(MOD([.J57];2)=0;[.J57]/2;3*[.J57]+1)))" office:value-type="float" office:value="13" calcext:value-type="float">
            <text:p>13</text:p>
          </table:table-cell>
          <table:table-cell table:formula="of:=IF([.K57]=1;1;(IF(MOD([.K57];2)=0;[.K57]/2;3*[.K57]+1)))" office:value-type="float" office:value="40" calcext:value-type="float">
            <text:p>40</text:p>
          </table:table-cell>
          <table:table-cell table:formula="of:=IF([.L57]=1;1;(IF(MOD([.L57];2)=0;[.L57]/2;3*[.L57]+1)))" office:value-type="float" office:value="20" calcext:value-type="float">
            <text:p>20</text:p>
          </table:table-cell>
          <table:table-cell table:formula="of:=IF([.M57]=1;1;(IF(MOD([.M57];2)=0;[.M57]/2;3*[.M57]+1)))" office:value-type="float" office:value="10" calcext:value-type="float">
            <text:p>10</text:p>
          </table:table-cell>
          <table:table-cell table:formula="of:=IF([.N57]=1;1;(IF(MOD([.N57];2)=0;[.N57]/2;3*[.N57]+1)))" office:value-type="float" office:value="5" calcext:value-type="float">
            <text:p>5</text:p>
          </table:table-cell>
          <table:table-cell table:formula="of:=IF([.O57]=1;1;(IF(MOD([.O57];2)=0;[.O57]/2;3*[.O57]+1)))" office:value-type="float" office:value="16" calcext:value-type="float">
            <text:p>16</text:p>
          </table:table-cell>
          <table:table-cell table:formula="of:=IF([.P57]=1;1;(IF(MOD([.P57];2)=0;[.P57]/2;3*[.P57]+1)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8]=1;1;(IF(MOD([.A58];2)=0;[.A58]/2;3*[.A58]+1)))" office:value-type="float" office:value="178" calcext:value-type="float">
            <text:p>178</text:p>
          </table:table-cell>
          <table:table-cell table:formula="of:=IF([.B58]=1;1;(IF(MOD([.B58];2)=0;[.B58]/2;3*[.B58]+1)))" office:value-type="float" office:value="89" calcext:value-type="float">
            <text:p>89</text:p>
          </table:table-cell>
          <table:table-cell table:formula="of:=IF([.C58]=1;1;(IF(MOD([.C58];2)=0;[.C58]/2;3*[.C58]+1)))" office:value-type="float" office:value="268" calcext:value-type="float">
            <text:p>268</text:p>
          </table:table-cell>
          <table:table-cell table:formula="of:=IF([.D58]=1;1;(IF(MOD([.D58];2)=0;[.D58]/2;3*[.D58]+1)))" office:value-type="float" office:value="134" calcext:value-type="float">
            <text:p>134</text:p>
          </table:table-cell>
          <table:table-cell table:formula="of:=IF([.E58]=1;1;(IF(MOD([.E58];2)=0;[.E58]/2;3*[.E58]+1)))" office:value-type="float" office:value="67" calcext:value-type="float">
            <text:p>67</text:p>
          </table:table-cell>
          <table:table-cell table:formula="of:=IF([.F58]=1;1;(IF(MOD([.F58];2)=0;[.F58]/2;3*[.F58]+1)))" office:value-type="float" office:value="202" calcext:value-type="float">
            <text:p>202</text:p>
          </table:table-cell>
          <table:table-cell table:formula="of:=IF([.G58]=1;1;(IF(MOD([.G58];2)=0;[.G58]/2;3*[.G58]+1)))" office:value-type="float" office:value="101" calcext:value-type="float">
            <text:p>101</text:p>
          </table:table-cell>
          <table:table-cell table:formula="of:=IF([.H58]=1;1;(IF(MOD([.H58];2)=0;[.H58]/2;3*[.H58]+1)))" office:value-type="float" office:value="304" calcext:value-type="float">
            <text:p>304</text:p>
          </table:table-cell>
          <table:table-cell table:formula="of:=IF([.I58]=1;1;(IF(MOD([.I58];2)=0;[.I58]/2;3*[.I58]+1)))" office:value-type="float" office:value="152" calcext:value-type="float">
            <text:p>152</text:p>
          </table:table-cell>
          <table:table-cell table:formula="of:=IF([.J58]=1;1;(IF(MOD([.J58];2)=0;[.J58]/2;3*[.J58]+1)))" office:value-type="float" office:value="76" calcext:value-type="float">
            <text:p>76</text:p>
          </table:table-cell>
          <table:table-cell table:formula="of:=IF([.K58]=1;1;(IF(MOD([.K58];2)=0;[.K58]/2;3*[.K58]+1)))" office:value-type="float" office:value="38" calcext:value-type="float">
            <text:p>38</text:p>
          </table:table-cell>
          <table:table-cell table:formula="of:=IF([.L58]=1;1;(IF(MOD([.L58];2)=0;[.L58]/2;3*[.L58]+1)))" office:value-type="float" office:value="19" calcext:value-type="float">
            <text:p>19</text:p>
          </table:table-cell>
          <table:table-cell table:formula="of:=IF([.M58]=1;1;(IF(MOD([.M58];2)=0;[.M58]/2;3*[.M58]+1)))" office:value-type="float" office:value="58" calcext:value-type="float">
            <text:p>58</text:p>
          </table:table-cell>
          <table:table-cell table:formula="of:=IF([.N58]=1;1;(IF(MOD([.N58];2)=0;[.N58]/2;3*[.N58]+1)))" office:value-type="float" office:value="29" calcext:value-type="float">
            <text:p>29</text:p>
          </table:table-cell>
          <table:table-cell table:formula="of:=IF([.O58]=1;1;(IF(MOD([.O58];2)=0;[.O58]/2;3*[.O58]+1)))" office:value-type="float" office:value="88" calcext:value-type="float">
            <text:p>88</text:p>
          </table:table-cell>
          <table:table-cell table:formula="of:=IF([.P58]=1;1;(IF(MOD([.P58];2)=0;[.P58]/2;3*[.P58]+1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9]=1;1;(IF(MOD([.A59];2)=0;[.A59]/2;3*[.A59]+1)))" office:value-type="float" office:value="30" calcext:value-type="float">
            <text:p>30</text:p>
          </table:table-cell>
          <table:table-cell table:formula="of:=IF([.B59]=1;1;(IF(MOD([.B59];2)=0;[.B59]/2;3*[.B59]+1)))" office:value-type="float" office:value="15" calcext:value-type="float">
            <text:p>15</text:p>
          </table:table-cell>
          <table:table-cell table:formula="of:=IF([.C59]=1;1;(IF(MOD([.C59];2)=0;[.C59]/2;3*[.C59]+1)))" office:value-type="float" office:value="46" calcext:value-type="float">
            <text:p>46</text:p>
          </table:table-cell>
          <table:table-cell table:formula="of:=IF([.D59]=1;1;(IF(MOD([.D59];2)=0;[.D59]/2;3*[.D59]+1)))" office:value-type="float" office:value="23" calcext:value-type="float">
            <text:p>23</text:p>
          </table:table-cell>
          <table:table-cell table:formula="of:=IF([.E59]=1;1;(IF(MOD([.E59];2)=0;[.E59]/2;3*[.E59]+1)))" office:value-type="float" office:value="70" calcext:value-type="float">
            <text:p>70</text:p>
          </table:table-cell>
          <table:table-cell table:formula="of:=IF([.F59]=1;1;(IF(MOD([.F59];2)=0;[.F59]/2;3*[.F59]+1)))" office:value-type="float" office:value="35" calcext:value-type="float">
            <text:p>35</text:p>
          </table:table-cell>
          <table:table-cell table:formula="of:=IF([.G59]=1;1;(IF(MOD([.G59];2)=0;[.G59]/2;3*[.G59]+1)))" office:value-type="float" office:value="106" calcext:value-type="float">
            <text:p>106</text:p>
          </table:table-cell>
          <table:table-cell table:formula="of:=IF([.H59]=1;1;(IF(MOD([.H59];2)=0;[.H59]/2;3*[.H59]+1)))" office:value-type="float" office:value="53" calcext:value-type="float">
            <text:p>53</text:p>
          </table:table-cell>
          <table:table-cell table:formula="of:=IF([.I59]=1;1;(IF(MOD([.I59];2)=0;[.I59]/2;3*[.I59]+1)))" office:value-type="float" office:value="160" calcext:value-type="float">
            <text:p>160</text:p>
          </table:table-cell>
          <table:table-cell table:formula="of:=IF([.J59]=1;1;(IF(MOD([.J59];2)=0;[.J59]/2;3*[.J59]+1)))" office:value-type="float" office:value="80" calcext:value-type="float">
            <text:p>80</text:p>
          </table:table-cell>
          <table:table-cell table:formula="of:=IF([.K59]=1;1;(IF(MOD([.K59];2)=0;[.K59]/2;3*[.K59]+1)))" office:value-type="float" office:value="40" calcext:value-type="float">
            <text:p>40</text:p>
          </table:table-cell>
          <table:table-cell table:formula="of:=IF([.L59]=1;1;(IF(MOD([.L59];2)=0;[.L59]/2;3*[.L59]+1)))" office:value-type="float" office:value="20" calcext:value-type="float">
            <text:p>20</text:p>
          </table:table-cell>
          <table:table-cell table:formula="of:=IF([.M59]=1;1;(IF(MOD([.M59];2)=0;[.M59]/2;3*[.M59]+1)))" office:value-type="float" office:value="10" calcext:value-type="float">
            <text:p>10</text:p>
          </table:table-cell>
          <table:table-cell table:formula="of:=IF([.N59]=1;1;(IF(MOD([.N59];2)=0;[.N59]/2;3*[.N59]+1)))" office:value-type="float" office:value="5" calcext:value-type="float">
            <text:p>5</text:p>
          </table:table-cell>
          <table:table-cell table:formula="of:=IF([.O59]=1;1;(IF(MOD([.O59];2)=0;[.O59]/2;3*[.O59]+1)))" office:value-type="float" office:value="16" calcext:value-type="float">
            <text:p>16</text:p>
          </table:table-cell>
          <table:table-cell table:formula="of:=IF([.P59]=1;1;(IF(MOD([.P59];2)=0;[.P59]/2;3*[.P59]+1)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]=1;1;(IF(MOD([.A60];2)=0;[.A60]/2;3*[.A60]+1)))" office:value-type="float" office:value="184" calcext:value-type="float">
            <text:p>184</text:p>
          </table:table-cell>
          <table:table-cell table:formula="of:=IF([.B60]=1;1;(IF(MOD([.B60];2)=0;[.B60]/2;3*[.B60]+1)))" office:value-type="float" office:value="92" calcext:value-type="float">
            <text:p>92</text:p>
          </table:table-cell>
          <table:table-cell table:formula="of:=IF([.C60]=1;1;(IF(MOD([.C60];2)=0;[.C60]/2;3*[.C60]+1)))" office:value-type="float" office:value="46" calcext:value-type="float">
            <text:p>46</text:p>
          </table:table-cell>
          <table:table-cell table:formula="of:=IF([.D60]=1;1;(IF(MOD([.D60];2)=0;[.D60]/2;3*[.D60]+1)))" office:value-type="float" office:value="23" calcext:value-type="float">
            <text:p>23</text:p>
          </table:table-cell>
          <table:table-cell table:formula="of:=IF([.E60]=1;1;(IF(MOD([.E60];2)=0;[.E60]/2;3*[.E60]+1)))" office:value-type="float" office:value="70" calcext:value-type="float">
            <text:p>70</text:p>
          </table:table-cell>
          <table:table-cell table:formula="of:=IF([.F60]=1;1;(IF(MOD([.F60];2)=0;[.F60]/2;3*[.F60]+1)))" office:value-type="float" office:value="35" calcext:value-type="float">
            <text:p>35</text:p>
          </table:table-cell>
          <table:table-cell table:formula="of:=IF([.G60]=1;1;(IF(MOD([.G60];2)=0;[.G60]/2;3*[.G60]+1)))" office:value-type="float" office:value="106" calcext:value-type="float">
            <text:p>106</text:p>
          </table:table-cell>
          <table:table-cell table:formula="of:=IF([.H60]=1;1;(IF(MOD([.H60];2)=0;[.H60]/2;3*[.H60]+1)))" office:value-type="float" office:value="53" calcext:value-type="float">
            <text:p>53</text:p>
          </table:table-cell>
          <table:table-cell table:formula="of:=IF([.I60]=1;1;(IF(MOD([.I60];2)=0;[.I60]/2;3*[.I60]+1)))" office:value-type="float" office:value="160" calcext:value-type="float">
            <text:p>160</text:p>
          </table:table-cell>
          <table:table-cell table:formula="of:=IF([.J60]=1;1;(IF(MOD([.J60];2)=0;[.J60]/2;3*[.J60]+1)))" office:value-type="float" office:value="80" calcext:value-type="float">
            <text:p>80</text:p>
          </table:table-cell>
          <table:table-cell table:formula="of:=IF([.K60]=1;1;(IF(MOD([.K60];2)=0;[.K60]/2;3*[.K60]+1)))" office:value-type="float" office:value="40" calcext:value-type="float">
            <text:p>40</text:p>
          </table:table-cell>
          <table:table-cell table:formula="of:=IF([.L60]=1;1;(IF(MOD([.L60];2)=0;[.L60]/2;3*[.L60]+1)))" office:value-type="float" office:value="20" calcext:value-type="float">
            <text:p>20</text:p>
          </table:table-cell>
          <table:table-cell table:formula="of:=IF([.M60]=1;1;(IF(MOD([.M60];2)=0;[.M60]/2;3*[.M60]+1)))" office:value-type="float" office:value="10" calcext:value-type="float">
            <text:p>10</text:p>
          </table:table-cell>
          <table:table-cell table:formula="of:=IF([.N60]=1;1;(IF(MOD([.N60];2)=0;[.N60]/2;3*[.N60]+1)))" office:value-type="float" office:value="5" calcext:value-type="float">
            <text:p>5</text:p>
          </table:table-cell>
          <table:table-cell table:formula="of:=IF([.O60]=1;1;(IF(MOD([.O60];2)=0;[.O60]/2;3*[.O60]+1)))" office:value-type="float" office:value="16" calcext:value-type="float">
            <text:p>16</text:p>
          </table:table-cell>
          <table:table-cell table:formula="of:=IF([.P60]=1;1;(IF(MOD([.P60];2)=0;[.P60]/2;3*[.P60]+1)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]=1;1;(IF(MOD([.A61];2)=0;[.A61]/2;3*[.A61]+1)))" office:value-type="float" office:value="31" calcext:value-type="float">
            <text:p>31</text:p>
          </table:table-cell>
          <table:table-cell table:formula="of:=IF([.B61]=1;1;(IF(MOD([.B61];2)=0;[.B61]/2;3*[.B61]+1)))" office:value-type="float" office:value="94" calcext:value-type="float">
            <text:p>94</text:p>
          </table:table-cell>
          <table:table-cell table:formula="of:=IF([.C61]=1;1;(IF(MOD([.C61];2)=0;[.C61]/2;3*[.C61]+1)))" office:value-type="float" office:value="47" calcext:value-type="float">
            <text:p>47</text:p>
          </table:table-cell>
          <table:table-cell table:formula="of:=IF([.D61]=1;1;(IF(MOD([.D61];2)=0;[.D61]/2;3*[.D61]+1)))" office:value-type="float" office:value="142" calcext:value-type="float">
            <text:p>142</text:p>
          </table:table-cell>
          <table:table-cell table:formula="of:=IF([.E61]=1;1;(IF(MOD([.E61];2)=0;[.E61]/2;3*[.E61]+1)))" office:value-type="float" office:value="71" calcext:value-type="float">
            <text:p>71</text:p>
          </table:table-cell>
          <table:table-cell table:formula="of:=IF([.F61]=1;1;(IF(MOD([.F61];2)=0;[.F61]/2;3*[.F61]+1)))" office:value-type="float" office:value="214" calcext:value-type="float">
            <text:p>214</text:p>
          </table:table-cell>
          <table:table-cell table:formula="of:=IF([.G61]=1;1;(IF(MOD([.G61];2)=0;[.G61]/2;3*[.G61]+1)))" office:value-type="float" office:value="107" calcext:value-type="float">
            <text:p>107</text:p>
          </table:table-cell>
          <table:table-cell table:formula="of:=IF([.H61]=1;1;(IF(MOD([.H61];2)=0;[.H61]/2;3*[.H61]+1)))" office:value-type="float" office:value="322" calcext:value-type="float">
            <text:p>322</text:p>
          </table:table-cell>
          <table:table-cell table:formula="of:=IF([.I61]=1;1;(IF(MOD([.I61];2)=0;[.I61]/2;3*[.I61]+1)))" office:value-type="float" office:value="161" calcext:value-type="float">
            <text:p>161</text:p>
          </table:table-cell>
          <table:table-cell table:formula="of:=IF([.J61]=1;1;(IF(MOD([.J61];2)=0;[.J61]/2;3*[.J61]+1)))" office:value-type="float" office:value="484" calcext:value-type="float">
            <text:p>484</text:p>
          </table:table-cell>
          <table:table-cell table:formula="of:=IF([.K61]=1;1;(IF(MOD([.K61];2)=0;[.K61]/2;3*[.K61]+1)))" office:value-type="float" office:value="242" calcext:value-type="float">
            <text:p>242</text:p>
          </table:table-cell>
          <table:table-cell table:formula="of:=IF([.L61]=1;1;(IF(MOD([.L61];2)=0;[.L61]/2;3*[.L61]+1)))" office:value-type="float" office:value="121" calcext:value-type="float">
            <text:p>121</text:p>
          </table:table-cell>
          <table:table-cell table:formula="of:=IF([.M61]=1;1;(IF(MOD([.M61];2)=0;[.M61]/2;3*[.M61]+1)))" office:value-type="float" office:value="364" calcext:value-type="float">
            <text:p>364</text:p>
          </table:table-cell>
          <table:table-cell table:formula="of:=IF([.N61]=1;1;(IF(MOD([.N61];2)=0;[.N61]/2;3*[.N61]+1)))" office:value-type="float" office:value="182" calcext:value-type="float">
            <text:p>182</text:p>
          </table:table-cell>
          <table:table-cell table:formula="of:=IF([.O61]=1;1;(IF(MOD([.O61];2)=0;[.O61]/2;3*[.O61]+1)))" office:value-type="float" office:value="91" calcext:value-type="float">
            <text:p>91</text:p>
          </table:table-cell>
          <table:table-cell table:formula="of:=IF([.P61]=1;1;(IF(MOD([.P61];2)=0;[.P61]/2;3*[.P61]+1))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2]=1;1;(IF(MOD([.A62];2)=0;[.A62]/2;3*[.A62]+1)))" office:value-type="float" office:value="190" calcext:value-type="float">
            <text:p>190</text:p>
          </table:table-cell>
          <table:table-cell table:formula="of:=IF([.B62]=1;1;(IF(MOD([.B62];2)=0;[.B62]/2;3*[.B62]+1)))" office:value-type="float" office:value="95" calcext:value-type="float">
            <text:p>95</text:p>
          </table:table-cell>
          <table:table-cell table:formula="of:=IF([.C62]=1;1;(IF(MOD([.C62];2)=0;[.C62]/2;3*[.C62]+1)))" office:value-type="float" office:value="286" calcext:value-type="float">
            <text:p>286</text:p>
          </table:table-cell>
          <table:table-cell table:formula="of:=IF([.D62]=1;1;(IF(MOD([.D62];2)=0;[.D62]/2;3*[.D62]+1)))" office:value-type="float" office:value="143" calcext:value-type="float">
            <text:p>143</text:p>
          </table:table-cell>
          <table:table-cell table:formula="of:=IF([.E62]=1;1;(IF(MOD([.E62];2)=0;[.E62]/2;3*[.E62]+1)))" office:value-type="float" office:value="430" calcext:value-type="float">
            <text:p>430</text:p>
          </table:table-cell>
          <table:table-cell table:formula="of:=IF([.F62]=1;1;(IF(MOD([.F62];2)=0;[.F62]/2;3*[.F62]+1)))" office:value-type="float" office:value="215" calcext:value-type="float">
            <text:p>215</text:p>
          </table:table-cell>
          <table:table-cell table:formula="of:=IF([.G62]=1;1;(IF(MOD([.G62];2)=0;[.G62]/2;3*[.G62]+1)))" office:value-type="float" office:value="646" calcext:value-type="float">
            <text:p>646</text:p>
          </table:table-cell>
          <table:table-cell table:formula="of:=IF([.H62]=1;1;(IF(MOD([.H62];2)=0;[.H62]/2;3*[.H62]+1)))" office:value-type="float" office:value="323" calcext:value-type="float">
            <text:p>323</text:p>
          </table:table-cell>
          <table:table-cell table:formula="of:=IF([.I62]=1;1;(IF(MOD([.I62];2)=0;[.I62]/2;3*[.I62]+1)))" office:value-type="float" office:value="970" calcext:value-type="float">
            <text:p>970</text:p>
          </table:table-cell>
          <table:table-cell table:formula="of:=IF([.J62]=1;1;(IF(MOD([.J62];2)=0;[.J62]/2;3*[.J62]+1)))" office:value-type="float" office:value="485" calcext:value-type="float">
            <text:p>485</text:p>
          </table:table-cell>
          <table:table-cell table:formula="of:=IF([.K62]=1;1;(IF(MOD([.K62];2)=0;[.K62]/2;3*[.K62]+1)))" office:value-type="float" office:value="1456" calcext:value-type="float">
            <text:p>1456</text:p>
          </table:table-cell>
          <table:table-cell table:formula="of:=IF([.L62]=1;1;(IF(MOD([.L62];2)=0;[.L62]/2;3*[.L62]+1)))" office:value-type="float" office:value="728" calcext:value-type="float">
            <text:p>728</text:p>
          </table:table-cell>
          <table:table-cell table:formula="of:=IF([.M62]=1;1;(IF(MOD([.M62];2)=0;[.M62]/2;3*[.M62]+1)))" office:value-type="float" office:value="364" calcext:value-type="float">
            <text:p>364</text:p>
          </table:table-cell>
          <table:table-cell table:formula="of:=IF([.N62]=1;1;(IF(MOD([.N62];2)=0;[.N62]/2;3*[.N62]+1)))" office:value-type="float" office:value="182" calcext:value-type="float">
            <text:p>182</text:p>
          </table:table-cell>
          <table:table-cell table:formula="of:=IF([.O62]=1;1;(IF(MOD([.O62];2)=0;[.O62]/2;3*[.O62]+1)))" office:value-type="float" office:value="91" calcext:value-type="float">
            <text:p>91</text:p>
          </table:table-cell>
          <table:table-cell table:formula="of:=IF([.P62]=1;1;(IF(MOD([.P62];2)=0;[.P62]/2;3*[.P62]+1))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3]=1;1;(IF(MOD([.A63];2)=0;[.A63]/2;3*[.A63]+1)))" office:value-type="float" office:value="32" calcext:value-type="float">
            <text:p>32</text:p>
          </table:table-cell>
          <table:table-cell table:formula="of:=IF([.B63]=1;1;(IF(MOD([.B63];2)=0;[.B63]/2;3*[.B63]+1)))" office:value-type="float" office:value="16" calcext:value-type="float">
            <text:p>16</text:p>
          </table:table-cell>
          <table:table-cell table:formula="of:=IF([.C63]=1;1;(IF(MOD([.C63];2)=0;[.C63]/2;3*[.C63]+1)))" office:value-type="float" office:value="8" calcext:value-type="float">
            <text:p>8</text:p>
          </table:table-cell>
          <table:table-cell table:formula="of:=IF([.D63]=1;1;(IF(MOD([.D63];2)=0;[.D63]/2;3*[.D63]+1)))" office:value-type="float" office:value="4" calcext:value-type="float">
            <text:p>4</text:p>
          </table:table-cell>
          <table:table-cell table:formula="of:=IF([.E63]=1;1;(IF(MOD([.E63];2)=0;[.E63]/2;3*[.E63]+1)))" office:value-type="float" office:value="2" calcext:value-type="float">
            <text:p>2</text:p>
          </table:table-cell>
          <table:table-cell table:formula="of:=IF([.F63]=1;1;(IF(MOD([.F63];2)=0;[.F63]/2;3*[.F63]+1)))" office:value-type="float" office:value="1" calcext:value-type="float">
            <text:p>1</text:p>
          </table:table-cell>
          <table:table-cell table:formula="of:=IF([.G63]=1;1;(IF(MOD([.G63];2)=0;[.G63]/2;3*[.G63]+1)))" office:value-type="float" office:value="1" calcext:value-type="float">
            <text:p>1</text:p>
          </table:table-cell>
          <table:table-cell table:formula="of:=IF([.H63]=1;1;(IF(MOD([.H63];2)=0;[.H63]/2;3*[.H63]+1)))" office:value-type="float" office:value="1" calcext:value-type="float">
            <text:p>1</text:p>
          </table:table-cell>
          <table:table-cell table:formula="of:=IF([.I63]=1;1;(IF(MOD([.I63];2)=0;[.I63]/2;3*[.I63]+1)))" office:value-type="float" office:value="1" calcext:value-type="float">
            <text:p>1</text:p>
          </table:table-cell>
          <table:table-cell table:formula="of:=IF([.J63]=1;1;(IF(MOD([.J63];2)=0;[.J63]/2;3*[.J63]+1)))" office:value-type="float" office:value="1" calcext:value-type="float">
            <text:p>1</text:p>
          </table:table-cell>
          <table:table-cell table:formula="of:=IF([.K63]=1;1;(IF(MOD([.K63];2)=0;[.K63]/2;3*[.K63]+1)))" office:value-type="float" office:value="1" calcext:value-type="float">
            <text:p>1</text:p>
          </table:table-cell>
          <table:table-cell table:formula="of:=IF([.L63]=1;1;(IF(MOD([.L63];2)=0;[.L63]/2;3*[.L63]+1)))" office:value-type="float" office:value="1" calcext:value-type="float">
            <text:p>1</text:p>
          </table:table-cell>
          <table:table-cell table:formula="of:=IF([.M63]=1;1;(IF(MOD([.M63];2)=0;[.M63]/2;3*[.M63]+1)))" office:value-type="float" office:value="1" calcext:value-type="float">
            <text:p>1</text:p>
          </table:table-cell>
          <table:table-cell table:formula="of:=IF([.N63]=1;1;(IF(MOD([.N63];2)=0;[.N63]/2;3*[.N63]+1)))" office:value-type="float" office:value="1" calcext:value-type="float">
            <text:p>1</text:p>
          </table:table-cell>
          <table:table-cell table:formula="of:=IF([.O63]=1;1;(IF(MOD([.O63];2)=0;[.O63]/2;3*[.O63]+1)))" office:value-type="float" office:value="1" calcext:value-type="float">
            <text:p>1</text:p>
          </table:table-cell>
          <table:table-cell table:formula="of:=IF([.P63]=1;1;(IF(MOD([.P63];2)=0;[.P63]/2;3*[.P63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64]=1;1;(IF(MOD([.A64];2)=0;[.A64]/2;3*[.A64]+1)))" office:value-type="float" office:value="196" calcext:value-type="float">
            <text:p>196</text:p>
          </table:table-cell>
          <table:table-cell table:formula="of:=IF([.B64]=1;1;(IF(MOD([.B64];2)=0;[.B64]/2;3*[.B64]+1)))" office:value-type="float" office:value="98" calcext:value-type="float">
            <text:p>98</text:p>
          </table:table-cell>
          <table:table-cell table:formula="of:=IF([.C64]=1;1;(IF(MOD([.C64];2)=0;[.C64]/2;3*[.C64]+1)))" office:value-type="float" office:value="49" calcext:value-type="float">
            <text:p>49</text:p>
          </table:table-cell>
          <table:table-cell table:formula="of:=IF([.D64]=1;1;(IF(MOD([.D64];2)=0;[.D64]/2;3*[.D64]+1)))" office:value-type="float" office:value="148" calcext:value-type="float">
            <text:p>148</text:p>
          </table:table-cell>
          <table:table-cell table:formula="of:=IF([.E64]=1;1;(IF(MOD([.E64];2)=0;[.E64]/2;3*[.E64]+1)))" office:value-type="float" office:value="74" calcext:value-type="float">
            <text:p>74</text:p>
          </table:table-cell>
          <table:table-cell table:formula="of:=IF([.F64]=1;1;(IF(MOD([.F64];2)=0;[.F64]/2;3*[.F64]+1)))" office:value-type="float" office:value="37" calcext:value-type="float">
            <text:p>37</text:p>
          </table:table-cell>
          <table:table-cell table:formula="of:=IF([.G64]=1;1;(IF(MOD([.G64];2)=0;[.G64]/2;3*[.G64]+1)))" office:value-type="float" office:value="112" calcext:value-type="float">
            <text:p>112</text:p>
          </table:table-cell>
          <table:table-cell table:formula="of:=IF([.H64]=1;1;(IF(MOD([.H64];2)=0;[.H64]/2;3*[.H64]+1)))" office:value-type="float" office:value="56" calcext:value-type="float">
            <text:p>56</text:p>
          </table:table-cell>
          <table:table-cell table:formula="of:=IF([.I64]=1;1;(IF(MOD([.I64];2)=0;[.I64]/2;3*[.I64]+1)))" office:value-type="float" office:value="28" calcext:value-type="float">
            <text:p>28</text:p>
          </table:table-cell>
          <table:table-cell table:formula="of:=IF([.J64]=1;1;(IF(MOD([.J64];2)=0;[.J64]/2;3*[.J64]+1)))" office:value-type="float" office:value="14" calcext:value-type="float">
            <text:p>14</text:p>
          </table:table-cell>
          <table:table-cell table:formula="of:=IF([.K64]=1;1;(IF(MOD([.K64];2)=0;[.K64]/2;3*[.K64]+1)))" office:value-type="float" office:value="7" calcext:value-type="float">
            <text:p>7</text:p>
          </table:table-cell>
          <table:table-cell table:formula="of:=IF([.L64]=1;1;(IF(MOD([.L64];2)=0;[.L64]/2;3*[.L64]+1)))" office:value-type="float" office:value="22" calcext:value-type="float">
            <text:p>22</text:p>
          </table:table-cell>
          <table:table-cell table:formula="of:=IF([.M64]=1;1;(IF(MOD([.M64];2)=0;[.M64]/2;3*[.M64]+1)))" office:value-type="float" office:value="11" calcext:value-type="float">
            <text:p>11</text:p>
          </table:table-cell>
          <table:table-cell table:formula="of:=IF([.N64]=1;1;(IF(MOD([.N64];2)=0;[.N64]/2;3*[.N64]+1)))" office:value-type="float" office:value="34" calcext:value-type="float">
            <text:p>34</text:p>
          </table:table-cell>
          <table:table-cell table:formula="of:=IF([.O64]=1;1;(IF(MOD([.O64];2)=0;[.O64]/2;3*[.O64]+1)))" office:value-type="float" office:value="17" calcext:value-type="float">
            <text:p>17</text:p>
          </table:table-cell>
          <table:table-cell table:formula="of:=IF([.P64]=1;1;(IF(MOD([.P64];2)=0;[.P64]/2;3*[.P64]+1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65]=1;1;(IF(MOD([.A65];2)=0;[.A65]/2;3*[.A65]+1)))" office:value-type="float" office:value="33" calcext:value-type="float">
            <text:p>33</text:p>
          </table:table-cell>
          <table:table-cell table:formula="of:=IF([.B65]=1;1;(IF(MOD([.B65];2)=0;[.B65]/2;3*[.B65]+1)))" office:value-type="float" office:value="100" calcext:value-type="float">
            <text:p>100</text:p>
          </table:table-cell>
          <table:table-cell table:formula="of:=IF([.C65]=1;1;(IF(MOD([.C65];2)=0;[.C65]/2;3*[.C65]+1)))" office:value-type="float" office:value="50" calcext:value-type="float">
            <text:p>50</text:p>
          </table:table-cell>
          <table:table-cell table:formula="of:=IF([.D65]=1;1;(IF(MOD([.D65];2)=0;[.D65]/2;3*[.D65]+1)))" office:value-type="float" office:value="25" calcext:value-type="float">
            <text:p>25</text:p>
          </table:table-cell>
          <table:table-cell table:formula="of:=IF([.E65]=1;1;(IF(MOD([.E65];2)=0;[.E65]/2;3*[.E65]+1)))" office:value-type="float" office:value="76" calcext:value-type="float">
            <text:p>76</text:p>
          </table:table-cell>
          <table:table-cell table:formula="of:=IF([.F65]=1;1;(IF(MOD([.F65];2)=0;[.F65]/2;3*[.F65]+1)))" office:value-type="float" office:value="38" calcext:value-type="float">
            <text:p>38</text:p>
          </table:table-cell>
          <table:table-cell table:formula="of:=IF([.G65]=1;1;(IF(MOD([.G65];2)=0;[.G65]/2;3*[.G65]+1)))" office:value-type="float" office:value="19" calcext:value-type="float">
            <text:p>19</text:p>
          </table:table-cell>
          <table:table-cell table:formula="of:=IF([.H65]=1;1;(IF(MOD([.H65];2)=0;[.H65]/2;3*[.H65]+1)))" office:value-type="float" office:value="58" calcext:value-type="float">
            <text:p>58</text:p>
          </table:table-cell>
          <table:table-cell table:formula="of:=IF([.I65]=1;1;(IF(MOD([.I65];2)=0;[.I65]/2;3*[.I65]+1)))" office:value-type="float" office:value="29" calcext:value-type="float">
            <text:p>29</text:p>
          </table:table-cell>
          <table:table-cell table:formula="of:=IF([.J65]=1;1;(IF(MOD([.J65];2)=0;[.J65]/2;3*[.J65]+1)))" office:value-type="float" office:value="88" calcext:value-type="float">
            <text:p>88</text:p>
          </table:table-cell>
          <table:table-cell table:formula="of:=IF([.K65]=1;1;(IF(MOD([.K65];2)=0;[.K65]/2;3*[.K65]+1)))" office:value-type="float" office:value="44" calcext:value-type="float">
            <text:p>44</text:p>
          </table:table-cell>
          <table:table-cell table:formula="of:=IF([.L65]=1;1;(IF(MOD([.L65];2)=0;[.L65]/2;3*[.L65]+1)))" office:value-type="float" office:value="22" calcext:value-type="float">
            <text:p>22</text:p>
          </table:table-cell>
          <table:table-cell table:formula="of:=IF([.M65]=1;1;(IF(MOD([.M65];2)=0;[.M65]/2;3*[.M65]+1)))" office:value-type="float" office:value="11" calcext:value-type="float">
            <text:p>11</text:p>
          </table:table-cell>
          <table:table-cell table:formula="of:=IF([.N65]=1;1;(IF(MOD([.N65];2)=0;[.N65]/2;3*[.N65]+1)))" office:value-type="float" office:value="34" calcext:value-type="float">
            <text:p>34</text:p>
          </table:table-cell>
          <table:table-cell table:formula="of:=IF([.O65]=1;1;(IF(MOD([.O65];2)=0;[.O65]/2;3*[.O65]+1)))" office:value-type="float" office:value="17" calcext:value-type="float">
            <text:p>17</text:p>
          </table:table-cell>
          <table:table-cell table:formula="of:=IF([.P65]=1;1;(IF(MOD([.P65];2)=0;[.P65]/2;3*[.P65]+1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66]=1;1;(IF(MOD([.A66];2)=0;[.A66]/2;3*[.A66]+1)))" office:value-type="float" office:value="202" calcext:value-type="float">
            <text:p>202</text:p>
          </table:table-cell>
          <table:table-cell table:formula="of:=IF([.B66]=1;1;(IF(MOD([.B66];2)=0;[.B66]/2;3*[.B66]+1)))" office:value-type="float" office:value="101" calcext:value-type="float">
            <text:p>101</text:p>
          </table:table-cell>
          <table:table-cell table:formula="of:=IF([.C66]=1;1;(IF(MOD([.C66];2)=0;[.C66]/2;3*[.C66]+1)))" office:value-type="float" office:value="304" calcext:value-type="float">
            <text:p>304</text:p>
          </table:table-cell>
          <table:table-cell table:formula="of:=IF([.D66]=1;1;(IF(MOD([.D66];2)=0;[.D66]/2;3*[.D66]+1)))" office:value-type="float" office:value="152" calcext:value-type="float">
            <text:p>152</text:p>
          </table:table-cell>
          <table:table-cell table:formula="of:=IF([.E66]=1;1;(IF(MOD([.E66];2)=0;[.E66]/2;3*[.E66]+1)))" office:value-type="float" office:value="76" calcext:value-type="float">
            <text:p>76</text:p>
          </table:table-cell>
          <table:table-cell table:formula="of:=IF([.F66]=1;1;(IF(MOD([.F66];2)=0;[.F66]/2;3*[.F66]+1)))" office:value-type="float" office:value="38" calcext:value-type="float">
            <text:p>38</text:p>
          </table:table-cell>
          <table:table-cell table:formula="of:=IF([.G66]=1;1;(IF(MOD([.G66];2)=0;[.G66]/2;3*[.G66]+1)))" office:value-type="float" office:value="19" calcext:value-type="float">
            <text:p>19</text:p>
          </table:table-cell>
          <table:table-cell table:formula="of:=IF([.H66]=1;1;(IF(MOD([.H66];2)=0;[.H66]/2;3*[.H66]+1)))" office:value-type="float" office:value="58" calcext:value-type="float">
            <text:p>58</text:p>
          </table:table-cell>
          <table:table-cell table:formula="of:=IF([.I66]=1;1;(IF(MOD([.I66];2)=0;[.I66]/2;3*[.I66]+1)))" office:value-type="float" office:value="29" calcext:value-type="float">
            <text:p>29</text:p>
          </table:table-cell>
          <table:table-cell table:formula="of:=IF([.J66]=1;1;(IF(MOD([.J66];2)=0;[.J66]/2;3*[.J66]+1)))" office:value-type="float" office:value="88" calcext:value-type="float">
            <text:p>88</text:p>
          </table:table-cell>
          <table:table-cell table:formula="of:=IF([.K66]=1;1;(IF(MOD([.K66];2)=0;[.K66]/2;3*[.K66]+1)))" office:value-type="float" office:value="44" calcext:value-type="float">
            <text:p>44</text:p>
          </table:table-cell>
          <table:table-cell table:formula="of:=IF([.L66]=1;1;(IF(MOD([.L66];2)=0;[.L66]/2;3*[.L66]+1)))" office:value-type="float" office:value="22" calcext:value-type="float">
            <text:p>22</text:p>
          </table:table-cell>
          <table:table-cell table:formula="of:=IF([.M66]=1;1;(IF(MOD([.M66];2)=0;[.M66]/2;3*[.M66]+1)))" office:value-type="float" office:value="11" calcext:value-type="float">
            <text:p>11</text:p>
          </table:table-cell>
          <table:table-cell table:formula="of:=IF([.N66]=1;1;(IF(MOD([.N66];2)=0;[.N66]/2;3*[.N66]+1)))" office:value-type="float" office:value="34" calcext:value-type="float">
            <text:p>34</text:p>
          </table:table-cell>
          <table:table-cell table:formula="of:=IF([.O66]=1;1;(IF(MOD([.O66];2)=0;[.O66]/2;3*[.O66]+1)))" office:value-type="float" office:value="17" calcext:value-type="float">
            <text:p>17</text:p>
          </table:table-cell>
          <table:table-cell table:formula="of:=IF([.P66]=1;1;(IF(MOD([.P66];2)=0;[.P66]/2;3*[.P66]+1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67]=1;1;(IF(MOD([.A67];2)=0;[.A67]/2;3*[.A67]+1)))" office:value-type="float" office:value="34" calcext:value-type="float">
            <text:p>34</text:p>
          </table:table-cell>
          <table:table-cell table:formula="of:=IF([.B67]=1;1;(IF(MOD([.B67];2)=0;[.B67]/2;3*[.B67]+1)))" office:value-type="float" office:value="17" calcext:value-type="float">
            <text:p>17</text:p>
          </table:table-cell>
          <table:table-cell table:formula="of:=IF([.C67]=1;1;(IF(MOD([.C67];2)=0;[.C67]/2;3*[.C67]+1)))" office:value-type="float" office:value="52" calcext:value-type="float">
            <text:p>52</text:p>
          </table:table-cell>
          <table:table-cell table:formula="of:=IF([.D67]=1;1;(IF(MOD([.D67];2)=0;[.D67]/2;3*[.D67]+1)))" office:value-type="float" office:value="26" calcext:value-type="float">
            <text:p>26</text:p>
          </table:table-cell>
          <table:table-cell table:formula="of:=IF([.E67]=1;1;(IF(MOD([.E67];2)=0;[.E67]/2;3*[.E67]+1)))" office:value-type="float" office:value="13" calcext:value-type="float">
            <text:p>13</text:p>
          </table:table-cell>
          <table:table-cell table:formula="of:=IF([.F67]=1;1;(IF(MOD([.F67];2)=0;[.F67]/2;3*[.F67]+1)))" office:value-type="float" office:value="40" calcext:value-type="float">
            <text:p>40</text:p>
          </table:table-cell>
          <table:table-cell table:formula="of:=IF([.G67]=1;1;(IF(MOD([.G67];2)=0;[.G67]/2;3*[.G67]+1)))" office:value-type="float" office:value="20" calcext:value-type="float">
            <text:p>20</text:p>
          </table:table-cell>
          <table:table-cell table:formula="of:=IF([.H67]=1;1;(IF(MOD([.H67];2)=0;[.H67]/2;3*[.H67]+1)))" office:value-type="float" office:value="10" calcext:value-type="float">
            <text:p>10</text:p>
          </table:table-cell>
          <table:table-cell table:formula="of:=IF([.I67]=1;1;(IF(MOD([.I67];2)=0;[.I67]/2;3*[.I67]+1)))" office:value-type="float" office:value="5" calcext:value-type="float">
            <text:p>5</text:p>
          </table:table-cell>
          <table:table-cell table:formula="of:=IF([.J67]=1;1;(IF(MOD([.J67];2)=0;[.J67]/2;3*[.J67]+1)))" office:value-type="float" office:value="16" calcext:value-type="float">
            <text:p>16</text:p>
          </table:table-cell>
          <table:table-cell table:formula="of:=IF([.K67]=1;1;(IF(MOD([.K67];2)=0;[.K67]/2;3*[.K67]+1)))" office:value-type="float" office:value="8" calcext:value-type="float">
            <text:p>8</text:p>
          </table:table-cell>
          <table:table-cell table:formula="of:=IF([.L67]=1;1;(IF(MOD([.L67];2)=0;[.L67]/2;3*[.L67]+1)))" office:value-type="float" office:value="4" calcext:value-type="float">
            <text:p>4</text:p>
          </table:table-cell>
          <table:table-cell table:formula="of:=IF([.M67]=1;1;(IF(MOD([.M67];2)=0;[.M67]/2;3*[.M67]+1)))" office:value-type="float" office:value="2" calcext:value-type="float">
            <text:p>2</text:p>
          </table:table-cell>
          <table:table-cell table:formula="of:=IF([.N67]=1;1;(IF(MOD([.N67];2)=0;[.N67]/2;3*[.N67]+1)))" office:value-type="float" office:value="1" calcext:value-type="float">
            <text:p>1</text:p>
          </table:table-cell>
          <table:table-cell table:formula="of:=IF([.O67]=1;1;(IF(MOD([.O67];2)=0;[.O67]/2;3*[.O67]+1)))" office:value-type="float" office:value="1" calcext:value-type="float">
            <text:p>1</text:p>
          </table:table-cell>
          <table:table-cell table:formula="of:=IF([.P67]=1;1;(IF(MOD([.P67];2)=0;[.P67]/2;3*[.P67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68]=1;1;(IF(MOD([.A68];2)=0;[.A68]/2;3*[.A68]+1)))" office:value-type="float" office:value="208" calcext:value-type="float">
            <text:p>208</text:p>
          </table:table-cell>
          <table:table-cell table:formula="of:=IF([.B68]=1;1;(IF(MOD([.B68];2)=0;[.B68]/2;3*[.B68]+1)))" office:value-type="float" office:value="104" calcext:value-type="float">
            <text:p>104</text:p>
          </table:table-cell>
          <table:table-cell table:formula="of:=IF([.C68]=1;1;(IF(MOD([.C68];2)=0;[.C68]/2;3*[.C68]+1)))" office:value-type="float" office:value="52" calcext:value-type="float">
            <text:p>52</text:p>
          </table:table-cell>
          <table:table-cell table:formula="of:=IF([.D68]=1;1;(IF(MOD([.D68];2)=0;[.D68]/2;3*[.D68]+1)))" office:value-type="float" office:value="26" calcext:value-type="float">
            <text:p>26</text:p>
          </table:table-cell>
          <table:table-cell table:formula="of:=IF([.E68]=1;1;(IF(MOD([.E68];2)=0;[.E68]/2;3*[.E68]+1)))" office:value-type="float" office:value="13" calcext:value-type="float">
            <text:p>13</text:p>
          </table:table-cell>
          <table:table-cell table:formula="of:=IF([.F68]=1;1;(IF(MOD([.F68];2)=0;[.F68]/2;3*[.F68]+1)))" office:value-type="float" office:value="40" calcext:value-type="float">
            <text:p>40</text:p>
          </table:table-cell>
          <table:table-cell table:formula="of:=IF([.G68]=1;1;(IF(MOD([.G68];2)=0;[.G68]/2;3*[.G68]+1)))" office:value-type="float" office:value="20" calcext:value-type="float">
            <text:p>20</text:p>
          </table:table-cell>
          <table:table-cell table:formula="of:=IF([.H68]=1;1;(IF(MOD([.H68];2)=0;[.H68]/2;3*[.H68]+1)))" office:value-type="float" office:value="10" calcext:value-type="float">
            <text:p>10</text:p>
          </table:table-cell>
          <table:table-cell table:formula="of:=IF([.I68]=1;1;(IF(MOD([.I68];2)=0;[.I68]/2;3*[.I68]+1)))" office:value-type="float" office:value="5" calcext:value-type="float">
            <text:p>5</text:p>
          </table:table-cell>
          <table:table-cell table:formula="of:=IF([.J68]=1;1;(IF(MOD([.J68];2)=0;[.J68]/2;3*[.J68]+1)))" office:value-type="float" office:value="16" calcext:value-type="float">
            <text:p>16</text:p>
          </table:table-cell>
          <table:table-cell table:formula="of:=IF([.K68]=1;1;(IF(MOD([.K68];2)=0;[.K68]/2;3*[.K68]+1)))" office:value-type="float" office:value="8" calcext:value-type="float">
            <text:p>8</text:p>
          </table:table-cell>
          <table:table-cell table:formula="of:=IF([.L68]=1;1;(IF(MOD([.L68];2)=0;[.L68]/2;3*[.L68]+1)))" office:value-type="float" office:value="4" calcext:value-type="float">
            <text:p>4</text:p>
          </table:table-cell>
          <table:table-cell table:formula="of:=IF([.M68]=1;1;(IF(MOD([.M68];2)=0;[.M68]/2;3*[.M68]+1)))" office:value-type="float" office:value="2" calcext:value-type="float">
            <text:p>2</text:p>
          </table:table-cell>
          <table:table-cell table:formula="of:=IF([.N68]=1;1;(IF(MOD([.N68];2)=0;[.N68]/2;3*[.N68]+1)))" office:value-type="float" office:value="1" calcext:value-type="float">
            <text:p>1</text:p>
          </table:table-cell>
          <table:table-cell table:formula="of:=IF([.O68]=1;1;(IF(MOD([.O68];2)=0;[.O68]/2;3*[.O68]+1)))" office:value-type="float" office:value="1" calcext:value-type="float">
            <text:p>1</text:p>
          </table:table-cell>
          <table:table-cell table:formula="of:=IF([.P68]=1;1;(IF(MOD([.P68];2)=0;[.P68]/2;3*[.P68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69]=1;1;(IF(MOD([.A69];2)=0;[.A69]/2;3*[.A69]+1)))" office:value-type="float" office:value="35" calcext:value-type="float">
            <text:p>35</text:p>
          </table:table-cell>
          <table:table-cell table:formula="of:=IF([.B69]=1;1;(IF(MOD([.B69];2)=0;[.B69]/2;3*[.B69]+1)))" office:value-type="float" office:value="106" calcext:value-type="float">
            <text:p>106</text:p>
          </table:table-cell>
          <table:table-cell table:formula="of:=IF([.C69]=1;1;(IF(MOD([.C69];2)=0;[.C69]/2;3*[.C69]+1)))" office:value-type="float" office:value="53" calcext:value-type="float">
            <text:p>53</text:p>
          </table:table-cell>
          <table:table-cell table:formula="of:=IF([.D69]=1;1;(IF(MOD([.D69];2)=0;[.D69]/2;3*[.D69]+1)))" office:value-type="float" office:value="160" calcext:value-type="float">
            <text:p>160</text:p>
          </table:table-cell>
          <table:table-cell table:formula="of:=IF([.E69]=1;1;(IF(MOD([.E69];2)=0;[.E69]/2;3*[.E69]+1)))" office:value-type="float" office:value="80" calcext:value-type="float">
            <text:p>80</text:p>
          </table:table-cell>
          <table:table-cell table:formula="of:=IF([.F69]=1;1;(IF(MOD([.F69];2)=0;[.F69]/2;3*[.F69]+1)))" office:value-type="float" office:value="40" calcext:value-type="float">
            <text:p>40</text:p>
          </table:table-cell>
          <table:table-cell table:formula="of:=IF([.G69]=1;1;(IF(MOD([.G69];2)=0;[.G69]/2;3*[.G69]+1)))" office:value-type="float" office:value="20" calcext:value-type="float">
            <text:p>20</text:p>
          </table:table-cell>
          <table:table-cell table:formula="of:=IF([.H69]=1;1;(IF(MOD([.H69];2)=0;[.H69]/2;3*[.H69]+1)))" office:value-type="float" office:value="10" calcext:value-type="float">
            <text:p>10</text:p>
          </table:table-cell>
          <table:table-cell table:formula="of:=IF([.I69]=1;1;(IF(MOD([.I69];2)=0;[.I69]/2;3*[.I69]+1)))" office:value-type="float" office:value="5" calcext:value-type="float">
            <text:p>5</text:p>
          </table:table-cell>
          <table:table-cell table:formula="of:=IF([.J69]=1;1;(IF(MOD([.J69];2)=0;[.J69]/2;3*[.J69]+1)))" office:value-type="float" office:value="16" calcext:value-type="float">
            <text:p>16</text:p>
          </table:table-cell>
          <table:table-cell table:formula="of:=IF([.K69]=1;1;(IF(MOD([.K69];2)=0;[.K69]/2;3*[.K69]+1)))" office:value-type="float" office:value="8" calcext:value-type="float">
            <text:p>8</text:p>
          </table:table-cell>
          <table:table-cell table:formula="of:=IF([.L69]=1;1;(IF(MOD([.L69];2)=0;[.L69]/2;3*[.L69]+1)))" office:value-type="float" office:value="4" calcext:value-type="float">
            <text:p>4</text:p>
          </table:table-cell>
          <table:table-cell table:formula="of:=IF([.M69]=1;1;(IF(MOD([.M69];2)=0;[.M69]/2;3*[.M69]+1)))" office:value-type="float" office:value="2" calcext:value-type="float">
            <text:p>2</text:p>
          </table:table-cell>
          <table:table-cell table:formula="of:=IF([.N69]=1;1;(IF(MOD([.N69];2)=0;[.N69]/2;3*[.N69]+1)))" office:value-type="float" office:value="1" calcext:value-type="float">
            <text:p>1</text:p>
          </table:table-cell>
          <table:table-cell table:formula="of:=IF([.O69]=1;1;(IF(MOD([.O69];2)=0;[.O69]/2;3*[.O69]+1)))" office:value-type="float" office:value="1" calcext:value-type="float">
            <text:p>1</text:p>
          </table:table-cell>
          <table:table-cell table:formula="of:=IF([.P69]=1;1;(IF(MOD([.P69];2)=0;[.P69]/2;3*[.P69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70]=1;1;(IF(MOD([.A70];2)=0;[.A70]/2;3*[.A70]+1)))" office:value-type="float" office:value="214" calcext:value-type="float">
            <text:p>214</text:p>
          </table:table-cell>
          <table:table-cell table:formula="of:=IF([.B70]=1;1;(IF(MOD([.B70];2)=0;[.B70]/2;3*[.B70]+1)))" office:value-type="float" office:value="107" calcext:value-type="float">
            <text:p>107</text:p>
          </table:table-cell>
          <table:table-cell table:formula="of:=IF([.C70]=1;1;(IF(MOD([.C70];2)=0;[.C70]/2;3*[.C70]+1)))" office:value-type="float" office:value="322" calcext:value-type="float">
            <text:p>322</text:p>
          </table:table-cell>
          <table:table-cell table:formula="of:=IF([.D70]=1;1;(IF(MOD([.D70];2)=0;[.D70]/2;3*[.D70]+1)))" office:value-type="float" office:value="161" calcext:value-type="float">
            <text:p>161</text:p>
          </table:table-cell>
          <table:table-cell table:formula="of:=IF([.E70]=1;1;(IF(MOD([.E70];2)=0;[.E70]/2;3*[.E70]+1)))" office:value-type="float" office:value="484" calcext:value-type="float">
            <text:p>484</text:p>
          </table:table-cell>
          <table:table-cell table:formula="of:=IF([.F70]=1;1;(IF(MOD([.F70];2)=0;[.F70]/2;3*[.F70]+1)))" office:value-type="float" office:value="242" calcext:value-type="float">
            <text:p>242</text:p>
          </table:table-cell>
          <table:table-cell table:formula="of:=IF([.G70]=1;1;(IF(MOD([.G70];2)=0;[.G70]/2;3*[.G70]+1)))" office:value-type="float" office:value="121" calcext:value-type="float">
            <text:p>121</text:p>
          </table:table-cell>
          <table:table-cell table:formula="of:=IF([.H70]=1;1;(IF(MOD([.H70];2)=0;[.H70]/2;3*[.H70]+1)))" office:value-type="float" office:value="364" calcext:value-type="float">
            <text:p>364</text:p>
          </table:table-cell>
          <table:table-cell table:formula="of:=IF([.I70]=1;1;(IF(MOD([.I70];2)=0;[.I70]/2;3*[.I70]+1)))" office:value-type="float" office:value="182" calcext:value-type="float">
            <text:p>182</text:p>
          </table:table-cell>
          <table:table-cell table:formula="of:=IF([.J70]=1;1;(IF(MOD([.J70];2)=0;[.J70]/2;3*[.J70]+1)))" office:value-type="float" office:value="91" calcext:value-type="float">
            <text:p>91</text:p>
          </table:table-cell>
          <table:table-cell table:formula="of:=IF([.K70]=1;1;(IF(MOD([.K70];2)=0;[.K70]/2;3*[.K70]+1)))" office:value-type="float" office:value="274" calcext:value-type="float">
            <text:p>274</text:p>
          </table:table-cell>
          <table:table-cell table:formula="of:=IF([.L70]=1;1;(IF(MOD([.L70];2)=0;[.L70]/2;3*[.L70]+1)))" office:value-type="float" office:value="137" calcext:value-type="float">
            <text:p>137</text:p>
          </table:table-cell>
          <table:table-cell table:formula="of:=IF([.M70]=1;1;(IF(MOD([.M70];2)=0;[.M70]/2;3*[.M70]+1)))" office:value-type="float" office:value="412" calcext:value-type="float">
            <text:p>412</text:p>
          </table:table-cell>
          <table:table-cell table:formula="of:=IF([.N70]=1;1;(IF(MOD([.N70];2)=0;[.N70]/2;3*[.N70]+1)))" office:value-type="float" office:value="206" calcext:value-type="float">
            <text:p>206</text:p>
          </table:table-cell>
          <table:table-cell table:formula="of:=IF([.O70]=1;1;(IF(MOD([.O70];2)=0;[.O70]/2;3*[.O70]+1)))" office:value-type="float" office:value="103" calcext:value-type="float">
            <text:p>103</text:p>
          </table:table-cell>
          <table:table-cell table:formula="of:=IF([.P70]=1;1;(IF(MOD([.P70];2)=0;[.P70]/2;3*[.P70]+1))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71]=1;1;(IF(MOD([.A71];2)=0;[.A71]/2;3*[.A71]+1)))" office:value-type="float" office:value="36" calcext:value-type="float">
            <text:p>36</text:p>
          </table:table-cell>
          <table:table-cell table:formula="of:=IF([.B71]=1;1;(IF(MOD([.B71];2)=0;[.B71]/2;3*[.B71]+1)))" office:value-type="float" office:value="18" calcext:value-type="float">
            <text:p>18</text:p>
          </table:table-cell>
          <table:table-cell table:formula="of:=IF([.C71]=1;1;(IF(MOD([.C71];2)=0;[.C71]/2;3*[.C71]+1)))" office:value-type="float" office:value="9" calcext:value-type="float">
            <text:p>9</text:p>
          </table:table-cell>
          <table:table-cell table:formula="of:=IF([.D71]=1;1;(IF(MOD([.D71];2)=0;[.D71]/2;3*[.D71]+1)))" office:value-type="float" office:value="28" calcext:value-type="float">
            <text:p>28</text:p>
          </table:table-cell>
          <table:table-cell table:formula="of:=IF([.E71]=1;1;(IF(MOD([.E71];2)=0;[.E71]/2;3*[.E71]+1)))" office:value-type="float" office:value="14" calcext:value-type="float">
            <text:p>14</text:p>
          </table:table-cell>
          <table:table-cell table:formula="of:=IF([.F71]=1;1;(IF(MOD([.F71];2)=0;[.F71]/2;3*[.F71]+1)))" office:value-type="float" office:value="7" calcext:value-type="float">
            <text:p>7</text:p>
          </table:table-cell>
          <table:table-cell table:formula="of:=IF([.G71]=1;1;(IF(MOD([.G71];2)=0;[.G71]/2;3*[.G71]+1)))" office:value-type="float" office:value="22" calcext:value-type="float">
            <text:p>22</text:p>
          </table:table-cell>
          <table:table-cell table:formula="of:=IF([.H71]=1;1;(IF(MOD([.H71];2)=0;[.H71]/2;3*[.H71]+1)))" office:value-type="float" office:value="11" calcext:value-type="float">
            <text:p>11</text:p>
          </table:table-cell>
          <table:table-cell table:formula="of:=IF([.I71]=1;1;(IF(MOD([.I71];2)=0;[.I71]/2;3*[.I71]+1)))" office:value-type="float" office:value="34" calcext:value-type="float">
            <text:p>34</text:p>
          </table:table-cell>
          <table:table-cell table:formula="of:=IF([.J71]=1;1;(IF(MOD([.J71];2)=0;[.J71]/2;3*[.J71]+1)))" office:value-type="float" office:value="17" calcext:value-type="float">
            <text:p>17</text:p>
          </table:table-cell>
          <table:table-cell table:formula="of:=IF([.K71]=1;1;(IF(MOD([.K71];2)=0;[.K71]/2;3*[.K71]+1)))" office:value-type="float" office:value="52" calcext:value-type="float">
            <text:p>52</text:p>
          </table:table-cell>
          <table:table-cell table:formula="of:=IF([.L71]=1;1;(IF(MOD([.L71];2)=0;[.L71]/2;3*[.L71]+1)))" office:value-type="float" office:value="26" calcext:value-type="float">
            <text:p>26</text:p>
          </table:table-cell>
          <table:table-cell table:formula="of:=IF([.M71]=1;1;(IF(MOD([.M71];2)=0;[.M71]/2;3*[.M71]+1)))" office:value-type="float" office:value="13" calcext:value-type="float">
            <text:p>13</text:p>
          </table:table-cell>
          <table:table-cell table:formula="of:=IF([.N71]=1;1;(IF(MOD([.N71];2)=0;[.N71]/2;3*[.N71]+1)))" office:value-type="float" office:value="40" calcext:value-type="float">
            <text:p>40</text:p>
          </table:table-cell>
          <table:table-cell table:formula="of:=IF([.O71]=1;1;(IF(MOD([.O71];2)=0;[.O71]/2;3*[.O71]+1)))" office:value-type="float" office:value="20" calcext:value-type="float">
            <text:p>20</text:p>
          </table:table-cell>
          <table:table-cell table:formula="of:=IF([.P71]=1;1;(IF(MOD([.P71];2)=0;[.P71]/2;3*[.P71]+1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72]=1;1;(IF(MOD([.A72];2)=0;[.A72]/2;3*[.A72]+1)))" office:value-type="float" office:value="220" calcext:value-type="float">
            <text:p>220</text:p>
          </table:table-cell>
          <table:table-cell table:formula="of:=IF([.B72]=1;1;(IF(MOD([.B72];2)=0;[.B72]/2;3*[.B72]+1)))" office:value-type="float" office:value="110" calcext:value-type="float">
            <text:p>110</text:p>
          </table:table-cell>
          <table:table-cell table:formula="of:=IF([.C72]=1;1;(IF(MOD([.C72];2)=0;[.C72]/2;3*[.C72]+1)))" office:value-type="float" office:value="55" calcext:value-type="float">
            <text:p>55</text:p>
          </table:table-cell>
          <table:table-cell table:formula="of:=IF([.D72]=1;1;(IF(MOD([.D72];2)=0;[.D72]/2;3*[.D72]+1)))" office:value-type="float" office:value="166" calcext:value-type="float">
            <text:p>166</text:p>
          </table:table-cell>
          <table:table-cell table:formula="of:=IF([.E72]=1;1;(IF(MOD([.E72];2)=0;[.E72]/2;3*[.E72]+1)))" office:value-type="float" office:value="83" calcext:value-type="float">
            <text:p>83</text:p>
          </table:table-cell>
          <table:table-cell table:formula="of:=IF([.F72]=1;1;(IF(MOD([.F72];2)=0;[.F72]/2;3*[.F72]+1)))" office:value-type="float" office:value="250" calcext:value-type="float">
            <text:p>250</text:p>
          </table:table-cell>
          <table:table-cell table:formula="of:=IF([.G72]=1;1;(IF(MOD([.G72];2)=0;[.G72]/2;3*[.G72]+1)))" office:value-type="float" office:value="125" calcext:value-type="float">
            <text:p>125</text:p>
          </table:table-cell>
          <table:table-cell table:formula="of:=IF([.H72]=1;1;(IF(MOD([.H72];2)=0;[.H72]/2;3*[.H72]+1)))" office:value-type="float" office:value="376" calcext:value-type="float">
            <text:p>376</text:p>
          </table:table-cell>
          <table:table-cell table:formula="of:=IF([.I72]=1;1;(IF(MOD([.I72];2)=0;[.I72]/2;3*[.I72]+1)))" office:value-type="float" office:value="188" calcext:value-type="float">
            <text:p>188</text:p>
          </table:table-cell>
          <table:table-cell table:formula="of:=IF([.J72]=1;1;(IF(MOD([.J72];2)=0;[.J72]/2;3*[.J72]+1)))" office:value-type="float" office:value="94" calcext:value-type="float">
            <text:p>94</text:p>
          </table:table-cell>
          <table:table-cell table:formula="of:=IF([.K72]=1;1;(IF(MOD([.K72];2)=0;[.K72]/2;3*[.K72]+1)))" office:value-type="float" office:value="47" calcext:value-type="float">
            <text:p>47</text:p>
          </table:table-cell>
          <table:table-cell table:formula="of:=IF([.L72]=1;1;(IF(MOD([.L72];2)=0;[.L72]/2;3*[.L72]+1)))" office:value-type="float" office:value="142" calcext:value-type="float">
            <text:p>142</text:p>
          </table:table-cell>
          <table:table-cell table:formula="of:=IF([.M72]=1;1;(IF(MOD([.M72];2)=0;[.M72]/2;3*[.M72]+1)))" office:value-type="float" office:value="71" calcext:value-type="float">
            <text:p>71</text:p>
          </table:table-cell>
          <table:table-cell table:formula="of:=IF([.N72]=1;1;(IF(MOD([.N72];2)=0;[.N72]/2;3*[.N72]+1)))" office:value-type="float" office:value="214" calcext:value-type="float">
            <text:p>214</text:p>
          </table:table-cell>
          <table:table-cell table:formula="of:=IF([.O72]=1;1;(IF(MOD([.O72];2)=0;[.O72]/2;3*[.O72]+1)))" office:value-type="float" office:value="107" calcext:value-type="float">
            <text:p>107</text:p>
          </table:table-cell>
          <table:table-cell table:formula="of:=IF([.P72]=1;1;(IF(MOD([.P72];2)=0;[.P72]/2;3*[.P72]+1))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73]=1;1;(IF(MOD([.A73];2)=0;[.A73]/2;3*[.A73]+1)))" office:value-type="float" office:value="37" calcext:value-type="float">
            <text:p>37</text:p>
          </table:table-cell>
          <table:table-cell table:formula="of:=IF([.B73]=1;1;(IF(MOD([.B73];2)=0;[.B73]/2;3*[.B73]+1)))" office:value-type="float" office:value="112" calcext:value-type="float">
            <text:p>112</text:p>
          </table:table-cell>
          <table:table-cell table:formula="of:=IF([.C73]=1;1;(IF(MOD([.C73];2)=0;[.C73]/2;3*[.C73]+1)))" office:value-type="float" office:value="56" calcext:value-type="float">
            <text:p>56</text:p>
          </table:table-cell>
          <table:table-cell table:formula="of:=IF([.D73]=1;1;(IF(MOD([.D73];2)=0;[.D73]/2;3*[.D73]+1)))" office:value-type="float" office:value="28" calcext:value-type="float">
            <text:p>28</text:p>
          </table:table-cell>
          <table:table-cell table:formula="of:=IF([.E73]=1;1;(IF(MOD([.E73];2)=0;[.E73]/2;3*[.E73]+1)))" office:value-type="float" office:value="14" calcext:value-type="float">
            <text:p>14</text:p>
          </table:table-cell>
          <table:table-cell table:formula="of:=IF([.F73]=1;1;(IF(MOD([.F73];2)=0;[.F73]/2;3*[.F73]+1)))" office:value-type="float" office:value="7" calcext:value-type="float">
            <text:p>7</text:p>
          </table:table-cell>
          <table:table-cell table:formula="of:=IF([.G73]=1;1;(IF(MOD([.G73];2)=0;[.G73]/2;3*[.G73]+1)))" office:value-type="float" office:value="22" calcext:value-type="float">
            <text:p>22</text:p>
          </table:table-cell>
          <table:table-cell table:formula="of:=IF([.H73]=1;1;(IF(MOD([.H73];2)=0;[.H73]/2;3*[.H73]+1)))" office:value-type="float" office:value="11" calcext:value-type="float">
            <text:p>11</text:p>
          </table:table-cell>
          <table:table-cell table:formula="of:=IF([.I73]=1;1;(IF(MOD([.I73];2)=0;[.I73]/2;3*[.I73]+1)))" office:value-type="float" office:value="34" calcext:value-type="float">
            <text:p>34</text:p>
          </table:table-cell>
          <table:table-cell table:formula="of:=IF([.J73]=1;1;(IF(MOD([.J73];2)=0;[.J73]/2;3*[.J73]+1)))" office:value-type="float" office:value="17" calcext:value-type="float">
            <text:p>17</text:p>
          </table:table-cell>
          <table:table-cell table:formula="of:=IF([.K73]=1;1;(IF(MOD([.K73];2)=0;[.K73]/2;3*[.K73]+1)))" office:value-type="float" office:value="52" calcext:value-type="float">
            <text:p>52</text:p>
          </table:table-cell>
          <table:table-cell table:formula="of:=IF([.L73]=1;1;(IF(MOD([.L73];2)=0;[.L73]/2;3*[.L73]+1)))" office:value-type="float" office:value="26" calcext:value-type="float">
            <text:p>26</text:p>
          </table:table-cell>
          <table:table-cell table:formula="of:=IF([.M73]=1;1;(IF(MOD([.M73];2)=0;[.M73]/2;3*[.M73]+1)))" office:value-type="float" office:value="13" calcext:value-type="float">
            <text:p>13</text:p>
          </table:table-cell>
          <table:table-cell table:formula="of:=IF([.N73]=1;1;(IF(MOD([.N73];2)=0;[.N73]/2;3*[.N73]+1)))" office:value-type="float" office:value="40" calcext:value-type="float">
            <text:p>40</text:p>
          </table:table-cell>
          <table:table-cell table:formula="of:=IF([.O73]=1;1;(IF(MOD([.O73];2)=0;[.O73]/2;3*[.O73]+1)))" office:value-type="float" office:value="20" calcext:value-type="float">
            <text:p>20</text:p>
          </table:table-cell>
          <table:table-cell table:formula="of:=IF([.P73]=1;1;(IF(MOD([.P73];2)=0;[.P73]/2;3*[.P73]+1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74]=1;1;(IF(MOD([.A74];2)=0;[.A74]/2;3*[.A74]+1)))" office:value-type="float" office:value="226" calcext:value-type="float">
            <text:p>226</text:p>
          </table:table-cell>
          <table:table-cell table:formula="of:=IF([.B74]=1;1;(IF(MOD([.B74];2)=0;[.B74]/2;3*[.B74]+1)))" office:value-type="float" office:value="113" calcext:value-type="float">
            <text:p>113</text:p>
          </table:table-cell>
          <table:table-cell table:formula="of:=IF([.C74]=1;1;(IF(MOD([.C74];2)=0;[.C74]/2;3*[.C74]+1)))" office:value-type="float" office:value="340" calcext:value-type="float">
            <text:p>340</text:p>
          </table:table-cell>
          <table:table-cell table:formula="of:=IF([.D74]=1;1;(IF(MOD([.D74];2)=0;[.D74]/2;3*[.D74]+1)))" office:value-type="float" office:value="170" calcext:value-type="float">
            <text:p>170</text:p>
          </table:table-cell>
          <table:table-cell table:formula="of:=IF([.E74]=1;1;(IF(MOD([.E74];2)=0;[.E74]/2;3*[.E74]+1)))" office:value-type="float" office:value="85" calcext:value-type="float">
            <text:p>85</text:p>
          </table:table-cell>
          <table:table-cell table:formula="of:=IF([.F74]=1;1;(IF(MOD([.F74];2)=0;[.F74]/2;3*[.F74]+1)))" office:value-type="float" office:value="256" calcext:value-type="float">
            <text:p>256</text:p>
          </table:table-cell>
          <table:table-cell table:formula="of:=IF([.G74]=1;1;(IF(MOD([.G74];2)=0;[.G74]/2;3*[.G74]+1)))" office:value-type="float" office:value="128" calcext:value-type="float">
            <text:p>128</text:p>
          </table:table-cell>
          <table:table-cell table:formula="of:=IF([.H74]=1;1;(IF(MOD([.H74];2)=0;[.H74]/2;3*[.H74]+1)))" office:value-type="float" office:value="64" calcext:value-type="float">
            <text:p>64</text:p>
          </table:table-cell>
          <table:table-cell table:formula="of:=IF([.I74]=1;1;(IF(MOD([.I74];2)=0;[.I74]/2;3*[.I74]+1)))" office:value-type="float" office:value="32" calcext:value-type="float">
            <text:p>32</text:p>
          </table:table-cell>
          <table:table-cell table:formula="of:=IF([.J74]=1;1;(IF(MOD([.J74];2)=0;[.J74]/2;3*[.J74]+1)))" office:value-type="float" office:value="16" calcext:value-type="float">
            <text:p>16</text:p>
          </table:table-cell>
          <table:table-cell table:formula="of:=IF([.K74]=1;1;(IF(MOD([.K74];2)=0;[.K74]/2;3*[.K74]+1)))" office:value-type="float" office:value="8" calcext:value-type="float">
            <text:p>8</text:p>
          </table:table-cell>
          <table:table-cell table:formula="of:=IF([.L74]=1;1;(IF(MOD([.L74];2)=0;[.L74]/2;3*[.L74]+1)))" office:value-type="float" office:value="4" calcext:value-type="float">
            <text:p>4</text:p>
          </table:table-cell>
          <table:table-cell table:formula="of:=IF([.M74]=1;1;(IF(MOD([.M74];2)=0;[.M74]/2;3*[.M74]+1)))" office:value-type="float" office:value="2" calcext:value-type="float">
            <text:p>2</text:p>
          </table:table-cell>
          <table:table-cell table:formula="of:=IF([.N74]=1;1;(IF(MOD([.N74];2)=0;[.N74]/2;3*[.N74]+1)))" office:value-type="float" office:value="1" calcext:value-type="float">
            <text:p>1</text:p>
          </table:table-cell>
          <table:table-cell table:formula="of:=IF([.O74]=1;1;(IF(MOD([.O74];2)=0;[.O74]/2;3*[.O74]+1)))" office:value-type="float" office:value="1" calcext:value-type="float">
            <text:p>1</text:p>
          </table:table-cell>
          <table:table-cell table:formula="of:=IF([.P74]=1;1;(IF(MOD([.P74];2)=0;[.P74]/2;3*[.P74]+1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75]=1;1;(IF(MOD([.A75];2)=0;[.A75]/2;3*[.A75]+1)))" office:value-type="float" office:value="38" calcext:value-type="float">
            <text:p>38</text:p>
          </table:table-cell>
          <table:table-cell table:formula="of:=IF([.B75]=1;1;(IF(MOD([.B75];2)=0;[.B75]/2;3*[.B75]+1)))" office:value-type="float" office:value="19" calcext:value-type="float">
            <text:p>19</text:p>
          </table:table-cell>
          <table:table-cell table:formula="of:=IF([.C75]=1;1;(IF(MOD([.C75];2)=0;[.C75]/2;3*[.C75]+1)))" office:value-type="float" office:value="58" calcext:value-type="float">
            <text:p>58</text:p>
          </table:table-cell>
          <table:table-cell table:formula="of:=IF([.D75]=1;1;(IF(MOD([.D75];2)=0;[.D75]/2;3*[.D75]+1)))" office:value-type="float" office:value="29" calcext:value-type="float">
            <text:p>29</text:p>
          </table:table-cell>
          <table:table-cell table:formula="of:=IF([.E75]=1;1;(IF(MOD([.E75];2)=0;[.E75]/2;3*[.E75]+1)))" office:value-type="float" office:value="88" calcext:value-type="float">
            <text:p>88</text:p>
          </table:table-cell>
          <table:table-cell table:formula="of:=IF([.F75]=1;1;(IF(MOD([.F75];2)=0;[.F75]/2;3*[.F75]+1)))" office:value-type="float" office:value="44" calcext:value-type="float">
            <text:p>44</text:p>
          </table:table-cell>
          <table:table-cell table:formula="of:=IF([.G75]=1;1;(IF(MOD([.G75];2)=0;[.G75]/2;3*[.G75]+1)))" office:value-type="float" office:value="22" calcext:value-type="float">
            <text:p>22</text:p>
          </table:table-cell>
          <table:table-cell table:formula="of:=IF([.H75]=1;1;(IF(MOD([.H75];2)=0;[.H75]/2;3*[.H75]+1)))" office:value-type="float" office:value="11" calcext:value-type="float">
            <text:p>11</text:p>
          </table:table-cell>
          <table:table-cell table:formula="of:=IF([.I75]=1;1;(IF(MOD([.I75];2)=0;[.I75]/2;3*[.I75]+1)))" office:value-type="float" office:value="34" calcext:value-type="float">
            <text:p>34</text:p>
          </table:table-cell>
          <table:table-cell table:formula="of:=IF([.J75]=1;1;(IF(MOD([.J75];2)=0;[.J75]/2;3*[.J75]+1)))" office:value-type="float" office:value="17" calcext:value-type="float">
            <text:p>17</text:p>
          </table:table-cell>
          <table:table-cell table:formula="of:=IF([.K75]=1;1;(IF(MOD([.K75];2)=0;[.K75]/2;3*[.K75]+1)))" office:value-type="float" office:value="52" calcext:value-type="float">
            <text:p>52</text:p>
          </table:table-cell>
          <table:table-cell table:formula="of:=IF([.L75]=1;1;(IF(MOD([.L75];2)=0;[.L75]/2;3*[.L75]+1)))" office:value-type="float" office:value="26" calcext:value-type="float">
            <text:p>26</text:p>
          </table:table-cell>
          <table:table-cell table:formula="of:=IF([.M75]=1;1;(IF(MOD([.M75];2)=0;[.M75]/2;3*[.M75]+1)))" office:value-type="float" office:value="13" calcext:value-type="float">
            <text:p>13</text:p>
          </table:table-cell>
          <table:table-cell table:formula="of:=IF([.N75]=1;1;(IF(MOD([.N75];2)=0;[.N75]/2;3*[.N75]+1)))" office:value-type="float" office:value="40" calcext:value-type="float">
            <text:p>40</text:p>
          </table:table-cell>
          <table:table-cell table:formula="of:=IF([.O75]=1;1;(IF(MOD([.O75];2)=0;[.O75]/2;3*[.O75]+1)))" office:value-type="float" office:value="20" calcext:value-type="float">
            <text:p>20</text:p>
          </table:table-cell>
          <table:table-cell table:formula="of:=IF([.P75]=1;1;(IF(MOD([.P75];2)=0;[.P75]/2;3*[.P75]+1))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8:28:07.173401192</meta:creation-date>
    <dc:date>2026-02-16T10:39:07.174336497</dc:date>
    <meta:editing-duration>PT3M48S</meta:editing-duration>
    <meta:editing-cycles>1</meta:editing-cycles>
    <meta:document-statistic meta:table-count="1" meta:cell-count="1275" meta:object-count="0"/>
    <meta:generator>LibreOffice/24.2.7.2$Linux_X86_64 LibreOffice_project/420$Build-2</meta:generator>
  </office:meta>
</office:document-meta>
</file>